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20000006F12695969.png" manifest:media-type="image/png"/>
  <manifest:file-entry manifest:full-path="Pictures/10000000000000F20000006A39AEF8A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3cm" svg:stroke-color="#000000" draw:stroke-linejoin="miter" svg:stroke-linecap="butt" draw:fill="none" fo:padding-top="0.016cm" fo:padding-bottom="0.016cm" fo:padding-left="0.016cm" fo:padding-right="0.016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4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5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92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53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55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9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07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62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13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9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12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1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13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29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09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6.08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89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05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6.84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6.91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54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61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31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35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23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97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2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17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25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06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65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84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07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75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24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57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2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12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66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1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9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6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18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0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6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3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32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18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6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6.06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11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035cm" fo:min-width="0.03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9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7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44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5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9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01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4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3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9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3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9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4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0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style:paragraph-properties fo:text-align="left" style:writing-mode="lr-tb"/>
    </style:style>
    <style:style style:name="P7" style:family="paragraph">
      <loext:graphic-properties draw:fill="none"/>
      <style:paragraph-properties fo:text-align="left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paragraph-properties fo:text-align="start"/>
      <style:text-properties fo:font-size="8.10000038146973pt" style:font-size-asian="8.10000038146973pt" style:font-size-complex="8.10000038146973pt"/>
    </style:style>
    <style:style style:name="P1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4" style:family="paragraph">
      <loext:graphic-properties draw:fill="none"/>
      <style:text-properties fo:font-size="1pt" style:font-size-asian="1pt" style:font-size-complex="1pt"/>
    </style:style>
    <style:style style:name="P15" style:family="paragraph">
      <loext:graphic-properties draw:fill="none"/>
      <style:text-properties fo:font-size="13.5pt" style:font-size-asian="13.5pt" style:font-size-complex="13.5pt"/>
    </style:style>
    <style:style style:name="P16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3" style:family="text">
      <style:text-properties fo:color="#000000" loext:opacity="100%" style:font-name="Times New Roman" fo:font-size="8.10000038146973pt" fo:font-weight="normal" style:font-name-asian="Times New Roman" style:font-size-asian="8.10000038146973pt" style:font-weight-asian="normal" style:font-name-complex="Times New Roman" style:font-size-complex="8.10000038146973pt" style:font-weight-complex="normal"/>
    </style:style>
    <style:style style:name="T4" style:family="text">
      <style:text-properties fo:color="#000000" loext:opacity="100%" style:font-name="Calibri" fo:font-size="8.10000038146973pt" fo:font-weight="bold" style:font-name-asian="Calibri" style:font-size-asian="8.10000038146973pt" style:font-weight-asian="bold" style:font-name-complex="Calibri" style:font-size-complex="8.10000038146973pt" style:font-weight-complex="bold"/>
    </style:style>
    <style:style style:name="T5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6" style:family="text">
      <style:text-properties fo:color="#000000" loext:opacity="100%" style:font-name="Calibri" fo:font-size="7.5pt" fo:font-weight="normal" style:font-name-asian="Calibri" style:font-size-asian="7.5pt" style:font-weight-asian="normal" style:font-name-complex="Calibri" style:font-size-complex="7.5pt" style:font-weight-complex="normal"/>
    </style:style>
    <style:style style:name="T7" style:family="text">
      <style:text-properties fo:color="#000000" loext:opacity="100%" style:font-name="Calibri" fo:font-size="6.5pt" fo:font-weight="normal" style:font-name-asian="Calibri" style:font-size-asian="6.5pt" style:font-weight-asian="normal" style:font-name-complex="Calibri" style:font-size-complex="6.5pt" style:font-weight-complex="normal"/>
    </style:style>
    <style:style style:name="T8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9" style:family="text">
      <style:text-properties fo:color="#000000" loext:opacity="100%" style:font-name="Times New Roman" fo:font-size="9.89999961853027pt" fo:font-weight="normal" style:font-name-asian="Times New Roman" style:font-size-asian="9.89999961853027pt" style:font-weight-asian="normal" style:font-name-complex="Times New Roman" style:font-size-complex="9.89999961853027pt" style:font-weight-complex="normal"/>
    </style:style>
    <style:style style:name="T10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2" style:family="text">
      <style:text-properties fo:color="#000000" loext:opacity="100%" style:font-name="Calibri" fo:font-size="1pt" fo:font-weight="normal" style:font-name-asian="Calibri" style:font-size-asian="1pt" style:font-weight-asian="normal" style:font-name-complex="Calibri" style:font-size-complex="1pt" style:font-weight-complex="normal"/>
    </style:style>
    <style:style style:name="T13" style:family="text">
      <style:text-properties fo:color="#000000" loext:opacity="100%" style:font-name="Calibri" fo:font-size="13.5pt" fo:font-weight="normal" style:font-name-asian="Calibri" style:font-size-asian="13.5pt" style:font-weight-asian="normal" style:font-name-complex="Calibri" style:font-size-complex="13.5pt" style:font-weight-complex="normal"/>
    </style:style>
    <style:style style:name="T14" style:family="text">
      <style:text-properties fo:color="#000000" loext:opacity="100%" style:font-name="Times New Roman" fo:font-size="6.90000009536743pt" fo:font-weight="normal" style:font-name-asian="Times New Roman" style:font-size-asian="6.90000009536743pt" style:font-weight-asian="normal" style:font-name-complex="Times New Roman" style:font-size-complex="6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601cm" svg:height="0.601cm" svg:x="2.634cm" svg:y="3.839cm" svg:viewBox="0 0 602 602" draw:points="0,0 602,0 602,602 0,602">
          <text:p/>
        </draw:polygon>
        <draw:polygon draw:style-name="gr1" draw:text-style-name="P1" draw:layer="layout" svg:width="0.6cm" svg:height="0.601cm" svg:x="4.482cm" svg:y="3.839cm" svg:viewBox="0 0 601 602" draw:points="0,0 601,0 601,602 0,602">
          <text:p/>
        </draw:polygon>
        <draw:polygon draw:style-name="gr1" draw:text-style-name="P1" draw:layer="layout" svg:width="0.6cm" svg:height="0.6cm" svg:x="6.284cm" svg:y="3.857cm" svg:viewBox="0 0 601 601" draw:points="0,0 601,0 601,601 0,601">
          <text:p/>
        </draw:polygon>
        <draw:frame draw:style-name="gr2" draw:text-style-name="P3" draw:layer="layout" svg:width="5.07cm" svg:height="0.64cm" svg:x="1.27cm" svg:y="1.45cm">
          <draw:text-box>
            <text:p text:style-name="P2"><text:span text:style-name="T1">SRA/TTS Skjutprov </text:span></text:p>
          </draw:text-box>
        </draw:frame>
        <draw:polygon draw:style-name="gr3" draw:text-style-name="P4" draw:layer="layout" svg:width="6.4cm" svg:height="0.015cm" svg:x="2.175cm" svg:y="2.589cm" svg:viewBox="0 0 6401 16" draw:points="0,0 6401,0 6401,16 0,16">
          <text:p/>
        </draw:polygon>
        <draw:frame draw:style-name="gr4" draw:text-style-name="P5" draw:layer="layout" svg:width="0.914cm" svg:height="0.289cm" svg:x="1.27cm" svg:y="2.349cm">
          <draw:text-box>
            <text:p text:style-name="P2"><text:span text:style-name="T2">Namn: <text:s/></text:span></text:p>
          </draw:text-box>
        </draw:frame>
        <draw:frame draw:style-name="gr5" draw:text-style-name="P5" draw:layer="layout" svg:width="0.285cm" svg:height="0.323cm" svg:x="2.176cm" svg:y="2.111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534cm" svg:y="2.11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6.12cm" svg:height="0.014cm" svg:x="2.441cm" svg:y="3.079cm" svg:viewBox="0 0 6121 15" draw:points="0,0 6121,0 6121,15 0,15">
          <text:p/>
        </draw:polygon>
        <draw:frame draw:style-name="gr6" draw:text-style-name="P5" draw:layer="layout" svg:width="1.241cm" svg:height="0.289cm" svg:x="1.27cm" svg:y="2.837cm">
          <draw:text-box>
            <text:p text:style-name="P2"><text:span text:style-name="T2">Förening: <text:s/></text:span></text:p>
          </draw:text-box>
        </draw:frame>
        <draw:frame draw:style-name="gr5" draw:text-style-name="P5" draw:layer="layout" svg:width="0.285cm" svg:height="0.323cm" svg:x="2.942cm" svg:y="3.401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4.902cm" svg:y="3.401cm">
          <draw:text-box>
            <text:p text:style-name="P2"><text:span text:style-name="T3"><text:s/></text:span></text:p>
          </draw:text-box>
        </draw:frame>
        <draw:frame draw:style-name="gr7" draw:text-style-name="P5" draw:layer="layout" svg:width="1.1cm" svg:height="0.289cm" svg:x="1.27cm" svg:y="3.877cm">
          <draw:text-box>
            <text:p text:style-name="P2"><text:span text:style-name="T4">Division:</text:span><text:span text:style-name="T2"> </text:span></text:p>
          </draw:text-box>
        </draw:frame>
        <draw:frame draw:style-name="gr8" draw:text-style-name="P5" draw:layer="layout" svg:width="0.285cm" svg:height="0.289cm" svg:x="4.119cm" svg:y="3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855cm" svg:height="0.289cm" svg:x="5.26cm" svg:y="3.877cm">
          <draw:text-box>
            <text:p text:style-name="P2"><text:span text:style-name="T2">Öppen </text:span></text:p>
          </draw:text-box>
        </draw:frame>
        <draw:frame draw:style-name="gr10" draw:text-style-name="P7" draw:layer="layout" svg:width="1.288cm" svg:height="0.289cm" svg:x="7.051cm" svg:y="3.877cm">
          <draw:text-box>
            <text:p text:style-name="P6"><text:span text:style-name="T2">Standard</text:span></text:p>
          </draw:text-box>
        </draw:frame>
        <draw:frame draw:style-name="gr11" draw:text-style-name="P8" draw:layer="layout" svg:width="0.317cm" svg:height="0.319cm" svg:x="1.058cm" svg:y="4.13cm">
          <draw:text-box>
            <text:p text:style-name="P2"><text:span text:style-name="T5"><text:s/></text:span></text:p>
          </draw:text-box>
        </draw:frame>
        <draw:frame draw:style-name="gr12" draw:text-style-name="P5" draw:layer="layout" svg:width="9.921cm" svg:height="0.289cm" svg:x="1.27cm" svg:y="4.705cm">
          <draw:text-box>
            <text:p text:style-name="P2"><text:span text:style-name="T2">Två IPSC-metric tavlor dukas med ett mellanrum på 110cm. Varje tavla ska beskjutas </text:span></text:p>
          </draw:text-box>
        </draw:frame>
        <draw:frame draw:style-name="gr13" draw:text-style-name="P5" draw:layer="layout" svg:width="8.536cm" svg:height="0.289cm" svg:x="1.27cm" svg:y="5.039cm">
          <draw:text-box>
            <text:p text:style-name="P2"><text:span text:style-name="T2">med två skott. Poängsättning – </text:span><text:span text:style-name="T4">begränsad tid och skott med poängkvot</text:span><text:span text:style-name="T2">. </text:span></text:p>
          </draw:text-box>
        </draw:frame>
        <draw:frame draw:style-name="gr14" draw:text-style-name="P5" draw:layer="layout" svg:width="9.551cm" svg:height="0.289cm" svg:x="1.271cm" svg:y="5.37cm">
          <draw:text-box>
            <text:p text:style-name="P2"><text:span text:style-name="T2">Vid övning 1, 2 och 4 skjuts 12 skott per övning. Vid övning 3 skjuts 6 skott och vid</text:span></text:p>
          </draw:text-box>
        </draw:frame>
        <draw:frame draw:style-name="gr15" draw:text-style-name="P5" draw:layer="layout" svg:width="8.397cm" svg:height="0.577cm" svg:x="1.271cm" svg:y="5.705cm">
          <draw:text-box>
            <text:p text:style-name="P2"><text:span text:style-name="T2">övning 5 skjuts 8 skott med pistol alternativt 12 skott med gevär/karbin.</text:span></text:p>
            <text:p text:style-name="P2"><text:span text:style-name="T2">Totalt 50/54 skott. Max 250 / 270 poäng</text:span></text:p>
          </draw:text-box>
        </draw:frame>
        <draw:frame draw:style-name="gr16" draw:text-style-name="P5" draw:layer="layout" svg:width="10.072cm" svg:height="0.289cm" svg:x="1.294cm" svg:y="6.383cm">
          <draw:text-box>
            <text:p text:style-name="P2"><text:span text:style-name="T2">OBSERVERA: <text:s/>I <text:s/>Sverige <text:s/>ska <text:s/>detta <text:s/>prov <text:s/>kompletteras <text:s/>med <text:s/>FM <text:s/>Kompetensprov <text:s/>BAS </text:span></text:p>
          </draw:text-box>
        </draw:frame>
        <draw:frame draw:style-name="gr17" draw:text-style-name="P5" draw:layer="layout" svg:width="7.627cm" svg:height="0.289cm" svg:x="1.294cm" svg:y="6.714cm">
          <draw:text-box>
            <text:p text:style-name="P2"><text:span text:style-name="T2">automatkarbin ur Handbok Skjututbildning Automatkarbin 2021. </text:span></text:p>
          </draw:text-box>
        </draw:frame>
        <draw:frame draw:style-name="gr18" draw:text-style-name="P9" draw:layer="layout" svg:width="0.264cm" svg:height="0.268cm" svg:x="1.058cm" svg:y="6.721cm">
          <draw:text-box>
            <text:p text:style-name="P2"><text:span text:style-name="T6"><text:s/></text:span></text:p>
          </draw:text-box>
        </draw:frame>
        <draw:frame draw:style-name="gr19" draw:text-style-name="P5" draw:layer="layout" svg:width="10.134cm" svg:height="0.289cm" svg:x="1.27cm" svg:y="7.2cm">
          <draw:text-box>
            <text:p text:style-name="P2"><text:span text:style-name="T4">Övn. 1: </text:span><text:span text:style-name="T2">10 m.Partid 5s/delmoment. Stående grundställning. Vid delmoment 1 och 2 är </text:span></text:p>
          </draw:text-box>
        </draw:frame>
        <draw:frame draw:style-name="gr20" draw:text-style-name="P5" draw:layer="layout" svg:width="9.946cm" svg:height="0.289cm" svg:x="1.27cm" svg:y="7.588cm">
          <draw:text-box>
            <text:p text:style-name="P2"><text:span text:style-name="T2">vapnet laddat och hölstrat. Vid delmoment 3 är vapnet laddat och hållet i stödhand. <text:s/></text:span></text:p>
          </draw:text-box>
        </draw:frame>
        <draw:frame draw:style-name="gr21" draw:text-style-name="P5" draw:layer="layout" svg:width="7.128cm" svg:height="0.289cm" svg:x="1.27cm" svg:y="7.995cm">
          <draw:text-box>
            <text:p text:style-name="P2"><text:span text:style-name="T2">Delmoment 1: 2 skott mot varje tavla med tvåhandsfattning. </text:span></text:p>
          </draw:text-box>
        </draw:frame>
        <draw:frame draw:style-name="gr22" draw:text-style-name="P5" draw:layer="layout" svg:width="8.182cm" svg:height="0.289cm" svg:x="1.27cm" svg:y="8.35cm">
          <draw:text-box>
            <text:p text:style-name="P2"><text:span text:style-name="T2">Delmoment 2: 2 skott mot varje tavla med endast skjuthandsfattning. </text:span></text:p>
          </draw:text-box>
        </draw:frame>
        <draw:frame draw:style-name="gr23" draw:text-style-name="P5" draw:layer="layout" svg:width="8.134cm" svg:height="0.289cm" svg:x="1.27cm" svg:y="8.71cm">
          <draw:text-box>
            <text:p text:style-name="P2"><text:span text:style-name="T2">Delmoment 3: 2 skott mot varje tavla med endast stödhandsfattning. </text:span></text:p>
          </draw:text-box>
        </draw:frame>
        <draw:frame draw:style-name="gr8" draw:text-style-name="P5" draw:layer="layout" svg:width="0.285cm" svg:height="0.289cm" svg:x="1.058cm" svg:y="8.904cm">
          <draw:text-box>
            <text:p text:style-name="P2"><text:span text:style-name="T2"><text:s/></text:span></text:p>
          </draw:text-box>
        </draw:frame>
        <draw:frame draw:style-name="gr24" draw:text-style-name="P5" draw:layer="layout" svg:width="7.298cm" svg:height="0.289cm" svg:x="1.27cm" svg:y="9.261cm">
          <draw:text-box>
            <text:p text:style-name="P2"><text:span text:style-name="T4">Övn. 2</text:span><text:span text:style-name="T2">. 10 m. Partid 5s / delmoment. Stående grundställning. <text:s/></text:span></text:p>
          </draw:text-box>
        </draw:frame>
        <draw:frame draw:style-name="gr25" draw:text-style-name="P5" draw:layer="layout" svg:width="9.098cm" svg:height="0.289cm" svg:x="1.27cm" svg:y="9.603cm">
          <draw:text-box>
            <text:p text:style-name="P2"><text:span text:style-name="T2">Vapnet är laddat och hölstrat, <text:s/>vid delmoment 1 – ryggen vänd mot tavlorna, <text:s/></text:span></text:p>
          </draw:text-box>
        </draw:frame>
        <draw:frame draw:style-name="gr26" draw:text-style-name="P5" draw:layer="layout" svg:width="6.084cm" svg:height="0.289cm" svg:x="1.271cm" svg:y="9.951cm">
          <draw:text-box>
            <text:p text:style-name="P2"><text:span text:style-name="T2">vid delmoment 2 – vänster sida vänd mot tavlorna, <text:s/></text:span></text:p>
          </draw:text-box>
        </draw:frame>
        <draw:frame draw:style-name="gr27" draw:text-style-name="P5" draw:layer="layout" svg:width="5.895cm" svg:height="0.289cm" svg:x="1.271cm" svg:y="10.297cm">
          <draw:text-box>
            <text:p text:style-name="P2"><text:span text:style-name="T2">vid delmoment 3 – höger sida vänd mot tavlorna. <text:s/></text:span></text:p>
          </draw:text-box>
        </draw:frame>
        <draw:frame draw:style-name="gr28" draw:text-style-name="P5" draw:layer="layout" svg:width="7.059cm" svg:height="0.289cm" svg:x="1.266cm" svg:y="10.632cm">
          <draw:text-box>
            <text:p text:style-name="P2"><text:span text:style-name="T2">Delmoment 1: Rotera 180° och skjut 2 skott mot varje tavla. </text:span></text:p>
          </draw:text-box>
        </draw:frame>
        <draw:frame draw:style-name="gr29" draw:text-style-name="P5" draw:layer="layout" svg:width="6.913cm" svg:height="0.289cm" svg:x="1.266cm" svg:y="10.976cm">
          <draw:text-box>
            <text:p text:style-name="P2"><text:span text:style-name="T2">Delmoment 2: Rotera 90° och skjut 2 skott mot varje tavla. </text:span></text:p>
          </draw:text-box>
        </draw:frame>
        <draw:frame draw:style-name="gr30" draw:text-style-name="P5" draw:layer="layout" svg:width="6.913cm" svg:height="0.289cm" svg:x="1.266cm" svg:y="11.319cm">
          <draw:text-box>
            <text:p text:style-name="P2"><text:span text:style-name="T2">Delmoment 3: Rotera 90° och skjut 2 skott mot varje tavla. </text:span></text:p>
          </draw:text-box>
        </draw:frame>
        <draw:frame draw:style-name="gr18" draw:text-style-name="P9" draw:layer="layout" svg:width="0.264cm" svg:height="0.268cm" svg:x="1.058cm" svg:y="11.674cm">
          <draw:text-box>
            <text:p text:style-name="P2"><text:span text:style-name="T6"><text:s/></text:span></text:p>
          </draw:text-box>
        </draw:frame>
        <draw:frame draw:style-name="gr19" draw:text-style-name="P5" draw:layer="layout" svg:width="10.134cm" svg:height="0.289cm" svg:x="1.266cm" svg:y="11.995cm">
          <draw:text-box>
            <text:p text:style-name="P2"><text:span text:style-name="T4">Övn. 3</text:span><text:span text:style-name="T2">. 10 m. Partid 15s. Stående grundställning, ryggen vänd mot tavlorna. Vapnet är </text:span></text:p>
          </draw:text-box>
        </draw:frame>
        <draw:frame draw:style-name="gr31" draw:text-style-name="P5" draw:layer="layout" svg:width="10.549cm" svg:height="0.289cm" svg:x="1.266cm" svg:y="12.333cm">
          <draw:text-box>
            <text:p text:style-name="P2"><text:span text:style-name="T2">laddat och hölstrat. Skytten väljer själv om denne startar från Box A eller B. Vid startsignal </text:span></text:p>
          </draw:text-box>
        </draw:frame>
        <draw:frame draw:style-name="gr32" draw:text-style-name="P5" draw:layer="layout" svg:width="10.616cm" svg:height="0.289cm" svg:x="1.266cm" svg:y="12.668cm">
          <draw:text-box>
            <text:p text:style-name="P2"><text:span text:style-name="T2">vänder sig skytten om och skjuter två skott mot närmsta tavla, därefter framrycker skytten </text:span></text:p>
          </draw:text-box>
        </draw:frame>
        <draw:frame draw:style-name="gr33" draw:text-style-name="P5" draw:layer="layout" svg:width="10.314cm" svg:height="0.289cm" svg:x="1.266cm" svg:y="13.006cm">
          <draw:text-box>
            <text:p text:style-name="P2"><text:span text:style-name="T2">till bortre box, byter magasin och skjuter 2 skott mot närmsta tavla, därefter framrycker </text:span></text:p>
          </draw:text-box>
        </draw:frame>
        <draw:frame draw:style-name="gr34" draw:text-style-name="P5" draw:layer="layout" svg:width="10.356cm" svg:height="0.289cm" svg:x="1.266cm" svg:y="13.345cm">
          <draw:text-box>
            <text:p text:style-name="P2"><text:span text:style-name="T2">skytten tillbaka till ursprungsbox, byter magasin och skjuter två skott mot närmsta tavla. </text:span></text:p>
          </draw:text-box>
        </draw:frame>
        <draw:frame draw:style-name="gr8" draw:text-style-name="P5" draw:layer="layout" svg:width="0.285cm" svg:height="0.289cm" svg:x="1.059cm" svg:y="13.701cm">
          <draw:text-box>
            <text:p text:style-name="P2"><text:span text:style-name="T2"><text:s/></text:span></text:p>
          </draw:text-box>
        </draw:frame>
        <draw:frame draw:style-name="gr35" draw:text-style-name="P5" draw:layer="layout" svg:width="10.233cm" svg:height="0.289cm" svg:x="1.266cm" svg:y="14.035cm">
          <draw:text-box>
            <text:p text:style-name="P2"><text:span text:style-name="T4">Övn. 4</text:span><text:span text:style-name="T2">. 20–15–10 m. Partid 25s. Stående grundställning, vapnet är laddat och hölstrat. <text:s/></text:span></text:p>
          </draw:text-box>
        </draw:frame>
        <draw:frame draw:style-name="gr36" draw:text-style-name="P5" draw:layer="layout" svg:width="9.972cm" svg:height="0.289cm" svg:x="1.267cm" svg:y="14.37cm">
          <draw:text-box>
            <text:p text:style-name="P2"><text:span text:style-name="T2">Vid startsignal skjuts 2 skott mot varje tavla från Box C (20m) i stående skjutställning, </text:span></text:p>
          </draw:text-box>
        </draw:frame>
        <draw:frame draw:style-name="gr37" draw:text-style-name="P5" draw:layer="layout" svg:width="10.239cm" svg:height="0.289cm" svg:x="1.267cm" svg:y="14.705cm">
          <draw:text-box>
            <text:p text:style-name="P2"><text:span text:style-name="T2">därefter framrycker skytten till Box D (15m), byte magasin och skjuter 2 skott mot varje </text:span></text:p>
          </draw:text-box>
        </draw:frame>
        <draw:frame draw:style-name="gr38" draw:text-style-name="P5" draw:layer="layout" svg:width="10.178cm" svg:height="0.289cm" svg:x="1.267cm" svg:y="15.034cm">
          <draw:text-box>
            <text:p text:style-name="P2"><text:span text:style-name="T2">tavla <text:s/>i <text:s/>knästående <text:s/>skjutställning, <text:s/>därefter <text:s/>framrycker <text:s/>skytten <text:s/>till <text:s/>Box <text:s/>E <text:s/>(10m) <text:s/>och </text:span></text:p>
          </draw:text-box>
        </draw:frame>
        <draw:frame draw:style-name="gr39" draw:text-style-name="P5" draw:layer="layout" svg:width="10.258cm" svg:height="0.289cm" svg:x="1.267cm" svg:y="15.369cm">
          <draw:text-box>
            <text:p text:style-name="P2"><text:span text:style-name="T2">skjuter två skott mot varje tavla i liggande skjutställning. (vid skjutbanebegränsning kan </text:span></text:p>
          </draw:text-box>
        </draw:frame>
        <draw:frame draw:style-name="gr40" draw:text-style-name="P5" draw:layer="layout" svg:width="4.04cm" svg:height="0.289cm" svg:x="1.267cm" svg:y="15.702cm">
          <draw:text-box>
            <text:p text:style-name="P2"><text:span text:style-name="T2">knästående skjutställning nyttjas). </text:span></text:p>
          </draw:text-box>
        </draw:frame>
        <draw:frame draw:style-name="gr18" draw:text-style-name="P9" draw:layer="layout" svg:width="0.264cm" svg:height="0.268cm" svg:x="1.058cm" svg:y="16.051cm">
          <draw:text-box>
            <text:p text:style-name="P2"><text:span text:style-name="T6"><text:s/></text:span></text:p>
          </draw:text-box>
        </draw:frame>
        <draw:frame draw:style-name="gr41" draw:text-style-name="P5" draw:layer="layout" svg:width="10.068cm" svg:height="0.289cm" svg:x="1.27cm" svg:y="16.38cm">
          <draw:text-box>
            <text:p text:style-name="P2"><text:span text:style-name="T4">Övn. 5</text:span><text:span text:style-name="T2">. Valbar som pistol eller gevärs/karbinprov. Partid 15s. Gevär/Karbin 20m-15m. </text:span></text:p>
          </draw:text-box>
        </draw:frame>
        <draw:frame draw:style-name="gr42" draw:text-style-name="P5" draw:layer="layout" svg:width="9.653cm" svg:height="0.289cm" svg:x="1.27cm" svg:y="16.723cm">
          <draw:text-box>
            <text:p text:style-name="P2"><text:span text:style-name="T2">Stående grundställning. Skytten väljer själv om denne startar från Box F eller G. På </text:span></text:p>
          </draw:text-box>
        </draw:frame>
        <draw:frame draw:style-name="gr43" draw:text-style-name="P5" draw:layer="layout" svg:width="9.845cm" svg:height="0.289cm" svg:x="1.271cm" svg:y="17.066cm">
          <draw:text-box>
            <text:p text:style-name="P2"><text:span text:style-name="T2">startsignal skjuts två skott mot varje tavla från startbox, därefter framrycker skytten </text:span></text:p>
          </draw:text-box>
        </draw:frame>
        <draw:frame draw:style-name="gr44" draw:text-style-name="P5" draw:layer="layout" svg:width="10.077cm" svg:height="0.289cm" svg:x="1.271cm" svg:y="17.413cm">
          <draw:text-box>
            <text:p text:style-name="P2"><text:span text:style-name="T2">till bortre Box (F/G) och skjuter 2 skott mot varje tavla, därefter framrycker skytten till </text:span></text:p>
          </draw:text-box>
        </draw:frame>
        <draw:frame draw:style-name="gr45" draw:text-style-name="P5" draw:layer="layout" svg:width="9.753cm" svg:height="0.289cm" svg:x="1.271cm" svg:y="17.756cm">
          <draw:text-box>
            <text:p text:style-name="P2"><text:span text:style-name="T2">Box D och skjuter 2 skott mot varje tavla. <text:s/>Pistol: 10–15 m, Stående grundställning I </text:span></text:p>
          </draw:text-box>
        </draw:frame>
        <draw:frame draw:style-name="gr46" draw:text-style-name="P5" draw:layer="layout" svg:width="9.242cm" svg:height="0.289cm" svg:x="1.271cm" svg:y="18.099cm">
          <draw:text-box>
            <text:p text:style-name="P2"><text:span text:style-name="T2">Box E. Vapnet laddat och hölstrat. Vid startsignal skjuts 2 skott mot varje tavla, </text:span></text:p>
          </draw:text-box>
        </draw:frame>
        <draw:polygon draw:style-name="gr3" draw:text-style-name="P4" draw:layer="layout" svg:width="1.316cm" svg:height="0.018cm" svg:x="1.27cm" svg:y="19.442cm" svg:viewBox="0 0 1317 19" draw:points="0,0 1317,0 1317,19 0,19">
          <text:p/>
        </draw:polygon>
        <draw:frame draw:style-name="gr47" draw:text-style-name="P5" draw:layer="layout" svg:width="8.578cm" svg:height="0.289cm" svg:x="1.271cm" svg:y="18.446cm">
          <draw:text-box>
            <text:p text:style-name="P2"><text:span text:style-name="T2">därefter framrycker skytten till Box-D och skjuter 2 skott mot varje tavla. <text:s/></text:span></text:p>
          </draw:text-box>
        </draw:frame>
        <draw:frame draw:style-name="gr48" draw:text-style-name="P10" draw:layer="layout" svg:width="0.228cm" svg:height="0.234cm" svg:x="1.058cm" svg:y="18.789cm">
          <draw:text-box>
            <text:p text:style-name="P2"><text:span text:style-name="T7"><text:s/></text:span></text:p>
          </draw:text-box>
        </draw:frame>
        <draw:frame draw:style-name="gr49" draw:text-style-name="P5" draw:layer="layout" svg:width="1.396cm" svg:height="0.289cm" svg:x="1.27cm" svg:y="19.196cm">
          <draw:text-box>
            <text:p text:style-name="P2"><text:span text:style-name="T4">Att beakta: </text:span></text:p>
          </draw:text-box>
        </draw:frame>
        <draw:frame draw:style-name="gr50" draw:text-style-name="P5" draw:layer="layout" svg:width="8.128cm" svg:height="0.289cm" svg:x="1.27cm" svg:y="19.577cm">
          <draw:text-box>
            <text:p text:style-name="P2"><text:span text:style-name="T2">Brister i säker vapenhantering leder till automatiskt underkännande. <text:s/></text:span></text:p>
          </draw:text-box>
        </draw:frame>
        <draw:frame draw:style-name="gr51" draw:text-style-name="P5" draw:layer="layout" svg:width="8.666cm" svg:height="0.289cm" svg:x="1.27cm" svg:y="19.962cm">
          <draw:text-box>
            <text:p text:style-name="P2"><text:span text:style-name="T2">Om skytten får 2 eller fler varningar kopplat till vapenhantering är skytten </text:span></text:p>
          </draw:text-box>
        </draw:frame>
        <draw:frame draw:style-name="gr52" draw:text-style-name="P5" draw:layer="layout" svg:width="1.473cm" svg:height="0.289cm" svg:x="1.27cm" svg:y="20.296cm">
          <draw:text-box>
            <text:p text:style-name="P2"><text:span text:style-name="T2">underkänd. <text:s/></text:span></text:p>
          </draw:text-box>
        </draw:frame>
        <draw:frame draw:style-name="gr8" draw:text-style-name="P5" draw:layer="layout" svg:width="0.285cm" svg:height="0.289cm" svg:x="1.329cm" svg:y="20.684cm">
          <draw:text-box>
            <text:p text:style-name="P2"><text:span text:style-name="T2">1.</text:span></text:p>
          </draw:text-box>
        </draw:frame>
        <draw:frame draw:style-name="gr5" draw:text-style-name="P5" draw:layer="layout" svg:width="0.285cm" svg:height="0.323cm" svg:x="1.545cm" svg:y="20.644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5.42cm" svg:height="0.013cm" svg:x="3.293cm" svg:y="20.928cm" svg:viewBox="0 0 5421 14" draw:points="0,0 5421,0 5421,14 0,14">
          <text:p/>
        </draw:polygon>
        <draw:frame draw:style-name="gr53" draw:text-style-name="P5" draw:layer="layout" svg:width="1.718cm" svg:height="0.289cm" svg:x="1.613cm" svg:y="20.684cm">
          <draw:text-box>
            <text:p text:style-name="P2"><text:span text:style-name="T2">Förberedelser:</text:span></text:p>
          </draw:text-box>
        </draw:frame>
        <draw:frame draw:style-name="gr5" draw:text-style-name="P5" draw:layer="layout" svg:width="0.285cm" svg:height="0.323cm" svg:x="3.294cm" svg:y="20.648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3cm" svg:y="20.648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1.092cm">
          <draw:text-box>
            <text:p text:style-name="P2"><text:span text:style-name="T2">2.</text:span></text:p>
          </draw:text-box>
        </draw:frame>
        <draw:frame draw:style-name="gr5" draw:text-style-name="P5" draw:layer="layout" svg:width="0.285cm" svg:height="0.323cm" svg:x="1.486cm" svg:y="21.051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3.155cm" svg:height="0.013cm" svg:x="5.558cm" svg:y="21.335cm" svg:viewBox="0 0 3156 14" draw:points="0,0 3156,0 3156,14 0,14">
          <text:p/>
        </draw:polygon>
        <draw:frame draw:style-name="gr54" draw:text-style-name="P5" draw:layer="layout" svg:width="4.093cm" svg:height="0.289cm" svg:x="1.549cm" svg:y="21.092cm">
          <draw:text-box>
            <text:p text:style-name="P2"><text:span text:style-name="T2">Laddningsförfarande och hölstring:</text:span></text:p>
          </draw:text-box>
        </draw:frame>
        <draw:frame draw:style-name="gr5" draw:text-style-name="P5" draw:layer="layout" svg:width="0.285cm" svg:height="0.323cm" svg:x="5.559cm" svg:y="21.055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3cm" svg:y="21.055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1.491cm">
          <draw:text-box>
            <text:p text:style-name="P2"><text:span text:style-name="T2">3.</text:span></text:p>
          </draw:text-box>
        </draw:frame>
        <draw:frame draw:style-name="gr5" draw:text-style-name="P5" draw:layer="layout" svg:width="0.285cm" svg:height="0.323cm" svg:x="1.486cm" svg:y="21.449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6.554cm" svg:height="0.015cm" svg:x="2.159cm" svg:y="21.731cm" svg:viewBox="0 0 6555 16" draw:points="0,0 6555,0 6555,16 0,16">
          <text:p/>
        </draw:polygon>
        <draw:frame draw:style-name="gr55" draw:text-style-name="P5" draw:layer="layout" svg:width="0.63cm" svg:height="0.289cm" svg:x="1.549cm" svg:y="21.491cm">
          <draw:text-box>
            <text:p text:style-name="P2"><text:span text:style-name="T2">Drag:</text:span></text:p>
          </draw:text-box>
        </draw:frame>
        <draw:frame draw:style-name="gr5" draw:text-style-name="P5" draw:layer="layout" svg:width="0.285cm" svg:height="0.323cm" svg:x="2.159cm" svg:y="21.453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3cm" svg:y="21.453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1.88cm">
          <draw:text-box>
            <text:p text:style-name="P2"><text:span text:style-name="T2">4.</text:span></text:p>
          </draw:text-box>
        </draw:frame>
        <draw:frame draw:style-name="gr5" draw:text-style-name="P5" draw:layer="layout" svg:width="0.285cm" svg:height="0.323cm" svg:x="1.486cm" svg:y="21.838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5.227cm" svg:height="0.014cm" svg:x="3.486cm" svg:y="22.121cm" svg:viewBox="0 0 5228 15" draw:points="0,0 5228,0 5228,15 0,15">
          <text:p/>
        </draw:polygon>
        <draw:frame draw:style-name="gr56" draw:text-style-name="P5" draw:layer="layout" svg:width="2.006cm" svg:height="0.289cm" svg:x="1.549cm" svg:y="21.88cm">
          <draw:text-box>
            <text:p text:style-name="P2"><text:span text:style-name="T2">Ställningsväxling:</text:span></text:p>
          </draw:text-box>
        </draw:frame>
        <draw:frame draw:style-name="gr5" draw:text-style-name="P5" draw:layer="layout" svg:width="0.285cm" svg:height="0.323cm" svg:x="3.488cm" svg:y="21.842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1.842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2.282cm">
          <draw:text-box>
            <text:p text:style-name="P2"><text:span text:style-name="T2">5.</text:span></text:p>
          </draw:text-box>
        </draw:frame>
        <draw:frame draw:style-name="gr5" draw:text-style-name="P5" draw:layer="layout" svg:width="0.285cm" svg:height="0.323cm" svg:x="1.486cm" svg:y="22.241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5.518cm" svg:height="0.015cm" svg:x="3.195cm" svg:y="22.522cm" svg:viewBox="0 0 5519 16" draw:points="0,0 5519,0 5519,16 0,16">
          <text:p/>
        </draw:polygon>
        <draw:frame draw:style-name="gr57" draw:text-style-name="P5" draw:layer="layout" svg:width="1.7cm" svg:height="0.289cm" svg:x="1.549cm" svg:y="22.282cm">
          <draw:text-box>
            <text:p text:style-name="P2"><text:span text:style-name="T2">Magasinsbyte:</text:span></text:p>
          </draw:text-box>
        </draw:frame>
        <draw:frame draw:style-name="gr5" draw:text-style-name="P5" draw:layer="layout" svg:width="0.285cm" svg:height="0.323cm" svg:x="3.196cm" svg:y="22.245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2.245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2.671cm">
          <draw:text-box>
            <text:p text:style-name="P2"><text:span text:style-name="T2">6.</text:span></text:p>
          </draw:text-box>
        </draw:frame>
        <draw:frame draw:style-name="gr5" draw:text-style-name="P5" draw:layer="layout" svg:width="0.285cm" svg:height="0.323cm" svg:x="1.486cm" svg:y="22.63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5.553cm" svg:height="0.013cm" svg:x="3.16cm" svg:y="22.914cm" svg:viewBox="0 0 5554 14" draw:points="0,0 5554,0 5554,14 0,14">
          <text:p/>
        </draw:polygon>
        <draw:frame draw:style-name="gr58" draw:text-style-name="P5" draw:layer="layout" svg:width="1.667cm" svg:height="0.289cm" svg:x="1.549cm" svg:y="22.671cm">
          <draw:text-box>
            <text:p text:style-name="P2"><text:span text:style-name="T2">Framryckning:</text:span></text:p>
          </draw:text-box>
        </draw:frame>
        <draw:frame draw:style-name="gr5" draw:text-style-name="P5" draw:layer="layout" svg:width="0.285cm" svg:height="0.323cm" svg:x="3.162cm" svg:y="22.634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2.634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3.073cm">
          <draw:text-box>
            <text:p text:style-name="P2"><text:span text:style-name="T2">7.</text:span></text:p>
          </draw:text-box>
        </draw:frame>
        <draw:frame draw:style-name="gr5" draw:text-style-name="P5" draw:layer="layout" svg:width="0.285cm" svg:height="0.323cm" svg:x="1.486cm" svg:y="23.032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3.227cm" svg:height="0.014cm" svg:x="5.486cm" svg:y="23.316cm" svg:viewBox="0 0 3228 15" draw:points="0,0 3228,0 3228,15 0,15">
          <text:p/>
        </draw:polygon>
        <draw:frame draw:style-name="gr59" draw:text-style-name="P5" draw:layer="layout" svg:width="4.07cm" svg:height="0.289cm" svg:x="1.549cm" svg:y="23.073cm">
          <draw:text-box>
            <text:p text:style-name="P2"><text:span text:style-name="T2">Finger och mynningsmedvetenhet:</text:span></text:p>
          </draw:text-box>
        </draw:frame>
        <draw:frame draw:style-name="gr5" draw:text-style-name="P5" draw:layer="layout" svg:width="0.285cm" svg:height="0.323cm" svg:x="5.486cm" svg:y="23.036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3.036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329cm" svg:y="23.471cm">
          <draw:text-box>
            <text:p text:style-name="P2"><text:span text:style-name="T2">8.</text:span></text:p>
          </draw:text-box>
        </draw:frame>
        <draw:frame draw:style-name="gr5" draw:text-style-name="P5" draw:layer="layout" svg:width="0.285cm" svg:height="0.323cm" svg:x="1.545cm" svg:y="23.43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4.02cm" svg:height="0.015cm" svg:x="4.693cm" svg:y="23.714cm" svg:viewBox="0 0 4021 16" draw:points="0,0 4021,0 4021,16 0,16">
          <text:p/>
        </draw:polygon>
        <draw:frame draw:style-name="gr60" draw:text-style-name="P5" draw:layer="layout" svg:width="3.182cm" svg:height="0.289cm" svg:x="1.613cm" svg:y="23.471cm">
          <draw:text-box>
            <text:p text:style-name="P2"><text:span text:style-name="T2">Ev. åtgärder vid eldavbrott:</text:span></text:p>
          </draw:text-box>
        </draw:frame>
        <draw:frame draw:style-name="gr5" draw:text-style-name="P5" draw:layer="layout" svg:width="0.285cm" svg:height="0.323cm" svg:x="4.695cm" svg:y="23.434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3.434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.27cm" svg:y="23.861cm">
          <draw:text-box>
            <text:p text:style-name="P2"><text:span text:style-name="T2">9.</text:span></text:p>
          </draw:text-box>
        </draw:frame>
        <draw:frame draw:style-name="gr5" draw:text-style-name="P5" draw:layer="layout" svg:width="0.285cm" svg:height="0.323cm" svg:x="1.486cm" svg:y="23.82cm">
          <draw:text-box>
            <text:p text:style-name="P2"><text:span text:style-name="T8"><text:s/></text:span></text:p>
          </draw:text-box>
        </draw:frame>
        <draw:polygon draw:style-name="gr3" draw:text-style-name="P4" draw:layer="layout" svg:width="5.522cm" svg:height="0.013cm" svg:x="3.191cm" svg:y="24.103cm" svg:viewBox="0 0 5523 14" draw:points="0,0 5523,0 5523,14 0,14">
          <text:p/>
        </draw:polygon>
        <draw:frame draw:style-name="gr61" draw:text-style-name="P5" draw:layer="layout" svg:width="1.68cm" svg:height="0.289cm" svg:x="1.549cm" svg:y="23.861cm">
          <draw:text-box>
            <text:p text:style-name="P2"><text:span text:style-name="T2">Övergripande:</text:span></text:p>
          </draw:text-box>
        </draw:frame>
        <draw:frame draw:style-name="gr5" draw:text-style-name="P5" draw:layer="layout" svg:width="0.285cm" svg:height="0.323cm" svg:x="3.192cm" svg:y="23.824cm">
          <draw:text-box>
            <text:p text:style-name="P2"><text:span text:style-name="T3"><text:s text:c="2"/></text:span></text:p>
          </draw:text-box>
        </draw:frame>
        <draw:frame draw:style-name="gr5" draw:text-style-name="P5" draw:layer="layout" svg:width="0.285cm" svg:height="0.323cm" svg:x="8.712cm" svg:y="23.824cm">
          <draw:text-box>
            <text:p text:style-name="P2"><text:span text:style-name="T3"><text:s/></text:span></text:p>
          </draw:text-box>
        </draw:frame>
        <draw:frame draw:style-name="gr62" draw:text-style-name="P11" draw:layer="layout" svg:width="0.348cm" svg:height="0.386cm" svg:x="11.206cm" svg:y="19.024cm">
          <draw:text-box>
            <text:p text:style-name="P2"><text:span text:style-name="T9"><text:s/></text:span></text:p>
          </draw:text-box>
        </draw:frame>
        <draw:frame draw:style-name="gr62" draw:text-style-name="P11" draw:layer="layout" svg:width="0.348cm" svg:height="0.386cm" svg:x="11.206cm" svg:y="19.431cm">
          <draw:text-box>
            <text:p text:style-name="P2"><text:span text:style-name="T9"><text:s/></text:span></text:p>
          </draw:text-box>
        </draw:frame>
        <draw:frame draw:style-name="gr62" draw:text-style-name="P11" draw:layer="layout" svg:width="0.348cm" svg:height="0.386cm" svg:x="11.206cm" svg:y="19.837cm">
          <draw:text-box>
            <text:p text:style-name="P2"><text:span text:style-name="T9"><text:s/></text:span></text:p>
          </draw:text-box>
        </draw:frame>
        <draw:polygon draw:style-name="gr3" draw:text-style-name="P4" draw:layer="layout" svg:width="0.035cm" svg:height="0.038cm" svg:x="17.199cm" svg:y="20.431cm" svg:viewBox="0 0 36 39" draw:points="0,0 36,0 36,39 0,39">
          <text:p/>
        </draw:polygon>
        <draw:polygon draw:style-name="gr3" draw:text-style-name="P4" draw:layer="layout" svg:width="0.035cm" svg:height="0.038cm" svg:x="17.199cm" svg:y="20.431cm" svg:viewBox="0 0 36 39" draw:points="0,0 36,0 36,39 0,39">
          <text:p/>
        </draw:polygon>
        <draw:polygon draw:style-name="gr3" draw:text-style-name="P4" draw:layer="layout" svg:width="1.975cm" svg:height="0.038cm" svg:x="17.231cm" svg:y="20.431cm" svg:viewBox="0 0 1976 39" draw:points="0,0 1976,0 1976,39 0,39">
          <text:p/>
        </draw:polygon>
        <draw:polygon draw:style-name="gr3" draw:text-style-name="P4" draw:layer="layout" svg:width="0.035cm" svg:height="0.038cm" svg:x="19.205cm" svg:y="20.431cm" svg:viewBox="0 0 36 39" draw:points="0,0 36,0 36,39 0,39">
          <text:p/>
        </draw:polygon>
        <draw:polygon draw:style-name="gr3" draw:text-style-name="P4" draw:layer="layout" svg:width="1.322cm" svg:height="0.038cm" svg:x="19.24cm" svg:y="20.431cm" svg:viewBox="0 0 1323 39" draw:points="0,0 1323,0 1323,39 0,39">
          <text:p/>
        </draw:polygon>
        <draw:polygon draw:style-name="gr3" draw:text-style-name="P4" draw:layer="layout" svg:width="0.02cm" svg:height="0.038cm" svg:x="20.559cm" svg:y="20.431cm" svg:viewBox="0 0 21 39" draw:points="0,0 21,0 21,39 0,39">
          <text:p/>
        </draw:polygon>
        <draw:polygon draw:style-name="gr3" draw:text-style-name="P4" draw:layer="layout" svg:width="0.035cm" svg:height="0.684cm" svg:x="17.199cm" svg:y="20.466cm" svg:viewBox="0 0 36 685" draw:points="0,0 36,0 36,685 0,685">
          <text:p/>
        </draw:polygon>
        <draw:polygon draw:style-name="gr3" draw:text-style-name="P4" draw:layer="layout" svg:width="0.018cm" svg:height="0.684cm" svg:x="19.205cm" svg:y="20.466cm" svg:viewBox="0 0 19 685" draw:points="0,0 19,0 19,685 0,685">
          <text:p/>
        </draw:polygon>
        <draw:polygon draw:style-name="gr3" draw:text-style-name="P4" draw:layer="layout" svg:width="0.02cm" svg:height="0.684cm" svg:x="20.559cm" svg:y="20.466cm" svg:viewBox="0 0 21 685" draw:points="0,0 21,0 21,685 0,685">
          <text:p/>
        </draw:polygon>
        <draw:frame draw:style-name="gr63" draw:text-style-name="P5" draw:layer="layout" svg:width="0.808cm" svg:height="0.289cm" svg:x="17.433cm" svg:y="20.529cm">
          <draw:text-box>
            <text:p text:style-name="P2"><text:span text:style-name="T4">Poäng </text:span></text:p>
          </draw:text-box>
        </draw:frame>
        <draw:polygon draw:style-name="gr3" draw:text-style-name="P4" draw:layer="layout" svg:width="0.035cm" svg:height="0.018cm" svg:x="17.199cm" svg:y="21.147cm" svg:viewBox="0 0 36 19" draw:points="0,0 36,0 36,19 0,19">
          <text:p/>
        </draw:polygon>
        <draw:polygon draw:style-name="gr3" draw:text-style-name="P4" draw:layer="layout" svg:width="1.975cm" svg:height="0.018cm" svg:x="17.231cm" svg:y="21.147cm" svg:viewBox="0 0 1976 19" draw:points="0,0 1976,0 1976,19 0,19">
          <text:p/>
        </draw:polygon>
        <draw:polygon draw:style-name="gr3" draw:text-style-name="P4" draw:layer="layout" svg:width="0.018cm" svg:height="0.018cm" svg:x="19.205cm" svg:y="21.147cm" svg:viewBox="0 0 19 19" draw:points="0,0 19,0 19,19 0,19">
          <text:p/>
        </draw:polygon>
        <draw:polygon draw:style-name="gr3" draw:text-style-name="P4" draw:layer="layout" svg:width="1.339cm" svg:height="0.018cm" svg:x="19.223cm" svg:y="21.147cm" svg:viewBox="0 0 1340 19" draw:points="0,0 1340,0 1340,19 0,19">
          <text:p/>
        </draw:polygon>
        <draw:polygon draw:style-name="gr3" draw:text-style-name="P4" draw:layer="layout" svg:width="0.02cm" svg:height="0.018cm" svg:x="20.559cm" svg:y="21.147cm" svg:viewBox="0 0 21 19" draw:points="0,0 21,0 21,19 0,19">
          <text:p/>
        </draw:polygon>
        <draw:polygon draw:style-name="gr3" draw:text-style-name="P4" draw:layer="layout" svg:width="0.035cm" svg:height="0.399cm" svg:x="17.199cm" svg:y="21.164cm" svg:viewBox="0 0 36 400" draw:points="0,0 36,0 36,400 0,400">
          <text:p/>
        </draw:polygon>
        <draw:polygon draw:style-name="gr3" draw:text-style-name="P4" draw:layer="layout" svg:width="0.018cm" svg:height="0.399cm" svg:x="19.205cm" svg:y="21.164cm" svg:viewBox="0 0 19 400" draw:points="0,0 19,0 19,400 0,400">
          <text:p/>
        </draw:polygon>
        <draw:polygon draw:style-name="gr3" draw:text-style-name="P4" draw:layer="layout" svg:width="0.02cm" svg:height="0.399cm" svg:x="20.559cm" svg:y="21.164cm" svg:viewBox="0 0 21 400" draw:points="0,0 21,0 21,400 0,400">
          <text:p/>
        </draw:polygon>
        <draw:frame draw:style-name="gr5" draw:text-style-name="P5" draw:layer="layout" svg:width="0.285cm" svg:height="0.323cm" svg:x="19.224cm" svg:y="20.475cm">
          <draw:text-box>
            <text:p text:style-name="P2"><text:span text:style-name="T3"><text:s/></text:span></text:p>
          </draw:text-box>
        </draw:frame>
        <draw:frame draw:style-name="gr64" draw:text-style-name="P5" draw:layer="layout" svg:width="1.065cm" svg:height="0.289cm" svg:x="17.433cm" svg:y="21.248cm">
          <draw:text-box>
            <text:p text:style-name="P2"><text:span text:style-name="T4">Total tid </text:span></text:p>
          </draw:text-box>
        </draw:frame>
        <draw:polygon draw:style-name="gr3" draw:text-style-name="P4" draw:layer="layout" svg:width="0.035cm" svg:height="0.017cm" svg:x="17.199cm" svg:y="21.563cm" svg:viewBox="0 0 36 18" draw:points="0,0 36,0 36,18 0,18">
          <text:p/>
        </draw:polygon>
        <draw:polygon draw:style-name="gr3" draw:text-style-name="P4" draw:layer="layout" svg:width="1.975cm" svg:height="0.017cm" svg:x="17.231cm" svg:y="21.563cm" svg:viewBox="0 0 1976 18" draw:points="0,0 1976,0 1976,18 0,18">
          <text:p/>
        </draw:polygon>
        <draw:polygon draw:style-name="gr3" draw:text-style-name="P4" draw:layer="layout" svg:width="0.018cm" svg:height="0.017cm" svg:x="19.205cm" svg:y="21.563cm" svg:viewBox="0 0 19 18" draw:points="0,0 19,0 19,18 0,18">
          <text:p/>
        </draw:polygon>
        <draw:polygon draw:style-name="gr3" draw:text-style-name="P4" draw:layer="layout" svg:width="1.339cm" svg:height="0.017cm" svg:x="19.223cm" svg:y="21.563cm" svg:viewBox="0 0 1340 18" draw:points="0,0 1340,0 1340,18 0,18">
          <text:p/>
        </draw:polygon>
        <draw:polygon draw:style-name="gr3" draw:text-style-name="P4" draw:layer="layout" svg:width="0.02cm" svg:height="0.017cm" svg:x="20.559cm" svg:y="21.563cm" svg:viewBox="0 0 21 18" draw:points="0,0 21,0 21,18 0,18">
          <text:p/>
        </draw:polygon>
        <draw:polygon draw:style-name="gr3" draw:text-style-name="P4" draw:layer="layout" svg:width="0.035cm" svg:height="0.407cm" svg:x="17.199cm" svg:y="21.58cm" svg:viewBox="0 0 36 408" draw:points="0,0 36,0 36,408 0,408">
          <text:p/>
        </draw:polygon>
        <draw:polygon draw:style-name="gr3" draw:text-style-name="P4" draw:layer="layout" svg:width="0.035cm" svg:height="0.038cm" svg:x="17.199cm" svg:y="21.984cm" svg:viewBox="0 0 36 39" draw:points="0,0 36,0 36,39 0,39">
          <text:p/>
        </draw:polygon>
        <draw:polygon draw:style-name="gr3" draw:text-style-name="P4" draw:layer="layout" svg:width="0.035cm" svg:height="0.038cm" svg:x="17.199cm" svg:y="21.984cm" svg:viewBox="0 0 36 39" draw:points="0,0 36,0 36,39 0,39">
          <text:p/>
        </draw:polygon>
        <draw:polygon draw:style-name="gr3" draw:text-style-name="P4" draw:layer="layout" svg:width="1.975cm" svg:height="0.038cm" svg:x="17.231cm" svg:y="21.984cm" svg:viewBox="0 0 1976 39" draw:points="0,0 1976,0 1976,39 0,39">
          <text:p/>
        </draw:polygon>
        <draw:polygon draw:style-name="gr3" draw:text-style-name="P4" draw:layer="layout" svg:width="0.018cm" svg:height="0.407cm" svg:x="19.205cm" svg:y="21.58cm" svg:viewBox="0 0 19 408" draw:points="0,0 19,0 19,408 0,408">
          <text:p/>
        </draw:polygon>
        <draw:polygon draw:style-name="gr3" draw:text-style-name="P4" draw:layer="layout" svg:width="0.035cm" svg:height="0.038cm" svg:x="19.205cm" svg:y="21.984cm" svg:viewBox="0 0 36 39" draw:points="0,0 36,0 36,39 0,39">
          <text:p/>
        </draw:polygon>
        <draw:polygon draw:style-name="gr3" draw:text-style-name="P4" draw:layer="layout" svg:width="1.322cm" svg:height="0.038cm" svg:x="19.24cm" svg:y="21.984cm" svg:viewBox="0 0 1323 39" draw:points="0,0 1323,0 1323,39 0,39">
          <text:p/>
        </draw:polygon>
        <draw:polygon draw:style-name="gr3" draw:text-style-name="P4" draw:layer="layout" svg:width="0.02cm" svg:height="0.407cm" svg:x="20.559cm" svg:y="21.58cm" svg:viewBox="0 0 21 408" draw:points="0,0 21,0 21,408 0,408">
          <text:p/>
        </draw:polygon>
        <draw:polygon draw:style-name="gr3" draw:text-style-name="P4" draw:layer="layout" svg:width="0.02cm" svg:height="0.038cm" svg:x="20.559cm" svg:y="21.984cm" svg:viewBox="0 0 21 39" draw:points="0,0 21,0 21,39 0,39">
          <text:p/>
        </draw:polygon>
        <draw:frame draw:style-name="gr5" draw:text-style-name="P5" draw:layer="layout" svg:width="0.285cm" svg:height="0.323cm" svg:x="19.224cm" svg:y="21.173cm">
          <draw:text-box>
            <text:p text:style-name="P2"><text:span text:style-name="T3"><text:s/></text:span></text:p>
          </draw:text-box>
        </draw:frame>
        <draw:frame draw:style-name="gr65" draw:text-style-name="P5" draw:layer="layout" svg:width="1.337cm" svg:height="0.289cm" svg:x="17.433cm" svg:y="21.672cm">
          <draw:text-box>
            <text:p text:style-name="P2"><text:span text:style-name="T4">Poängkvot </text:span></text:p>
          </draw:text-box>
        </draw:frame>
        <draw:frame draw:style-name="gr5" draw:text-style-name="P5" draw:layer="layout" svg:width="0.285cm" svg:height="0.323cm" svg:x="19.224cm" svg:y="21.584cm">
          <draw:text-box>
            <text:p text:style-name="P2"><text:span text:style-name="T3"><text:s/></text:span></text:p>
          </draw:text-box>
        </draw:frame>
        <draw:frame draw:style-name="gr66" draw:text-style-name="P12" draw:layer="layout" svg:width="4.324cm" svg:height="0.289cm" svg:x="11.608cm" svg:y="20.98cm">
          <draw:text-box>
            <text:p text:style-name="P2"><text:span text:style-name="T2">Skytten är godkänd vid en poängkvot</text:span></text:p>
          </draw:text-box>
        </draw:frame>
        <draw:frame draw:style-name="gr67" draw:text-style-name="P12" draw:layer="layout" svg:width="5.183cm" svg:height="0.289cm" svg:x="11.608cm" svg:y="21.378cm">
          <draw:text-box>
            <text:p text:style-name="P2"><text:span text:style-name="T2">överstigande </text:span><text:span text:style-name="T4">1.3 </text:span><text:span text:style-name="T2">och säker vapenhantering. </text:span></text:p>
          </draw:text-box>
        </draw:frame>
        <draw:frame draw:style-name="gr68" draw:text-style-name="P12" draw:layer="layout" svg:width="0.366cm" svg:height="0.289cm" svg:x="1.27cm" svg:y="24.232cm">
          <draw:text-box>
            <text:p text:style-name="P2"><text:span text:style-name="T2">10.</text:span></text:p>
          </draw:text-box>
        </draw:frame>
        <draw:frame draw:style-name="gr5" draw:text-style-name="P5" draw:layer="layout" svg:width="0.285cm" svg:height="0.323cm" svg:x="1.626cm" svg:y="24.527cm">
          <draw:text-box>
            <text:p text:style-name="P2"><text:span text:style-name="T8"><text:s/></text:span></text:p>
          </draw:text-box>
        </draw:frame>
        <draw:frame draw:style-name="gr69" draw:text-style-name="P12" draw:layer="layout" svg:width="6.069cm" svg:height="0.289cm" svg:x="1.693cm" svg:y="24.232cm">
          <draw:text-box>
            <text:p text:style-name="P2"><text:span text:style-name="T2">Patron ur och tömning av ammunition och magasin.</text:span></text:p>
          </draw:text-box>
        </draw:frame>
        <draw:frame draw:style-name="gr70" draw:text-style-name="P13" draw:layer="layout" svg:width="0.391cm" svg:height="0.395cm" svg:x="7.641cm" svg:y="24.489cm">
          <draw:text-box>
            <text:p text:style-name="P2"><text:span text:style-name="T10"><text:s/></text:span></text:p>
          </draw:text-box>
        </draw:frame>
        <draw:frame draw:style-name="gr71" draw:text-style-name="P5" draw:layer="layout" svg:width="5.117cm" svg:height="0.289cm" svg:x="1.27cm" svg:y="24.854cm">
          <draw:text-box>
            <text:p text:style-name="P2"><text:span text:style-name="T2">Skytten är underkänd på grund av följande: </text:span></text:p>
          </draw:text-box>
        </draw:frame>
        <draw:frame draw:style-name="gr8" draw:text-style-name="P12" draw:layer="layout" svg:width="0.285cm" svg:height="0.289cm" svg:x="13.143cm" svg:y="22.712cm">
          <draw:text-box>
            <text:p text:style-name="P2"><text:span text:style-name="T2">G </text:span></text:p>
          </draw:text-box>
        </draw:frame>
        <draw:frame draw:style-name="gr8" draw:text-style-name="P5" draw:layer="layout" svg:width="0.285cm" svg:height="0.289cm" svg:x="13.168cm" svg:y="23.055cm">
          <draw:text-box>
            <text:p text:style-name="P2"><text:span text:style-name="T2"><text:s/></text:span></text:p>
          </draw:text-box>
        </draw:frame>
        <draw:frame draw:style-name="gr8" draw:text-style-name="P5" draw:layer="layout" svg:width="0.285cm" svg:height="0.289cm" svg:x="13.168cm" svg:y="23.398cm">
          <draw:text-box>
            <text:p text:style-name="P2"><text:span text:style-name="T2"><text:s/></text:span></text:p>
          </draw:text-box>
        </draw:frame>
        <draw:frame draw:style-name="gr72" draw:text-style-name="P5" draw:layer="layout" svg:width="0.629cm" svg:height="0.289cm" svg:x="11.626cm" svg:y="24.917cm">
          <draw:text-box>
            <text:p text:style-name="P2"><text:span text:style-name="T2">Plats </text:span></text:p>
          </draw:text-box>
        </draw:frame>
        <draw:frame draw:style-name="gr8" draw:text-style-name="P12" draw:layer="layout" svg:width="0.285cm" svg:height="0.289cm" svg:x="14.199cm" svg:y="22.712cm">
          <draw:text-box>
            <text:p text:style-name="P2"><text:span text:style-name="T2">U </text:span></text:p>
          </draw:text-box>
        </draw:frame>
        <draw:frame draw:style-name="gr73" draw:text-style-name="P11" draw:layer="layout" svg:width="0.348cm" svg:height="0.352cm" svg:x="13.258cm" svg:y="23.098cm">
          <draw:text-box>
            <text:p text:style-name="P2"><text:span text:style-name="T11"><text:s/></text:span></text:p>
          </draw:text-box>
        </draw:frame>
        <draw:frame draw:style-name="gr73" draw:text-style-name="P11" draw:layer="layout" svg:width="0.348cm" svg:height="0.352cm" svg:x="15.858cm" svg:y="23.63cm">
          <draw:text-box>
            <text:p text:style-name="P2"><text:span text:style-name="T11"><text:s/></text:span></text:p>
          </draw:text-box>
        </draw:frame>
        <draw:frame draw:style-name="gr8" draw:text-style-name="P5" draw:layer="layout" svg:width="0.285cm" svg:height="0.289cm" svg:x="15.858cm" svg:y="24.552cm">
          <draw:text-box>
            <text:p text:style-name="P2"><text:span text:style-name="T2"><text:s/></text:span></text:p>
          </draw:text-box>
        </draw:frame>
        <draw:frame draw:style-name="gr74" draw:text-style-name="P14" draw:layer="layout" svg:width="0.034cm" svg:height="0.035cm" svg:x="18.068cm" svg:y="24.844cm">
          <draw:text-box>
            <text:p text:style-name="P2"><text:span text:style-name="T12"><text:s/></text:span></text:p>
          </draw:text-box>
        </draw:frame>
        <draw:frame draw:style-name="gr75" draw:text-style-name="P5" draw:layer="layout" svg:width="0.795cm" svg:height="0.289cm" svg:x="15.77cm" svg:y="24.929cm">
          <draw:text-box>
            <text:p text:style-name="P2"><text:span text:style-name="T2">Datum</text:span></text:p>
          </draw:text-box>
        </draw:frame>
        <draw:line draw:style-name="gr76" draw:text-style-name="P1" draw:layer="layout" svg:x1="15.733cm" svg:y1="24.84cm" svg:x2="18.031cm" svg:y2="24.84cm">
          <text:p/>
        </draw:line>
        <draw:line draw:style-name="gr76" draw:text-style-name="P1" draw:layer="layout" svg:x1="11.608cm" svg:y1="25.95cm" svg:x2="18.091cm" svg:y2="25.95cm">
          <text:p/>
        </draw:line>
        <draw:frame draw:style-name="gr77" draw:text-style-name="P1" draw:layer="layout" svg:width="2.433cm" svg:height="1.062cm" svg:x="8.952cm" svg:y="0.829cm">
          <draw:image xlink:href="Pictures/10000000000000F20000006A39AEF8A9.jpg" xlink:type="simple" xlink:show="embed" xlink:actuate="onLoad" draw:mime-type="image/jpeg">
            <text:p/>
          </draw:image>
        </draw:frame>
        <draw:line draw:style-name="gr76" draw:text-style-name="P1" draw:layer="layout" svg:x1="11.582cm" svg:y1="24.851cm" svg:x2="15.559cm" svg:y2="24.851cm">
          <text:p/>
        </draw:line>
        <draw:polygon draw:style-name="gr1" draw:text-style-name="P1" draw:layer="layout" svg:width="0.601cm" svg:height="0.601cm" svg:x="12.915cm" svg:y="23.034cm" svg:viewBox="0 0 602 602" draw:points="0,0 602,0 602,602 0,602">
          <text:p/>
        </draw:polygon>
        <draw:polygon draw:style-name="gr1" draw:text-style-name="P1" draw:layer="layout" svg:width="0.601cm" svg:height="0.601cm" svg:x="13.975cm" svg:y="23.028cm" svg:viewBox="0 0 602 602" draw:points="0,0 602,0 602,602 0,602">
          <text:p/>
        </draw:polygon>
        <draw:frame draw:style-name="gr78" draw:text-style-name="P15" draw:layer="layout" svg:width="0.475cm" svg:height="0.476cm" svg:x="1.058cm" svg:y="25.654cm">
          <draw:text-box>
            <text:p text:style-name="P2"><text:span text:style-name="T13"><text:s/></text:span></text:p>
          </draw:text-box>
        </draw:frame>
        <draw:frame draw:style-name="gr74" draw:text-style-name="P14" draw:layer="layout" svg:width="0.034cm" svg:height="0.035cm" svg:x="18.106cm" svg:y="25.94cm">
          <draw:text-box>
            <text:p text:style-name="P2"><text:span text:style-name="T12"><text:s/></text:span></text:p>
          </draw:text-box>
        </draw:frame>
        <draw:frame draw:style-name="gr79" draw:text-style-name="P5" draw:layer="layout" svg:width="5.449cm" svg:height="0.289cm" svg:x="11.673cm" svg:y="26.029cm">
          <draw:text-box>
            <text:p text:style-name="P2"><text:span text:style-name="T2">Instruktörens signatur och namnförtydligande </text:span></text:p>
          </draw:text-box>
        </draw:frame>
        <draw:frame draw:style-name="gr80" draw:text-style-name="P5" draw:layer="layout" svg:width="0.84cm" svg:height="0.289cm" svg:x="12.192cm" svg:y="2.563cm">
          <draw:text-box>
            <text:p text:style-name="P2"><text:span text:style-name="T4">Övn. 1 </text:span></text:p>
          </draw:text-box>
        </draw:frame>
        <draw:frame draw:style-name="gr81" draw:text-style-name="P5" draw:layer="layout" svg:width="0.353cm" svg:height="0.289cm" svg:x="13.83cm" svg:y="2.563cm">
          <draw:text-box>
            <text:p text:style-name="P2"><text:span text:style-name="T2">T1 </text:span></text:p>
          </draw:text-box>
        </draw:frame>
        <draw:frame draw:style-name="gr81" draw:text-style-name="P5" draw:layer="layout" svg:width="0.353cm" svg:height="0.289cm" svg:x="15.066cm" svg:y="2.563cm">
          <draw:text-box>
            <text:p text:style-name="P2"><text:span text:style-name="T2">T2 </text:span></text:p>
          </draw:text-box>
        </draw:frame>
        <draw:polygon draw:style-name="gr3" draw:text-style-name="P4" draw:layer="layout" svg:width="0.038cm" svg:height="0.035cm" svg:x="11.923cm" svg:y="2.349cm" svg:viewBox="0 0 39 36" draw:points="0,0 39,0 39,36 0,36">
          <text:p/>
        </draw:polygon>
        <draw:polygon draw:style-name="gr3" draw:text-style-name="P4" draw:layer="layout" svg:width="0.038cm" svg:height="0.035cm" svg:x="11.923cm" svg:y="2.349cm" svg:viewBox="0 0 39 36" draw:points="0,0 39,0 39,36 0,36">
          <text:p/>
        </draw:polygon>
        <draw:polygon draw:style-name="gr3" draw:text-style-name="P4" draw:layer="layout" svg:width="1.345cm" svg:height="0.035cm" svg:x="11.958cm" svg:y="2.349cm" svg:viewBox="0 0 1346 36" draw:points="0,0 1346,0 1346,36 0,36">
          <text:p/>
        </draw:polygon>
        <draw:polygon draw:style-name="gr3" draw:text-style-name="P4" draw:layer="layout" svg:width="0.034cm" svg:height="0.035cm" svg:x="13.3cm" svg:y="2.349cm" svg:viewBox="0 0 35 36" draw:points="0,0 35,0 35,36 0,36">
          <text:p/>
        </draw:polygon>
        <draw:polygon draw:style-name="gr3" draw:text-style-name="P4" draw:layer="layout" svg:width="1.205cm" svg:height="0.035cm" svg:x="13.335cm" svg:y="2.349cm" svg:viewBox="0 0 1206 36" draw:points="0,0 1206,0 1206,36 0,36">
          <text:p/>
        </draw:polygon>
        <draw:polygon draw:style-name="gr3" draw:text-style-name="P4" draw:layer="layout" svg:width="0.038cm" svg:height="0.035cm" svg:x="14.535cm" svg:y="2.349cm" svg:viewBox="0 0 39 36" draw:points="0,0 39,0 39,36 0,36">
          <text:p/>
        </draw:polygon>
        <draw:polygon draw:style-name="gr3" draw:text-style-name="P4" draw:layer="layout" svg:width="1.203cm" svg:height="0.035cm" svg:x="14.57cm" svg:y="2.349cm" svg:viewBox="0 0 1204 36" draw:points="0,0 1204,0 1204,36 0,36">
          <text:p/>
        </draw:polygon>
        <draw:polygon draw:style-name="gr3" draw:text-style-name="P4" draw:layer="layout" svg:width="0.035cm" svg:height="0.035cm" svg:x="15.773cm" svg:y="2.349cm" svg:viewBox="0 0 36 36" draw:points="0,0 36,0 36,36 0,36">
          <text:p/>
        </draw:polygon>
        <draw:polygon draw:style-name="gr3" draw:text-style-name="P4" draw:layer="layout" svg:width="1.467cm" svg:height="0.035cm" svg:x="15.805cm" svg:y="2.349cm" svg:viewBox="0 0 1468 36" draw:points="0,0 1468,0 1468,36 0,36">
          <text:p/>
        </draw:polygon>
        <draw:polygon draw:style-name="gr3" draw:text-style-name="P4" draw:layer="layout" svg:width="0.034cm" svg:height="0.035cm" svg:x="17.272cm" svg:y="2.349cm" svg:viewBox="0 0 35 36" draw:points="0,0 35,0 35,36 0,36">
          <text:p/>
        </draw:polygon>
        <draw:polygon draw:style-name="gr3" draw:text-style-name="P4" draw:layer="layout" svg:width="1.222cm" svg:height="0.035cm" svg:x="17.303cm" svg:y="2.349cm" svg:viewBox="0 0 1223 36" draw:points="0,0 1223,0 1223,36 0,36">
          <text:p/>
        </draw:polygon>
        <draw:polygon draw:style-name="gr3" draw:text-style-name="P4" draw:layer="layout" svg:width="0.035cm" svg:height="0.035cm" svg:x="18.524cm" svg:y="2.349cm" svg:viewBox="0 0 36 36" draw:points="0,0 36,0 36,36 0,36">
          <text:p/>
        </draw:polygon>
        <draw:polygon draw:style-name="gr3" draw:text-style-name="P4" draw:layer="layout" svg:width="1.47cm" svg:height="0.035cm" svg:x="18.558cm" svg:y="2.349cm" svg:viewBox="0 0 1471 36" draw:points="0,0 1471,0 1471,36 0,36">
          <text:p/>
        </draw:polygon>
        <draw:polygon draw:style-name="gr3" draw:text-style-name="P4" draw:layer="layout" svg:width="0.013cm" svg:height="0.035cm" svg:x="20.025cm" svg:y="2.349cm" svg:viewBox="0 0 14 36" draw:points="0,0 14,0 14,36 0,36">
          <text:p/>
        </draw:polygon>
        <draw:polygon draw:style-name="gr3" draw:text-style-name="P4" draw:layer="layout" svg:width="0.013cm" svg:height="0.035cm" svg:x="20.025cm" svg:y="2.349cm" svg:viewBox="0 0 14 36" draw:points="0,0 14,0 14,36 0,36">
          <text:p/>
        </draw:polygon>
        <draw:polygon draw:style-name="gr3" draw:text-style-name="P4" draw:layer="layout" svg:width="0.038cm" svg:height="0.555cm" svg:x="11.923cm" svg:y="2.383cm" svg:viewBox="0 0 39 556" draw:points="0,0 39,0 39,556 0,556">
          <text:p/>
        </draw:polygon>
        <draw:polygon draw:style-name="gr3" draw:text-style-name="P4" draw:layer="layout" svg:width="0.034cm" svg:height="0.555cm" svg:x="13.3cm" svg:y="2.383cm" svg:viewBox="0 0 35 556" draw:points="0,0 35,0 35,556 0,556">
          <text:p/>
        </draw:polygon>
        <draw:polygon draw:style-name="gr3" draw:text-style-name="P4" draw:layer="layout" svg:width="0.038cm" svg:height="0.555cm" svg:x="14.535cm" svg:y="2.383cm" svg:viewBox="0 0 39 556" draw:points="0,0 39,0 39,556 0,556">
          <text:p/>
        </draw:polygon>
        <draw:polygon draw:style-name="gr3" draw:text-style-name="P4" draw:layer="layout" svg:width="0.035cm" svg:height="0.555cm" svg:x="15.773cm" svg:y="2.383cm" svg:viewBox="0 0 36 556" draw:points="0,0 36,0 36,556 0,556">
          <text:p/>
        </draw:polygon>
        <draw:polygon draw:style-name="gr3" draw:text-style-name="P4" draw:layer="layout" svg:width="0.034cm" svg:height="0.555cm" svg:x="17.272cm" svg:y="2.383cm" svg:viewBox="0 0 35 556" draw:points="0,0 35,0 35,556 0,556">
          <text:p/>
        </draw:polygon>
        <draw:polygon draw:style-name="gr3" draw:text-style-name="P4" draw:layer="layout" svg:width="0.035cm" svg:height="0.555cm" svg:x="18.524cm" svg:y="2.383cm" svg:viewBox="0 0 36 556" draw:points="0,0 36,0 36,556 0,556">
          <text:p/>
        </draw:polygon>
        <draw:polygon draw:style-name="gr3" draw:text-style-name="P4" draw:layer="layout" svg:width="0.013cm" svg:height="0.555cm" svg:x="20.025cm" svg:y="2.383cm" svg:viewBox="0 0 14 556" draw:points="0,0 14,0 14,556 0,556">
          <text:p/>
        </draw:polygon>
        <draw:frame draw:style-name="gr82" draw:text-style-name="P5" draw:layer="layout" svg:width="0.614cm" svg:height="0.289cm" svg:x="16.04cm" svg:y="2.563cm">
          <draw:text-box>
            <text:p text:style-name="P2"><text:span text:style-name="T2">Träff </text:span></text:p>
          </draw:text-box>
        </draw:frame>
        <draw:frame draw:style-name="gr83" draw:text-style-name="P5" draw:layer="layout" svg:width="0.792cm" svg:height="0.289cm" svg:x="17.496cm" svg:y="2.563cm">
          <draw:text-box>
            <text:p text:style-name="P2"><text:span text:style-name="T2">Poäng </text:span></text:p>
          </draw:text-box>
        </draw:frame>
        <draw:frame draw:style-name="gr84" draw:text-style-name="P5" draw:layer="layout" svg:width="0.49cm" svg:height="0.289cm" svg:x="18.559cm" svg:y="2.563cm">
          <draw:text-box>
            <text:p text:style-name="P2"><text:span text:style-name="T2"><text:s/>Tid </text:span></text:p>
          </draw:text-box>
        </draw:frame>
        <draw:frame draw:style-name="gr85" draw:text-style-name="P5" draw:layer="layout" svg:width="0.501cm" svg:height="0.289cm" svg:x="12.45cm" svg:y="3.055cm">
          <draw:text-box>
            <text:p text:style-name="P2"><text:span text:style-name="T2">A/B </text:span></text:p>
          </draw:text-box>
        </draw:frame>
        <draw:frame draw:style-name="gr86" draw:text-style-name="P16" draw:layer="layout" svg:width="0.242cm" svg:height="0.268cm" svg:x="13.335cm" svg:y="2.984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4.571cm" svg:y="2.984cm">
          <draw:text-box>
            <text:p text:style-name="P2"><text:span text:style-name="T14"><text:s/></text:span></text:p>
          </draw:text-box>
        </draw:frame>
        <draw:polygon draw:style-name="gr3" draw:text-style-name="P4" draw:layer="layout" svg:width="0.038cm" svg:height="0.035cm" svg:x="11.923cm" svg:y="2.937cm" svg:viewBox="0 0 39 36" draw:points="0,0 39,0 39,36 0,36">
          <text:p/>
        </draw:polygon>
        <draw:polygon draw:style-name="gr3" draw:text-style-name="P4" draw:layer="layout" svg:width="1.345cm" svg:height="0.035cm" svg:x="11.958cm" svg:y="2.937cm" svg:viewBox="0 0 1346 36" draw:points="0,0 1346,0 1346,36 0,36">
          <text:p/>
        </draw:polygon>
        <draw:polygon draw:style-name="gr3" draw:text-style-name="P4" draw:layer="layout" svg:width="0.034cm" svg:height="0.035cm" svg:x="13.3cm" svg:y="2.937cm" svg:viewBox="0 0 35 36" draw:points="0,0 35,0 35,36 0,36">
          <text:p/>
        </draw:polygon>
        <draw:polygon draw:style-name="gr3" draw:text-style-name="P4" draw:layer="layout" svg:width="1.205cm" svg:height="0.035cm" svg:x="13.335cm" svg:y="2.937cm" svg:viewBox="0 0 1206 36" draw:points="0,0 1206,0 1206,36 0,36">
          <text:p/>
        </draw:polygon>
        <draw:polygon draw:style-name="gr3" draw:text-style-name="P4" draw:layer="layout" svg:width="0.038cm" svg:height="0.035cm" svg:x="14.535cm" svg:y="2.937cm" svg:viewBox="0 0 39 36" draw:points="0,0 39,0 39,36 0,36">
          <text:p/>
        </draw:polygon>
        <draw:polygon draw:style-name="gr3" draw:text-style-name="P4" draw:layer="layout" svg:width="1.203cm" svg:height="0.035cm" svg:x="14.57cm" svg:y="2.937cm" svg:viewBox="0 0 1204 36" draw:points="0,0 1204,0 1204,36 0,36">
          <text:p/>
        </draw:polygon>
        <draw:polygon draw:style-name="gr3" draw:text-style-name="P4" draw:layer="layout" svg:width="0.035cm" svg:height="0.035cm" svg:x="15.773cm" svg:y="2.937cm" svg:viewBox="0 0 36 36" draw:points="0,0 36,0 36,36 0,36">
          <text:p/>
        </draw:polygon>
        <draw:polygon draw:style-name="gr3" draw:text-style-name="P4" draw:layer="layout" svg:width="1.467cm" svg:height="0.035cm" svg:x="15.805cm" svg:y="2.937cm" svg:viewBox="0 0 1468 36" draw:points="0,0 1468,0 1468,36 0,36">
          <text:p/>
        </draw:polygon>
        <draw:polygon draw:style-name="gr3" draw:text-style-name="P4" draw:layer="layout" svg:width="0.034cm" svg:height="0.035cm" svg:x="17.272cm" svg:y="2.937cm" svg:viewBox="0 0 35 36" draw:points="0,0 35,0 35,36 0,36">
          <text:p/>
        </draw:polygon>
        <draw:polygon draw:style-name="gr3" draw:text-style-name="P4" draw:layer="layout" svg:width="1.222cm" svg:height="0.035cm" svg:x="17.303cm" svg:y="2.937cm" svg:viewBox="0 0 1223 36" draw:points="0,0 1223,0 1223,36 0,36">
          <text:p/>
        </draw:polygon>
        <draw:polygon draw:style-name="gr3" draw:text-style-name="P4" draw:layer="layout" svg:width="0.035cm" svg:height="0.035cm" svg:x="18.524cm" svg:y="2.937cm" svg:viewBox="0 0 36 36" draw:points="0,0 36,0 36,36 0,36">
          <text:p/>
        </draw:polygon>
        <draw:polygon draw:style-name="gr3" draw:text-style-name="P4" draw:layer="layout" svg:width="1.47cm" svg:height="0.035cm" svg:x="18.558cm" svg:y="2.937cm" svg:viewBox="0 0 1471 36" draw:points="0,0 1471,0 1471,36 0,36">
          <text:p/>
        </draw:polygon>
        <draw:polygon draw:style-name="gr3" draw:text-style-name="P4" draw:layer="layout" svg:width="0.013cm" svg:height="0.035cm" svg:x="20.025cm" svg:y="2.937cm" svg:viewBox="0 0 14 36" draw:points="0,0 14,0 14,36 0,36">
          <text:p/>
        </draw:polygon>
        <draw:polygon draw:style-name="gr3" draw:text-style-name="P4" draw:layer="layout" svg:width="0.038cm" svg:height="0.392cm" svg:x="11.923cm" svg:y="2.97cm" svg:viewBox="0 0 39 393" draw:points="0,0 39,0 39,393 0,393">
          <text:p/>
        </draw:polygon>
        <draw:polygon draw:style-name="gr3" draw:text-style-name="P4" draw:layer="layout" svg:width="0.034cm" svg:height="0.392cm" svg:x="13.3cm" svg:y="2.97cm" svg:viewBox="0 0 35 393" draw:points="0,0 35,0 35,393 0,393">
          <text:p/>
        </draw:polygon>
        <draw:polygon draw:style-name="gr3" draw:text-style-name="P4" draw:layer="layout" svg:width="0.038cm" svg:height="0.392cm" svg:x="14.535cm" svg:y="2.97cm" svg:viewBox="0 0 39 393" draw:points="0,0 39,0 39,393 0,393">
          <text:p/>
        </draw:polygon>
        <draw:polygon draw:style-name="gr3" draw:text-style-name="P4" draw:layer="layout" svg:width="0.035cm" svg:height="0.392cm" svg:x="15.773cm" svg:y="2.97cm" svg:viewBox="0 0 36 393" draw:points="0,0 36,0 36,393 0,393">
          <text:p/>
        </draw:polygon>
        <draw:polygon draw:style-name="gr3" draw:text-style-name="P4" draw:layer="layout" svg:width="0.034cm" svg:height="0.392cm" svg:x="17.272cm" svg:y="2.97cm" svg:viewBox="0 0 35 393" draw:points="0,0 35,0 35,393 0,393">
          <text:p/>
        </draw:polygon>
        <draw:polygon draw:style-name="gr3" draw:text-style-name="P4" draw:layer="layout" svg:width="0.035cm" svg:height="0.392cm" svg:x="18.524cm" svg:y="2.97cm" svg:viewBox="0 0 36 393" draw:points="0,0 36,0 36,393 0,393">
          <text:p/>
        </draw:polygon>
        <draw:polygon draw:style-name="gr3" draw:text-style-name="P4" draw:layer="layout" svg:width="0.013cm" svg:height="0.392cm" svg:x="20.025cm" svg:y="2.97cm" svg:viewBox="0 0 14 393" draw:points="0,0 14,0 14,393 0,393">
          <text:p/>
        </draw:polygon>
        <draw:frame draw:style-name="gr86" draw:text-style-name="P16" draw:layer="layout" svg:width="0.242cm" svg:height="0.268cm" svg:x="15.807cm" svg:y="2.984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7.306cm" svg:y="2.984cm">
          <draw:text-box>
            <text:p text:style-name="P2"><text:span text:style-name="T14"><text:s/></text:span></text:p>
          </draw:text-box>
        </draw:frame>
        <draw:frame draw:style-name="gr8" draw:text-style-name="P5" draw:layer="layout" svg:width="0.285cm" svg:height="0.289cm" svg:x="18.749cm" svg:y="3.055cm">
          <draw:text-box>
            <text:p text:style-name="P2"><text:span text:style-name="T2">1 </text:span></text:p>
          </draw:text-box>
        </draw:frame>
        <draw:frame draw:style-name="gr8" draw:text-style-name="P5" draw:layer="layout" svg:width="0.285cm" svg:height="0.289cm" svg:x="12.59cm" svg:y="3.462cm">
          <draw:text-box>
            <text:p text:style-name="P2"><text:span text:style-name="T2">C </text:span></text:p>
          </draw:text-box>
        </draw:frame>
        <draw:frame draw:style-name="gr5" draw:text-style-name="P5" draw:layer="layout" svg:width="0.285cm" svg:height="0.323cm" svg:x="13.335cm" svg:y="3.3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3.38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3.359cm" svg:viewBox="0 0 39 21" draw:points="0,0 39,0 39,21 0,21">
          <text:p/>
        </draw:polygon>
        <draw:polygon draw:style-name="gr3" draw:text-style-name="P4" draw:layer="layout" svg:width="1.345cm" svg:height="0.02cm" svg:x="11.958cm" svg:y="3.359cm" svg:viewBox="0 0 1346 21" draw:points="0,0 1346,0 1346,21 0,21">
          <text:p/>
        </draw:polygon>
        <draw:polygon draw:style-name="gr3" draw:text-style-name="P4" draw:layer="layout" svg:width="0.034cm" svg:height="0.02cm" svg:x="13.3cm" svg:y="3.359cm" svg:viewBox="0 0 35 21" draw:points="0,0 35,0 35,21 0,21">
          <text:p/>
        </draw:polygon>
        <draw:polygon draw:style-name="gr3" draw:text-style-name="P4" draw:layer="layout" svg:width="1.205cm" svg:height="0.02cm" svg:x="13.335cm" svg:y="3.359cm" svg:viewBox="0 0 1206 21" draw:points="0,0 1206,0 1206,21 0,21">
          <text:p/>
        </draw:polygon>
        <draw:polygon draw:style-name="gr3" draw:text-style-name="P4" draw:layer="layout" svg:width="0.038cm" svg:height="0.02cm" svg:x="14.535cm" svg:y="3.359cm" svg:viewBox="0 0 39 21" draw:points="0,0 39,0 39,21 0,21">
          <text:p/>
        </draw:polygon>
        <draw:polygon draw:style-name="gr3" draw:text-style-name="P4" draw:layer="layout" svg:width="1.203cm" svg:height="0.02cm" svg:x="14.57cm" svg:y="3.359cm" svg:viewBox="0 0 1204 21" draw:points="0,0 1204,0 1204,21 0,21">
          <text:p/>
        </draw:polygon>
        <draw:polygon draw:style-name="gr3" draw:text-style-name="P4" draw:layer="layout" svg:width="0.035cm" svg:height="0.02cm" svg:x="15.773cm" svg:y="3.359cm" svg:viewBox="0 0 36 21" draw:points="0,0 36,0 36,21 0,21">
          <text:p/>
        </draw:polygon>
        <draw:polygon draw:style-name="gr3" draw:text-style-name="P4" draw:layer="layout" svg:width="1.467cm" svg:height="0.02cm" svg:x="15.805cm" svg:y="3.359cm" svg:viewBox="0 0 1468 21" draw:points="0,0 1468,0 1468,21 0,21">
          <text:p/>
        </draw:polygon>
        <draw:polygon draw:style-name="gr3" draw:text-style-name="P4" draw:layer="layout" svg:width="0.034cm" svg:height="0.02cm" svg:x="17.272cm" svg:y="3.359cm" svg:viewBox="0 0 35 21" draw:points="0,0 35,0 35,21 0,21">
          <text:p/>
        </draw:polygon>
        <draw:polygon draw:style-name="gr3" draw:text-style-name="P4" draw:layer="layout" svg:width="1.222cm" svg:height="0.02cm" svg:x="17.303cm" svg:y="3.359cm" svg:viewBox="0 0 1223 21" draw:points="0,0 1223,0 1223,21 0,21">
          <text:p/>
        </draw:polygon>
        <draw:polygon draw:style-name="gr3" draw:text-style-name="P4" draw:layer="layout" svg:width="0.035cm" svg:height="0.02cm" svg:x="18.524cm" svg:y="3.359cm" svg:viewBox="0 0 36 21" draw:points="0,0 36,0 36,21 0,21">
          <text:p/>
        </draw:polygon>
        <draw:polygon draw:style-name="gr3" draw:text-style-name="P4" draw:layer="layout" svg:width="1.47cm" svg:height="0.02cm" svg:x="18.558cm" svg:y="3.359cm" svg:viewBox="0 0 1471 21" draw:points="0,0 1471,0 1471,21 0,21">
          <text:p/>
        </draw:polygon>
        <draw:polygon draw:style-name="gr3" draw:text-style-name="P4" draw:layer="layout" svg:width="0.013cm" svg:height="0.02cm" svg:x="20.025cm" svg:y="3.359cm" svg:viewBox="0 0 14 21" draw:points="0,0 14,0 14,21 0,21">
          <text:p/>
        </draw:polygon>
        <draw:polygon draw:style-name="gr3" draw:text-style-name="P4" draw:layer="layout" svg:width="0.038cm" svg:height="0.401cm" svg:x="11.923cm" svg:y="3.377cm" svg:viewBox="0 0 39 402" draw:points="0,0 39,0 39,402 0,402">
          <text:p/>
        </draw:polygon>
        <draw:polygon draw:style-name="gr3" draw:text-style-name="P4" draw:layer="layout" svg:width="0.034cm" svg:height="0.401cm" svg:x="13.3cm" svg:y="3.377cm" svg:viewBox="0 0 35 402" draw:points="0,0 35,0 35,402 0,402">
          <text:p/>
        </draw:polygon>
        <draw:polygon draw:style-name="gr3" draw:text-style-name="P4" draw:layer="layout" svg:width="0.038cm" svg:height="0.401cm" svg:x="14.535cm" svg:y="3.377cm" svg:viewBox="0 0 39 402" draw:points="0,0 39,0 39,402 0,402">
          <text:p/>
        </draw:polygon>
        <draw:polygon draw:style-name="gr3" draw:text-style-name="P4" draw:layer="layout" svg:width="0.035cm" svg:height="0.401cm" svg:x="15.773cm" svg:y="3.377cm" svg:viewBox="0 0 36 402" draw:points="0,0 36,0 36,402 0,402">
          <text:p/>
        </draw:polygon>
        <draw:polygon draw:style-name="gr3" draw:text-style-name="P4" draw:layer="layout" svg:width="0.034cm" svg:height="0.401cm" svg:x="17.272cm" svg:y="3.377cm" svg:viewBox="0 0 35 402" draw:points="0,0 35,0 35,402 0,402">
          <text:p/>
        </draw:polygon>
        <draw:polygon draw:style-name="gr3" draw:text-style-name="P4" draw:layer="layout" svg:width="0.035cm" svg:height="0.401cm" svg:x="18.524cm" svg:y="3.377cm" svg:viewBox="0 0 36 402" draw:points="0,0 36,0 36,402 0,402">
          <text:p/>
        </draw:polygon>
        <draw:polygon draw:style-name="gr3" draw:text-style-name="P4" draw:layer="layout" svg:width="0.013cm" svg:height="0.401cm" svg:x="20.025cm" svg:y="3.377cm" svg:viewBox="0 0 14 402" draw:points="0,0 14,0 14,402 0,402">
          <text:p/>
        </draw:polygon>
        <draw:frame draw:style-name="gr5" draw:text-style-name="P5" draw:layer="layout" svg:width="0.285cm" svg:height="0.323cm" svg:x="15.807cm" svg:y="3.3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3.386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8.749cm" svg:y="3.462cm">
          <draw:text-box>
            <text:p text:style-name="P2"><text:span text:style-name="T2">2 </text:span></text:p>
          </draw:text-box>
        </draw:frame>
        <draw:frame draw:style-name="gr8" draw:text-style-name="P5" draw:layer="layout" svg:width="0.285cm" svg:height="0.289cm" svg:x="12.581cm" svg:y="3.876cm">
          <draw:text-box>
            <text:p text:style-name="P2"><text:span text:style-name="T2">D </text:span></text:p>
          </draw:text-box>
        </draw:frame>
        <draw:frame draw:style-name="gr5" draw:text-style-name="P5" draw:layer="layout" svg:width="0.285cm" svg:height="0.323cm" svg:x="13.335cm" svg:y="3.80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3.80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3.775cm" svg:viewBox="0 0 39 19" draw:points="0,0 39,0 39,19 0,19">
          <text:p/>
        </draw:polygon>
        <draw:polygon draw:style-name="gr3" draw:text-style-name="P4" draw:layer="layout" svg:width="1.345cm" svg:height="0.018cm" svg:x="11.958cm" svg:y="3.775cm" svg:viewBox="0 0 1346 19" draw:points="0,0 1346,0 1346,19 0,19">
          <text:p/>
        </draw:polygon>
        <draw:polygon draw:style-name="gr3" draw:text-style-name="P4" draw:layer="layout" svg:width="0.034cm" svg:height="0.018cm" svg:x="13.3cm" svg:y="3.775cm" svg:viewBox="0 0 35 19" draw:points="0,0 35,0 35,19 0,19">
          <text:p/>
        </draw:polygon>
        <draw:polygon draw:style-name="gr3" draw:text-style-name="P4" draw:layer="layout" svg:width="1.205cm" svg:height="0.018cm" svg:x="13.335cm" svg:y="3.775cm" svg:viewBox="0 0 1206 19" draw:points="0,0 1206,0 1206,19 0,19">
          <text:p/>
        </draw:polygon>
        <draw:polygon draw:style-name="gr3" draw:text-style-name="P4" draw:layer="layout" svg:width="0.038cm" svg:height="0.018cm" svg:x="14.535cm" svg:y="3.775cm" svg:viewBox="0 0 39 19" draw:points="0,0 39,0 39,19 0,19">
          <text:p/>
        </draw:polygon>
        <draw:polygon draw:style-name="gr3" draw:text-style-name="P4" draw:layer="layout" svg:width="1.203cm" svg:height="0.018cm" svg:x="14.57cm" svg:y="3.775cm" svg:viewBox="0 0 1204 19" draw:points="0,0 1204,0 1204,19 0,19">
          <text:p/>
        </draw:polygon>
        <draw:polygon draw:style-name="gr3" draw:text-style-name="P4" draw:layer="layout" svg:width="0.035cm" svg:height="0.018cm" svg:x="15.773cm" svg:y="3.775cm" svg:viewBox="0 0 36 19" draw:points="0,0 36,0 36,19 0,19">
          <text:p/>
        </draw:polygon>
        <draw:polygon draw:style-name="gr3" draw:text-style-name="P4" draw:layer="layout" svg:width="1.467cm" svg:height="0.018cm" svg:x="15.805cm" svg:y="3.775cm" svg:viewBox="0 0 1468 19" draw:points="0,0 1468,0 1468,19 0,19">
          <text:p/>
        </draw:polygon>
        <draw:polygon draw:style-name="gr3" draw:text-style-name="P4" draw:layer="layout" svg:width="0.034cm" svg:height="0.018cm" svg:x="17.272cm" svg:y="3.775cm" svg:viewBox="0 0 35 19" draw:points="0,0 35,0 35,19 0,19">
          <text:p/>
        </draw:polygon>
        <draw:polygon draw:style-name="gr3" draw:text-style-name="P4" draw:layer="layout" svg:width="1.222cm" svg:height="0.018cm" svg:x="17.303cm" svg:y="3.775cm" svg:viewBox="0 0 1223 19" draw:points="0,0 1223,0 1223,19 0,19">
          <text:p/>
        </draw:polygon>
        <draw:polygon draw:style-name="gr3" draw:text-style-name="P4" draw:layer="layout" svg:width="0.035cm" svg:height="0.018cm" svg:x="18.524cm" svg:y="3.775cm" svg:viewBox="0 0 36 19" draw:points="0,0 36,0 36,19 0,19">
          <text:p/>
        </draw:polygon>
        <draw:polygon draw:style-name="gr3" draw:text-style-name="P4" draw:layer="layout" svg:width="1.47cm" svg:height="0.018cm" svg:x="18.558cm" svg:y="3.775cm" svg:viewBox="0 0 1471 19" draw:points="0,0 1471,0 1471,19 0,19">
          <text:p/>
        </draw:polygon>
        <draw:polygon draw:style-name="gr3" draw:text-style-name="P4" draw:layer="layout" svg:width="0.013cm" svg:height="0.018cm" svg:x="20.025cm" svg:y="3.775cm" svg:viewBox="0 0 14 19" draw:points="0,0 14,0 14,19 0,19">
          <text:p/>
        </draw:polygon>
        <draw:polygon draw:style-name="gr3" draw:text-style-name="P4" draw:layer="layout" svg:width="0.038cm" svg:height="0.399cm" svg:x="11.923cm" svg:y="3.792cm" svg:viewBox="0 0 39 400" draw:points="0,0 39,0 39,400 0,400">
          <text:p/>
        </draw:polygon>
        <draw:polygon draw:style-name="gr3" draw:text-style-name="P4" draw:layer="layout" svg:width="0.034cm" svg:height="0.399cm" svg:x="13.3cm" svg:y="3.792cm" svg:viewBox="0 0 35 400" draw:points="0,0 35,0 35,400 0,400">
          <text:p/>
        </draw:polygon>
        <draw:polygon draw:style-name="gr3" draw:text-style-name="P4" draw:layer="layout" svg:width="0.038cm" svg:height="0.399cm" svg:x="14.535cm" svg:y="3.792cm" svg:viewBox="0 0 39 400" draw:points="0,0 39,0 39,400 0,400">
          <text:p/>
        </draw:polygon>
        <draw:polygon draw:style-name="gr3" draw:text-style-name="P4" draw:layer="layout" svg:width="0.035cm" svg:height="0.399cm" svg:x="15.773cm" svg:y="3.792cm" svg:viewBox="0 0 36 400" draw:points="0,0 36,0 36,400 0,400">
          <text:p/>
        </draw:polygon>
        <draw:polygon draw:style-name="gr3" draw:text-style-name="P4" draw:layer="layout" svg:width="0.034cm" svg:height="0.399cm" svg:x="17.272cm" svg:y="3.792cm" svg:viewBox="0 0 35 400" draw:points="0,0 35,0 35,400 0,400">
          <text:p/>
        </draw:polygon>
        <draw:polygon draw:style-name="gr3" draw:text-style-name="P4" draw:layer="layout" svg:width="0.035cm" svg:height="0.399cm" svg:x="18.524cm" svg:y="3.792cm" svg:viewBox="0 0 36 400" draw:points="0,0 36,0 36,400 0,400">
          <text:p/>
        </draw:polygon>
        <draw:polygon draw:style-name="gr3" draw:text-style-name="P4" draw:layer="layout" svg:width="0.013cm" svg:height="0.399cm" svg:x="20.025cm" svg:y="3.792cm" svg:viewBox="0 0 14 400" draw:points="0,0 14,0 14,400 0,400">
          <text:p/>
        </draw:polygon>
        <draw:frame draw:style-name="gr5" draw:text-style-name="P5" draw:layer="layout" svg:width="0.285cm" svg:height="0.323cm" svg:x="15.807cm" svg:y="3.80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3.801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8.749cm" svg:y="3.876cm">
          <draw:text-box>
            <text:p text:style-name="P2"><text:span text:style-name="T2">3 </text:span></text:p>
          </draw:text-box>
        </draw:frame>
        <draw:frame draw:style-name="gr87" draw:text-style-name="P5" draw:layer="layout" svg:width="0.834cm" svg:height="0.289cm" svg:x="12.04cm" svg:y="4.291cm">
          <draw:text-box>
            <text:p text:style-name="P2"><text:span text:style-name="T2"><text:s text:c="8"/>M </text:span></text:p>
          </draw:text-box>
        </draw:frame>
        <draw:frame draw:style-name="gr5" draw:text-style-name="P5" draw:layer="layout" svg:width="0.285cm" svg:height="0.323cm" svg:x="13.335cm" svg:y="4.21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4.21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7cm" svg:x="11.923cm" svg:y="4.191cm" svg:viewBox="0 0 39 18" draw:points="0,0 39,0 39,18 0,18">
          <text:p/>
        </draw:polygon>
        <draw:polygon draw:style-name="gr3" draw:text-style-name="P4" draw:layer="layout" svg:width="1.345cm" svg:height="0.017cm" svg:x="11.958cm" svg:y="4.191cm" svg:viewBox="0 0 1346 18" draw:points="0,0 1346,0 1346,18 0,18">
          <text:p/>
        </draw:polygon>
        <draw:polygon draw:style-name="gr3" draw:text-style-name="P4" draw:layer="layout" svg:width="0.034cm" svg:height="0.017cm" svg:x="13.3cm" svg:y="4.191cm" svg:viewBox="0 0 35 18" draw:points="0,0 35,0 35,18 0,18">
          <text:p/>
        </draw:polygon>
        <draw:polygon draw:style-name="gr3" draw:text-style-name="P4" draw:layer="layout" svg:width="1.205cm" svg:height="0.017cm" svg:x="13.335cm" svg:y="4.191cm" svg:viewBox="0 0 1206 18" draw:points="0,0 1206,0 1206,18 0,18">
          <text:p/>
        </draw:polygon>
        <draw:polygon draw:style-name="gr3" draw:text-style-name="P4" draw:layer="layout" svg:width="0.038cm" svg:height="0.017cm" svg:x="14.535cm" svg:y="4.191cm" svg:viewBox="0 0 39 18" draw:points="0,0 39,0 39,18 0,18">
          <text:p/>
        </draw:polygon>
        <draw:polygon draw:style-name="gr3" draw:text-style-name="P4" draw:layer="layout" svg:width="1.203cm" svg:height="0.017cm" svg:x="14.57cm" svg:y="4.191cm" svg:viewBox="0 0 1204 18" draw:points="0,0 1204,0 1204,18 0,18">
          <text:p/>
        </draw:polygon>
        <draw:polygon draw:style-name="gr3" draw:text-style-name="P4" draw:layer="layout" svg:width="0.035cm" svg:height="0.017cm" svg:x="15.773cm" svg:y="4.191cm" svg:viewBox="0 0 36 18" draw:points="0,0 36,0 36,18 0,18">
          <text:p/>
        </draw:polygon>
        <draw:polygon draw:style-name="gr3" draw:text-style-name="P4" draw:layer="layout" svg:width="1.467cm" svg:height="0.017cm" svg:x="15.805cm" svg:y="4.191cm" svg:viewBox="0 0 1468 18" draw:points="0,0 1468,0 1468,18 0,18">
          <text:p/>
        </draw:polygon>
        <draw:polygon draw:style-name="gr3" draw:text-style-name="P4" draw:layer="layout" svg:width="0.034cm" svg:height="0.017cm" svg:x="17.272cm" svg:y="4.191cm" svg:viewBox="0 0 35 18" draw:points="0,0 35,0 35,18 0,18">
          <text:p/>
        </draw:polygon>
        <draw:polygon draw:style-name="gr3" draw:text-style-name="P4" draw:layer="layout" svg:width="1.222cm" svg:height="0.017cm" svg:x="17.303cm" svg:y="4.191cm" svg:viewBox="0 0 1223 18" draw:points="0,0 1223,0 1223,18 0,18">
          <text:p/>
        </draw:polygon>
        <draw:polygon draw:style-name="gr3" draw:text-style-name="P4" draw:layer="layout" svg:width="0.035cm" svg:height="0.017cm" svg:x="18.524cm" svg:y="4.191cm" svg:viewBox="0 0 36 18" draw:points="0,0 36,0 36,18 0,18">
          <text:p/>
        </draw:polygon>
        <draw:polygon draw:style-name="gr3" draw:text-style-name="P4" draw:layer="layout" svg:width="1.47cm" svg:height="0.017cm" svg:x="18.558cm" svg:y="4.191cm" svg:viewBox="0 0 1471 18" draw:points="0,0 1471,0 1471,18 0,18">
          <text:p/>
        </draw:polygon>
        <draw:polygon draw:style-name="gr3" draw:text-style-name="P4" draw:layer="layout" svg:width="0.013cm" svg:height="0.017cm" svg:x="20.025cm" svg:y="4.191cm" svg:viewBox="0 0 14 18" draw:points="0,0 14,0 14,18 0,18">
          <text:p/>
        </draw:polygon>
        <draw:polygon draw:style-name="gr3" draw:text-style-name="P4" draw:layer="layout" svg:width="0.038cm" svg:height="0.399cm" svg:x="11.923cm" svg:y="4.207cm" svg:viewBox="0 0 39 400" draw:points="0,0 39,0 39,400 0,400">
          <text:p/>
        </draw:polygon>
        <draw:polygon draw:style-name="gr3" draw:text-style-name="P4" draw:layer="layout" svg:width="0.034cm" svg:height="0.399cm" svg:x="13.3cm" svg:y="4.207cm" svg:viewBox="0 0 35 400" draw:points="0,0 35,0 35,400 0,400">
          <text:p/>
        </draw:polygon>
        <draw:polygon draw:style-name="gr3" draw:text-style-name="P4" draw:layer="layout" svg:width="0.038cm" svg:height="0.399cm" svg:x="14.535cm" svg:y="4.207cm" svg:viewBox="0 0 39 400" draw:points="0,0 39,0 39,400 0,400">
          <text:p/>
        </draw:polygon>
        <draw:polygon draw:style-name="gr3" draw:text-style-name="P4" draw:layer="layout" svg:width="0.035cm" svg:height="0.399cm" svg:x="15.773cm" svg:y="4.207cm" svg:viewBox="0 0 36 400" draw:points="0,0 36,0 36,400 0,400">
          <text:p/>
        </draw:polygon>
        <draw:polygon draw:style-name="gr3" draw:text-style-name="P4" draw:layer="layout" svg:width="0.034cm" svg:height="0.399cm" svg:x="17.272cm" svg:y="4.207cm" svg:viewBox="0 0 35 400" draw:points="0,0 35,0 35,400 0,400">
          <text:p/>
        </draw:polygon>
        <draw:polygon draw:style-name="gr3" draw:text-style-name="P4" draw:layer="layout" svg:width="0.035cm" svg:height="0.399cm" svg:x="18.524cm" svg:y="4.207cm" svg:viewBox="0 0 36 400" draw:points="0,0 36,0 36,400 0,400">
          <text:p/>
        </draw:polygon>
        <draw:polygon draw:style-name="gr3" draw:text-style-name="P4" draw:layer="layout" svg:width="0.013cm" svg:height="0.399cm" svg:x="20.025cm" svg:y="4.207cm" svg:viewBox="0 0 14 400" draw:points="0,0 14,0 14,400 0,400">
          <text:p/>
        </draw:polygon>
        <draw:frame draw:style-name="gr5" draw:text-style-name="P5" draw:layer="layout" svg:width="0.285cm" svg:height="0.323cm" svg:x="15.807cm" svg:y="4.21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4.21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4.215cm">
          <draw:text-box>
            <text:p text:style-name="P2"><text:span text:style-name="T3"><text:s/></text:span></text:p>
          </draw:text-box>
        </draw:frame>
        <draw:frame draw:style-name="gr88" draw:text-style-name="P5" draw:layer="layout" svg:width="0.702cm" svg:height="0.289cm" svg:x="12.349cm" svg:y="4.715cm">
          <draw:text-box>
            <text:p text:style-name="P2"><text:span text:style-name="T2">Straff </text:span></text:p>
          </draw:text-box>
        </draw:frame>
        <draw:frame draw:style-name="gr5" draw:text-style-name="P5" draw:layer="layout" svg:width="0.285cm" svg:height="0.323cm" svg:x="13.335cm" svg:y="4.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4.63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4.603cm" svg:viewBox="0 0 39 21" draw:points="0,0 39,0 39,21 0,21">
          <text:p/>
        </draw:polygon>
        <draw:polygon draw:style-name="gr3" draw:text-style-name="P4" draw:layer="layout" svg:width="1.345cm" svg:height="0.02cm" svg:x="11.958cm" svg:y="4.603cm" svg:viewBox="0 0 1346 21" draw:points="0,0 1346,0 1346,21 0,21">
          <text:p/>
        </draw:polygon>
        <draw:polygon draw:style-name="gr3" draw:text-style-name="P4" draw:layer="layout" svg:width="0.034cm" svg:height="0.02cm" svg:x="13.3cm" svg:y="4.603cm" svg:viewBox="0 0 35 21" draw:points="0,0 35,0 35,21 0,21">
          <text:p/>
        </draw:polygon>
        <draw:polygon draw:style-name="gr3" draw:text-style-name="P4" draw:layer="layout" svg:width="1.205cm" svg:height="0.02cm" svg:x="13.335cm" svg:y="4.603cm" svg:viewBox="0 0 1206 21" draw:points="0,0 1206,0 1206,21 0,21">
          <text:p/>
        </draw:polygon>
        <draw:polygon draw:style-name="gr3" draw:text-style-name="P4" draw:layer="layout" svg:width="0.038cm" svg:height="0.02cm" svg:x="14.535cm" svg:y="4.603cm" svg:viewBox="0 0 39 21" draw:points="0,0 39,0 39,21 0,21">
          <text:p/>
        </draw:polygon>
        <draw:polygon draw:style-name="gr3" draw:text-style-name="P4" draw:layer="layout" svg:width="1.203cm" svg:height="0.02cm" svg:x="14.57cm" svg:y="4.603cm" svg:viewBox="0 0 1204 21" draw:points="0,0 1204,0 1204,21 0,21">
          <text:p/>
        </draw:polygon>
        <draw:polygon draw:style-name="gr3" draw:text-style-name="P4" draw:layer="layout" svg:width="0.035cm" svg:height="0.02cm" svg:x="15.773cm" svg:y="4.603cm" svg:viewBox="0 0 36 21" draw:points="0,0 36,0 36,21 0,21">
          <text:p/>
        </draw:polygon>
        <draw:polygon draw:style-name="gr3" draw:text-style-name="P4" draw:layer="layout" svg:width="1.467cm" svg:height="0.02cm" svg:x="15.805cm" svg:y="4.603cm" svg:viewBox="0 0 1468 21" draw:points="0,0 1468,0 1468,21 0,21">
          <text:p/>
        </draw:polygon>
        <draw:polygon draw:style-name="gr3" draw:text-style-name="P4" draw:layer="layout" svg:width="0.034cm" svg:height="0.02cm" svg:x="17.272cm" svg:y="4.603cm" svg:viewBox="0 0 35 21" draw:points="0,0 35,0 35,21 0,21">
          <text:p/>
        </draw:polygon>
        <draw:polygon draw:style-name="gr3" draw:text-style-name="P4" draw:layer="layout" svg:width="1.222cm" svg:height="0.02cm" svg:x="17.303cm" svg:y="4.603cm" svg:viewBox="0 0 1223 21" draw:points="0,0 1223,0 1223,21 0,21">
          <text:p/>
        </draw:polygon>
        <draw:polygon draw:style-name="gr3" draw:text-style-name="P4" draw:layer="layout" svg:width="0.035cm" svg:height="0.02cm" svg:x="18.524cm" svg:y="4.603cm" svg:viewBox="0 0 36 21" draw:points="0,0 36,0 36,21 0,21">
          <text:p/>
        </draw:polygon>
        <draw:polygon draw:style-name="gr3" draw:text-style-name="P4" draw:layer="layout" svg:width="1.47cm" svg:height="0.02cm" svg:x="18.558cm" svg:y="4.603cm" svg:viewBox="0 0 1471 21" draw:points="0,0 1471,0 1471,21 0,21">
          <text:p/>
        </draw:polygon>
        <draw:polygon draw:style-name="gr3" draw:text-style-name="P4" draw:layer="layout" svg:width="0.013cm" svg:height="0.02cm" svg:x="20.025cm" svg:y="4.603cm" svg:viewBox="0 0 14 21" draw:points="0,0 14,0 14,21 0,21">
          <text:p/>
        </draw:polygon>
        <draw:polygon draw:style-name="gr3" draw:text-style-name="P4" draw:layer="layout" svg:width="0.038cm" svg:height="0.409cm" svg:x="11.923cm" svg:y="4.621cm" svg:viewBox="0 0 39 410" draw:points="0,0 39,0 39,410 0,410">
          <text:p/>
        </draw:polygon>
        <draw:polygon draw:style-name="gr3" draw:text-style-name="P4" draw:layer="layout" svg:width="0.034cm" svg:height="0.409cm" svg:x="13.3cm" svg:y="4.621cm" svg:viewBox="0 0 35 410" draw:points="0,0 35,0 35,410 0,410">
          <text:p/>
        </draw:polygon>
        <draw:polygon draw:style-name="gr3" draw:text-style-name="P4" draw:layer="layout" svg:width="0.038cm" svg:height="0.409cm" svg:x="14.535cm" svg:y="4.621cm" svg:viewBox="0 0 39 410" draw:points="0,0 39,0 39,410 0,410">
          <text:p/>
        </draw:polygon>
        <draw:polygon draw:style-name="gr3" draw:text-style-name="P4" draw:layer="layout" svg:width="0.035cm" svg:height="0.409cm" svg:x="15.773cm" svg:y="4.621cm" svg:viewBox="0 0 36 410" draw:points="0,0 36,0 36,410 0,410">
          <text:p/>
        </draw:polygon>
        <draw:polygon draw:style-name="gr3" draw:text-style-name="P4" draw:layer="layout" svg:width="0.034cm" svg:height="0.409cm" svg:x="17.272cm" svg:y="4.621cm" svg:viewBox="0 0 35 410" draw:points="0,0 35,0 35,410 0,410">
          <text:p/>
        </draw:polygon>
        <draw:polygon draw:style-name="gr3" draw:text-style-name="P4" draw:layer="layout" svg:width="0.035cm" svg:height="0.409cm" svg:x="18.524cm" svg:y="4.621cm" svg:viewBox="0 0 36 410" draw:points="0,0 36,0 36,410 0,410">
          <text:p/>
        </draw:polygon>
        <draw:polygon draw:style-name="gr3" draw:text-style-name="P4" draw:layer="layout" svg:width="0.013cm" svg:height="0.409cm" svg:x="20.025cm" svg:y="4.621cm" svg:viewBox="0 0 14 410" draw:points="0,0 14,0 14,410 0,410">
          <text:p/>
        </draw:polygon>
        <draw:frame draw:style-name="gr5" draw:text-style-name="P5" draw:layer="layout" svg:width="0.285cm" svg:height="0.323cm" svg:x="15.807cm" svg:y="4.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4.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4.63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35cm" svg:x="11.923cm" svg:y="5.028cm" svg:viewBox="0 0 39 36" draw:points="0,0 39,0 39,36 0,36">
          <text:p/>
        </draw:polygon>
        <draw:polygon draw:style-name="gr3" draw:text-style-name="P4" draw:layer="layout" svg:width="0.038cm" svg:height="0.035cm" svg:x="11.923cm" svg:y="5.028cm" svg:viewBox="0 0 39 36" draw:points="0,0 39,0 39,36 0,36">
          <text:p/>
        </draw:polygon>
        <draw:polygon draw:style-name="gr3" draw:text-style-name="P4" draw:layer="layout" svg:width="0.034cm" svg:height="0.035cm" svg:x="11.958cm" svg:y="5.028cm" svg:viewBox="0 0 35 36" draw:points="0,0 35,0 35,36 0,36">
          <text:p/>
        </draw:polygon>
        <draw:polygon draw:style-name="gr3" draw:text-style-name="P4" draw:layer="layout" svg:width="1.311cm" svg:height="0.035cm" svg:x="11.992cm" svg:y="5.028cm" svg:viewBox="0 0 1312 36" draw:points="0,0 1312,0 1312,36 0,36">
          <text:p/>
        </draw:polygon>
        <draw:polygon draw:style-name="gr3" draw:text-style-name="P4" draw:layer="layout" svg:width="0.034cm" svg:height="0.035cm" svg:x="13.3cm" svg:y="5.028cm" svg:viewBox="0 0 35 36" draw:points="0,0 35,0 35,36 0,36">
          <text:p/>
        </draw:polygon>
        <draw:polygon draw:style-name="gr3" draw:text-style-name="P4" draw:layer="layout" svg:width="1.205cm" svg:height="0.035cm" svg:x="13.335cm" svg:y="5.028cm" svg:viewBox="0 0 1206 36" draw:points="0,0 1206,0 1206,36 0,36">
          <text:p/>
        </draw:polygon>
        <draw:polygon draw:style-name="gr3" draw:text-style-name="P4" draw:layer="layout" svg:width="0.038cm" svg:height="0.035cm" svg:x="14.535cm" svg:y="5.028cm" svg:viewBox="0 0 39 36" draw:points="0,0 39,0 39,36 0,36">
          <text:p/>
        </draw:polygon>
        <draw:polygon draw:style-name="gr3" draw:text-style-name="P4" draw:layer="layout" svg:width="1.203cm" svg:height="0.035cm" svg:x="14.57cm" svg:y="5.028cm" svg:viewBox="0 0 1204 36" draw:points="0,0 1204,0 1204,36 0,36">
          <text:p/>
        </draw:polygon>
        <draw:polygon draw:style-name="gr3" draw:text-style-name="P4" draw:layer="layout" svg:width="0.035cm" svg:height="0.035cm" svg:x="15.773cm" svg:y="5.028cm" svg:viewBox="0 0 36 36" draw:points="0,0 36,0 36,36 0,36">
          <text:p/>
        </draw:polygon>
        <draw:polygon draw:style-name="gr3" draw:text-style-name="P4" draw:layer="layout" svg:width="1.467cm" svg:height="0.035cm" svg:x="15.805cm" svg:y="5.028cm" svg:viewBox="0 0 1468 36" draw:points="0,0 1468,0 1468,36 0,36">
          <text:p/>
        </draw:polygon>
        <draw:polygon draw:style-name="gr3" draw:text-style-name="P4" draw:layer="layout" svg:width="0.034cm" svg:height="0.035cm" svg:x="17.272cm" svg:y="5.028cm" svg:viewBox="0 0 35 36" draw:points="0,0 35,0 35,36 0,36">
          <text:p/>
        </draw:polygon>
        <draw:polygon draw:style-name="gr3" draw:text-style-name="P4" draw:layer="layout" svg:width="1.222cm" svg:height="0.035cm" svg:x="17.303cm" svg:y="5.028cm" svg:viewBox="0 0 1223 36" draw:points="0,0 1223,0 1223,36 0,36">
          <text:p/>
        </draw:polygon>
        <draw:polygon draw:style-name="gr3" draw:text-style-name="P4" draw:layer="layout" svg:width="0.035cm" svg:height="0.035cm" svg:x="18.524cm" svg:y="5.028cm" svg:viewBox="0 0 36 36" draw:points="0,0 36,0 36,36 0,36">
          <text:p/>
        </draw:polygon>
        <draw:polygon draw:style-name="gr3" draw:text-style-name="P4" draw:layer="layout" svg:width="1.47cm" svg:height="0.035cm" svg:x="18.558cm" svg:y="5.028cm" svg:viewBox="0 0 1471 36" draw:points="0,0 1471,0 1471,36 0,36">
          <text:p/>
        </draw:polygon>
        <draw:polygon draw:style-name="gr3" draw:text-style-name="P4" draw:layer="layout" svg:width="0.013cm" svg:height="0.035cm" svg:x="20.025cm" svg:y="5.028cm" svg:viewBox="0 0 14 36" draw:points="0,0 14,0 14,36 0,36">
          <text:p/>
        </draw:polygon>
        <draw:polygon draw:style-name="gr3" draw:text-style-name="P4" draw:layer="layout" svg:width="0.034cm" svg:height="0.396cm" svg:x="17.272cm" svg:y="5.062cm" svg:viewBox="0 0 35 397" draw:points="0,0 35,0 35,397 0,397">
          <text:p/>
        </draw:polygon>
        <draw:polygon draw:style-name="gr3" draw:text-style-name="P4" draw:layer="layout" svg:width="0.034cm" svg:height="0.02cm" svg:x="17.272cm" svg:y="5.455cm" svg:viewBox="0 0 35 21" draw:points="0,0 35,0 35,21 0,21">
          <text:p/>
        </draw:polygon>
        <draw:polygon draw:style-name="gr3" draw:text-style-name="P4" draw:layer="layout" svg:width="0.034cm" svg:height="0.02cm" svg:x="17.272cm" svg:y="5.455cm" svg:viewBox="0 0 35 21" draw:points="0,0 35,0 35,21 0,21">
          <text:p/>
        </draw:polygon>
        <draw:polygon draw:style-name="gr3" draw:text-style-name="P4" draw:layer="layout" svg:width="1.222cm" svg:height="0.02cm" svg:x="17.303cm" svg:y="5.455cm" svg:viewBox="0 0 1223 21" draw:points="0,0 1223,0 1223,21 0,21">
          <text:p/>
        </draw:polygon>
        <draw:polygon draw:style-name="gr3" draw:text-style-name="P4" draw:layer="layout" svg:width="0.035cm" svg:height="0.396cm" svg:x="18.524cm" svg:y="5.062cm" svg:viewBox="0 0 36 397" draw:points="0,0 36,0 36,397 0,397">
          <text:p/>
        </draw:polygon>
        <draw:polygon draw:style-name="gr3" draw:text-style-name="P4" draw:layer="layout" svg:width="0.035cm" svg:height="0.02cm" svg:x="18.524cm" svg:y="5.455cm" svg:viewBox="0 0 36 21" draw:points="0,0 36,0 36,21 0,21">
          <text:p/>
        </draw:polygon>
        <draw:polygon draw:style-name="gr3" draw:text-style-name="P4" draw:layer="layout" svg:width="1.47cm" svg:height="0.02cm" svg:x="18.558cm" svg:y="5.455cm" svg:viewBox="0 0 1471 21" draw:points="0,0 1471,0 1471,21 0,21">
          <text:p/>
        </draw:polygon>
        <draw:polygon draw:style-name="gr3" draw:text-style-name="P4" draw:layer="layout" svg:width="0.013cm" svg:height="0.396cm" svg:x="20.025cm" svg:y="5.062cm" svg:viewBox="0 0 14 397" draw:points="0,0 14,0 14,397 0,397">
          <text:p/>
        </draw:polygon>
        <draw:polygon draw:style-name="gr3" draw:text-style-name="P4" draw:layer="layout" svg:width="0.013cm" svg:height="0.02cm" svg:x="20.025cm" svg:y="5.455cm" svg:viewBox="0 0 14 21" draw:points="0,0 14,0 14,21 0,21">
          <text:p/>
        </draw:polygon>
        <draw:polygon draw:style-name="gr3" draw:text-style-name="P4" draw:layer="layout" svg:width="0.013cm" svg:height="0.02cm" svg:x="20.025cm" svg:y="5.455cm" svg:viewBox="0 0 14 21" draw:points="0,0 14,0 14,21 0,21">
          <text:p/>
        </draw:polygon>
        <draw:frame draw:style-name="gr5" draw:text-style-name="P5" draw:layer="layout" svg:width="0.285cm" svg:height="0.323cm" svg:x="11.946cm" svg:y="5.0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5.0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5.066cm">
          <draw:text-box>
            <text:p text:style-name="P2"><text:span text:style-name="T3"><text:s/></text:span></text:p>
          </draw:text-box>
        </draw:frame>
        <draw:frame draw:style-name="gr70" draw:text-style-name="P13" draw:layer="layout" svg:width="0.391cm" svg:height="0.395cm" svg:x="11.908cm" svg:y="5.567cm">
          <draw:text-box>
            <text:p text:style-name="P2"><text:span text:style-name="T10"><text:s/></text:span></text:p>
          </draw:text-box>
        </draw:frame>
        <draw:frame draw:style-name="gr80" draw:text-style-name="P5" draw:layer="layout" svg:width="0.84cm" svg:height="0.289cm" svg:x="12.192cm" svg:y="6.149cm">
          <draw:text-box>
            <text:p text:style-name="P2"><text:span text:style-name="T4">Övn. 2 </text:span></text:p>
          </draw:text-box>
        </draw:frame>
        <draw:frame draw:style-name="gr81" draw:text-style-name="P5" draw:layer="layout" svg:width="0.353cm" svg:height="0.289cm" svg:x="13.83cm" svg:y="6.149cm">
          <draw:text-box>
            <text:p text:style-name="P2"><text:span text:style-name="T2">T1 </text:span></text:p>
          </draw:text-box>
        </draw:frame>
        <draw:frame draw:style-name="gr81" draw:text-style-name="P5" draw:layer="layout" svg:width="0.353cm" svg:height="0.289cm" svg:x="15.066cm" svg:y="6.149cm">
          <draw:text-box>
            <text:p text:style-name="P2"><text:span text:style-name="T2">T2 </text:span></text:p>
          </draw:text-box>
        </draw:frame>
        <draw:polygon draw:style-name="gr3" draw:text-style-name="P4" draw:layer="layout" svg:width="0.038cm" svg:height="0.035cm" svg:x="11.923cm" svg:y="5.934cm" svg:viewBox="0 0 39 36" draw:points="0,0 39,0 39,36 0,36">
          <text:p/>
        </draw:polygon>
        <draw:polygon draw:style-name="gr3" draw:text-style-name="P4" draw:layer="layout" svg:width="0.038cm" svg:height="0.035cm" svg:x="11.923cm" svg:y="5.934cm" svg:viewBox="0 0 39 36" draw:points="0,0 39,0 39,36 0,36">
          <text:p/>
        </draw:polygon>
        <draw:polygon draw:style-name="gr3" draw:text-style-name="P4" draw:layer="layout" svg:width="1.345cm" svg:height="0.035cm" svg:x="11.958cm" svg:y="5.934cm" svg:viewBox="0 0 1346 36" draw:points="0,0 1346,0 1346,36 0,36">
          <text:p/>
        </draw:polygon>
        <draw:polygon draw:style-name="gr3" draw:text-style-name="P4" draw:layer="layout" svg:width="0.034cm" svg:height="0.035cm" svg:x="13.3cm" svg:y="5.934cm" svg:viewBox="0 0 35 36" draw:points="0,0 35,0 35,36 0,36">
          <text:p/>
        </draw:polygon>
        <draw:polygon draw:style-name="gr3" draw:text-style-name="P4" draw:layer="layout" svg:width="1.205cm" svg:height="0.035cm" svg:x="13.335cm" svg:y="5.934cm" svg:viewBox="0 0 1206 36" draw:points="0,0 1206,0 1206,36 0,36">
          <text:p/>
        </draw:polygon>
        <draw:polygon draw:style-name="gr3" draw:text-style-name="P4" draw:layer="layout" svg:width="0.038cm" svg:height="0.035cm" svg:x="14.535cm" svg:y="5.934cm" svg:viewBox="0 0 39 36" draw:points="0,0 39,0 39,36 0,36">
          <text:p/>
        </draw:polygon>
        <draw:polygon draw:style-name="gr3" draw:text-style-name="P4" draw:layer="layout" svg:width="1.203cm" svg:height="0.035cm" svg:x="14.57cm" svg:y="5.934cm" svg:viewBox="0 0 1204 36" draw:points="0,0 1204,0 1204,36 0,36">
          <text:p/>
        </draw:polygon>
        <draw:polygon draw:style-name="gr3" draw:text-style-name="P4" draw:layer="layout" svg:width="0.035cm" svg:height="0.035cm" svg:x="15.773cm" svg:y="5.934cm" svg:viewBox="0 0 36 36" draw:points="0,0 36,0 36,36 0,36">
          <text:p/>
        </draw:polygon>
        <draw:polygon draw:style-name="gr3" draw:text-style-name="P4" draw:layer="layout" svg:width="1.467cm" svg:height="0.035cm" svg:x="15.805cm" svg:y="5.934cm" svg:viewBox="0 0 1468 36" draw:points="0,0 1468,0 1468,36 0,36">
          <text:p/>
        </draw:polygon>
        <draw:polygon draw:style-name="gr3" draw:text-style-name="P4" draw:layer="layout" svg:width="0.034cm" svg:height="0.035cm" svg:x="17.272cm" svg:y="5.934cm" svg:viewBox="0 0 35 36" draw:points="0,0 35,0 35,36 0,36">
          <text:p/>
        </draw:polygon>
        <draw:polygon draw:style-name="gr3" draw:text-style-name="P4" draw:layer="layout" svg:width="1.222cm" svg:height="0.035cm" svg:x="17.303cm" svg:y="5.934cm" svg:viewBox="0 0 1223 36" draw:points="0,0 1223,0 1223,36 0,36">
          <text:p/>
        </draw:polygon>
        <draw:polygon draw:style-name="gr3" draw:text-style-name="P4" draw:layer="layout" svg:width="0.035cm" svg:height="0.035cm" svg:x="18.524cm" svg:y="5.934cm" svg:viewBox="0 0 36 36" draw:points="0,0 36,0 36,36 0,36">
          <text:p/>
        </draw:polygon>
        <draw:polygon draw:style-name="gr3" draw:text-style-name="P4" draw:layer="layout" svg:width="1.47cm" svg:height="0.035cm" svg:x="18.558cm" svg:y="5.934cm" svg:viewBox="0 0 1471 36" draw:points="0,0 1471,0 1471,36 0,36">
          <text:p/>
        </draw:polygon>
        <draw:polygon draw:style-name="gr3" draw:text-style-name="P4" draw:layer="layout" svg:width="0.013cm" svg:height="0.035cm" svg:x="20.025cm" svg:y="5.934cm" svg:viewBox="0 0 14 36" draw:points="0,0 14,0 14,36 0,36">
          <text:p/>
        </draw:polygon>
        <draw:polygon draw:style-name="gr3" draw:text-style-name="P4" draw:layer="layout" svg:width="0.013cm" svg:height="0.035cm" svg:x="20.025cm" svg:y="5.934cm" svg:viewBox="0 0 14 36" draw:points="0,0 14,0 14,36 0,36">
          <text:p/>
        </draw:polygon>
        <draw:polygon draw:style-name="gr3" draw:text-style-name="P4" draw:layer="layout" svg:width="0.038cm" svg:height="0.551cm" svg:x="11.923cm" svg:y="5.969cm" svg:viewBox="0 0 39 552" draw:points="0,0 39,0 39,552 0,552">
          <text:p/>
        </draw:polygon>
        <draw:polygon draw:style-name="gr3" draw:text-style-name="P4" draw:layer="layout" svg:width="0.034cm" svg:height="0.551cm" svg:x="13.3cm" svg:y="5.969cm" svg:viewBox="0 0 35 552" draw:points="0,0 35,0 35,552 0,552">
          <text:p/>
        </draw:polygon>
        <draw:polygon draw:style-name="gr3" draw:text-style-name="P4" draw:layer="layout" svg:width="0.038cm" svg:height="0.551cm" svg:x="14.535cm" svg:y="5.969cm" svg:viewBox="0 0 39 552" draw:points="0,0 39,0 39,552 0,552">
          <text:p/>
        </draw:polygon>
        <draw:polygon draw:style-name="gr3" draw:text-style-name="P4" draw:layer="layout" svg:width="0.035cm" svg:height="0.551cm" svg:x="15.773cm" svg:y="5.969cm" svg:viewBox="0 0 36 552" draw:points="0,0 36,0 36,552 0,552">
          <text:p/>
        </draw:polygon>
        <draw:polygon draw:style-name="gr3" draw:text-style-name="P4" draw:layer="layout" svg:width="0.034cm" svg:height="0.551cm" svg:x="17.272cm" svg:y="5.969cm" svg:viewBox="0 0 35 552" draw:points="0,0 35,0 35,552 0,552">
          <text:p/>
        </draw:polygon>
        <draw:polygon draw:style-name="gr3" draw:text-style-name="P4" draw:layer="layout" svg:width="0.035cm" svg:height="0.551cm" svg:x="18.524cm" svg:y="5.969cm" svg:viewBox="0 0 36 552" draw:points="0,0 36,0 36,552 0,552">
          <text:p/>
        </draw:polygon>
        <draw:polygon draw:style-name="gr3" draw:text-style-name="P4" draw:layer="layout" svg:width="0.013cm" svg:height="0.551cm" svg:x="20.025cm" svg:y="5.969cm" svg:viewBox="0 0 14 552" draw:points="0,0 14,0 14,552 0,552">
          <text:p/>
        </draw:polygon>
        <draw:frame draw:style-name="gr82" draw:text-style-name="P5" draw:layer="layout" svg:width="0.614cm" svg:height="0.289cm" svg:x="16.04cm" svg:y="6.149cm">
          <draw:text-box>
            <text:p text:style-name="P2"><text:span text:style-name="T2">Träff </text:span></text:p>
          </draw:text-box>
        </draw:frame>
        <draw:frame draw:style-name="gr83" draw:text-style-name="P5" draw:layer="layout" svg:width="0.792cm" svg:height="0.289cm" svg:x="17.496cm" svg:y="6.149cm">
          <draw:text-box>
            <text:p text:style-name="P2"><text:span text:style-name="T2">Poäng </text:span></text:p>
          </draw:text-box>
        </draw:frame>
        <draw:frame draw:style-name="gr84" draw:text-style-name="P5" draw:layer="layout" svg:width="0.49cm" svg:height="0.289cm" svg:x="18.559cm" svg:y="6.149cm">
          <draw:text-box>
            <text:p text:style-name="P2"><text:span text:style-name="T2"><text:s/>Tid </text:span></text:p>
          </draw:text-box>
        </draw:frame>
        <draw:frame draw:style-name="gr85" draw:text-style-name="P5" draw:layer="layout" svg:width="0.501cm" svg:height="0.289cm" svg:x="12.45cm" svg:y="6.632cm">
          <draw:text-box>
            <text:p text:style-name="P2"><text:span text:style-name="T2">A/B </text:span></text:p>
          </draw:text-box>
        </draw:frame>
        <draw:frame draw:style-name="gr86" draw:text-style-name="P16" draw:layer="layout" svg:width="0.242cm" svg:height="0.268cm" svg:x="13.335cm" svg:y="6.566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4.571cm" svg:y="6.566cm">
          <draw:text-box>
            <text:p text:style-name="P2"><text:span text:style-name="T14"><text:s/></text:span></text:p>
          </draw:text-box>
        </draw:frame>
        <draw:polygon draw:style-name="gr3" draw:text-style-name="P4" draw:layer="layout" svg:width="0.038cm" svg:height="0.035cm" svg:x="11.923cm" svg:y="6.519cm" svg:viewBox="0 0 39 36" draw:points="0,0 39,0 39,36 0,36">
          <text:p/>
        </draw:polygon>
        <draw:polygon draw:style-name="gr3" draw:text-style-name="P4" draw:layer="layout" svg:width="1.345cm" svg:height="0.035cm" svg:x="11.958cm" svg:y="6.519cm" svg:viewBox="0 0 1346 36" draw:points="0,0 1346,0 1346,36 0,36">
          <text:p/>
        </draw:polygon>
        <draw:polygon draw:style-name="gr3" draw:text-style-name="P4" draw:layer="layout" svg:width="0.034cm" svg:height="0.035cm" svg:x="13.3cm" svg:y="6.519cm" svg:viewBox="0 0 35 36" draw:points="0,0 35,0 35,36 0,36">
          <text:p/>
        </draw:polygon>
        <draw:polygon draw:style-name="gr3" draw:text-style-name="P4" draw:layer="layout" svg:width="1.205cm" svg:height="0.035cm" svg:x="13.335cm" svg:y="6.519cm" svg:viewBox="0 0 1206 36" draw:points="0,0 1206,0 1206,36 0,36">
          <text:p/>
        </draw:polygon>
        <draw:polygon draw:style-name="gr3" draw:text-style-name="P4" draw:layer="layout" svg:width="0.038cm" svg:height="0.035cm" svg:x="14.535cm" svg:y="6.519cm" svg:viewBox="0 0 39 36" draw:points="0,0 39,0 39,36 0,36">
          <text:p/>
        </draw:polygon>
        <draw:polygon draw:style-name="gr3" draw:text-style-name="P4" draw:layer="layout" svg:width="1.203cm" svg:height="0.035cm" svg:x="14.57cm" svg:y="6.519cm" svg:viewBox="0 0 1204 36" draw:points="0,0 1204,0 1204,36 0,36">
          <text:p/>
        </draw:polygon>
        <draw:polygon draw:style-name="gr3" draw:text-style-name="P4" draw:layer="layout" svg:width="0.035cm" svg:height="0.035cm" svg:x="15.773cm" svg:y="6.519cm" svg:viewBox="0 0 36 36" draw:points="0,0 36,0 36,36 0,36">
          <text:p/>
        </draw:polygon>
        <draw:polygon draw:style-name="gr3" draw:text-style-name="P4" draw:layer="layout" svg:width="1.467cm" svg:height="0.035cm" svg:x="15.805cm" svg:y="6.519cm" svg:viewBox="0 0 1468 36" draw:points="0,0 1468,0 1468,36 0,36">
          <text:p/>
        </draw:polygon>
        <draw:polygon draw:style-name="gr3" draw:text-style-name="P4" draw:layer="layout" svg:width="0.034cm" svg:height="0.035cm" svg:x="17.272cm" svg:y="6.519cm" svg:viewBox="0 0 35 36" draw:points="0,0 35,0 35,36 0,36">
          <text:p/>
        </draw:polygon>
        <draw:polygon draw:style-name="gr3" draw:text-style-name="P4" draw:layer="layout" svg:width="1.222cm" svg:height="0.035cm" svg:x="17.303cm" svg:y="6.519cm" svg:viewBox="0 0 1223 36" draw:points="0,0 1223,0 1223,36 0,36">
          <text:p/>
        </draw:polygon>
        <draw:polygon draw:style-name="gr3" draw:text-style-name="P4" draw:layer="layout" svg:width="0.035cm" svg:height="0.035cm" svg:x="18.524cm" svg:y="6.519cm" svg:viewBox="0 0 36 36" draw:points="0,0 36,0 36,36 0,36">
          <text:p/>
        </draw:polygon>
        <draw:polygon draw:style-name="gr3" draw:text-style-name="P4" draw:layer="layout" svg:width="1.47cm" svg:height="0.035cm" svg:x="18.558cm" svg:y="6.519cm" svg:viewBox="0 0 1471 36" draw:points="0,0 1471,0 1471,36 0,36">
          <text:p/>
        </draw:polygon>
        <draw:polygon draw:style-name="gr3" draw:text-style-name="P4" draw:layer="layout" svg:width="0.013cm" svg:height="0.035cm" svg:x="20.025cm" svg:y="6.519cm" svg:viewBox="0 0 14 36" draw:points="0,0 14,0 14,36 0,36">
          <text:p/>
        </draw:polygon>
        <draw:polygon draw:style-name="gr3" draw:text-style-name="P4" draw:layer="layout" svg:width="0.038cm" svg:height="0.39cm" svg:x="11.923cm" svg:y="6.552cm" svg:viewBox="0 0 39 391" draw:points="0,0 39,0 39,391 0,391">
          <text:p/>
        </draw:polygon>
        <draw:polygon draw:style-name="gr3" draw:text-style-name="P4" draw:layer="layout" svg:width="0.034cm" svg:height="0.39cm" svg:x="13.3cm" svg:y="6.552cm" svg:viewBox="0 0 35 391" draw:points="0,0 35,0 35,391 0,391">
          <text:p/>
        </draw:polygon>
        <draw:polygon draw:style-name="gr3" draw:text-style-name="P4" draw:layer="layout" svg:width="0.038cm" svg:height="0.39cm" svg:x="14.535cm" svg:y="6.552cm" svg:viewBox="0 0 39 391" draw:points="0,0 39,0 39,391 0,391">
          <text:p/>
        </draw:polygon>
        <draw:polygon draw:style-name="gr3" draw:text-style-name="P4" draw:layer="layout" svg:width="0.035cm" svg:height="0.39cm" svg:x="15.773cm" svg:y="6.552cm" svg:viewBox="0 0 36 391" draw:points="0,0 36,0 36,391 0,391">
          <text:p/>
        </draw:polygon>
        <draw:polygon draw:style-name="gr3" draw:text-style-name="P4" draw:layer="layout" svg:width="0.034cm" svg:height="0.39cm" svg:x="17.272cm" svg:y="6.552cm" svg:viewBox="0 0 35 391" draw:points="0,0 35,0 35,391 0,391">
          <text:p/>
        </draw:polygon>
        <draw:polygon draw:style-name="gr3" draw:text-style-name="P4" draw:layer="layout" svg:width="0.035cm" svg:height="0.39cm" svg:x="18.524cm" svg:y="6.552cm" svg:viewBox="0 0 36 391" draw:points="0,0 36,0 36,391 0,391">
          <text:p/>
        </draw:polygon>
        <draw:polygon draw:style-name="gr3" draw:text-style-name="P4" draw:layer="layout" svg:width="0.013cm" svg:height="0.39cm" svg:x="20.025cm" svg:y="6.552cm" svg:viewBox="0 0 14 391" draw:points="0,0 14,0 14,391 0,391">
          <text:p/>
        </draw:polygon>
        <draw:frame draw:style-name="gr86" draw:text-style-name="P16" draw:layer="layout" svg:width="0.242cm" svg:height="0.268cm" svg:x="15.807cm" svg:y="6.566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7.306cm" svg:y="6.566cm">
          <draw:text-box>
            <text:p text:style-name="P2"><text:span text:style-name="T14"><text:s/></text:span></text:p>
          </draw:text-box>
        </draw:frame>
        <draw:frame draw:style-name="gr8" draw:text-style-name="P5" draw:layer="layout" svg:width="0.285cm" svg:height="0.289cm" svg:x="18.749cm" svg:y="6.632cm">
          <draw:text-box>
            <text:p text:style-name="P2"><text:span text:style-name="T2">1 </text:span></text:p>
          </draw:text-box>
        </draw:frame>
        <draw:frame draw:style-name="gr8" draw:text-style-name="P5" draw:layer="layout" svg:width="0.285cm" svg:height="0.289cm" svg:x="12.59cm" svg:y="7.047cm">
          <draw:text-box>
            <text:p text:style-name="P2"><text:span text:style-name="T2">C </text:span></text:p>
          </draw:text-box>
        </draw:frame>
        <draw:frame draw:style-name="gr5" draw:text-style-name="P5" draw:layer="layout" svg:width="0.285cm" svg:height="0.323cm" svg:x="13.335cm" svg:y="6.96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6.967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6.941cm" svg:viewBox="0 0 39 19" draw:points="0,0 39,0 39,19 0,19">
          <text:p/>
        </draw:polygon>
        <draw:polygon draw:style-name="gr3" draw:text-style-name="P4" draw:layer="layout" svg:width="1.345cm" svg:height="0.018cm" svg:x="11.958cm" svg:y="6.941cm" svg:viewBox="0 0 1346 19" draw:points="0,0 1346,0 1346,19 0,19">
          <text:p/>
        </draw:polygon>
        <draw:polygon draw:style-name="gr3" draw:text-style-name="P4" draw:layer="layout" svg:width="0.034cm" svg:height="0.018cm" svg:x="13.3cm" svg:y="6.941cm" svg:viewBox="0 0 35 19" draw:points="0,0 35,0 35,19 0,19">
          <text:p/>
        </draw:polygon>
        <draw:polygon draw:style-name="gr3" draw:text-style-name="P4" draw:layer="layout" svg:width="1.205cm" svg:height="0.018cm" svg:x="13.335cm" svg:y="6.941cm" svg:viewBox="0 0 1206 19" draw:points="0,0 1206,0 1206,19 0,19">
          <text:p/>
        </draw:polygon>
        <draw:polygon draw:style-name="gr3" draw:text-style-name="P4" draw:layer="layout" svg:width="0.038cm" svg:height="0.018cm" svg:x="14.535cm" svg:y="6.941cm" svg:viewBox="0 0 39 19" draw:points="0,0 39,0 39,19 0,19">
          <text:p/>
        </draw:polygon>
        <draw:polygon draw:style-name="gr3" draw:text-style-name="P4" draw:layer="layout" svg:width="1.203cm" svg:height="0.018cm" svg:x="14.57cm" svg:y="6.941cm" svg:viewBox="0 0 1204 19" draw:points="0,0 1204,0 1204,19 0,19">
          <text:p/>
        </draw:polygon>
        <draw:polygon draw:style-name="gr3" draw:text-style-name="P4" draw:layer="layout" svg:width="0.035cm" svg:height="0.018cm" svg:x="15.773cm" svg:y="6.941cm" svg:viewBox="0 0 36 19" draw:points="0,0 36,0 36,19 0,19">
          <text:p/>
        </draw:polygon>
        <draw:polygon draw:style-name="gr3" draw:text-style-name="P4" draw:layer="layout" svg:width="1.467cm" svg:height="0.018cm" svg:x="15.805cm" svg:y="6.941cm" svg:viewBox="0 0 1468 19" draw:points="0,0 1468,0 1468,19 0,19">
          <text:p/>
        </draw:polygon>
        <draw:polygon draw:style-name="gr3" draw:text-style-name="P4" draw:layer="layout" svg:width="0.034cm" svg:height="0.018cm" svg:x="17.272cm" svg:y="6.941cm" svg:viewBox="0 0 35 19" draw:points="0,0 35,0 35,19 0,19">
          <text:p/>
        </draw:polygon>
        <draw:polygon draw:style-name="gr3" draw:text-style-name="P4" draw:layer="layout" svg:width="1.222cm" svg:height="0.018cm" svg:x="17.303cm" svg:y="6.941cm" svg:viewBox="0 0 1223 19" draw:points="0,0 1223,0 1223,19 0,19">
          <text:p/>
        </draw:polygon>
        <draw:polygon draw:style-name="gr3" draw:text-style-name="P4" draw:layer="layout" svg:width="0.035cm" svg:height="0.018cm" svg:x="18.524cm" svg:y="6.941cm" svg:viewBox="0 0 36 19" draw:points="0,0 36,0 36,19 0,19">
          <text:p/>
        </draw:polygon>
        <draw:polygon draw:style-name="gr3" draw:text-style-name="P4" draw:layer="layout" svg:width="1.47cm" svg:height="0.018cm" svg:x="18.558cm" svg:y="6.941cm" svg:viewBox="0 0 1471 19" draw:points="0,0 1471,0 1471,19 0,19">
          <text:p/>
        </draw:polygon>
        <draw:polygon draw:style-name="gr3" draw:text-style-name="P4" draw:layer="layout" svg:width="0.013cm" svg:height="0.018cm" svg:x="20.025cm" svg:y="6.941cm" svg:viewBox="0 0 14 19" draw:points="0,0 14,0 14,19 0,19">
          <text:p/>
        </draw:polygon>
        <draw:polygon draw:style-name="gr3" draw:text-style-name="P4" draw:layer="layout" svg:width="0.038cm" svg:height="0.398cm" svg:x="11.923cm" svg:y="6.959cm" svg:viewBox="0 0 39 399" draw:points="0,0 39,0 39,399 0,399">
          <text:p/>
        </draw:polygon>
        <draw:polygon draw:style-name="gr3" draw:text-style-name="P4" draw:layer="layout" svg:width="0.034cm" svg:height="0.398cm" svg:x="13.3cm" svg:y="6.959cm" svg:viewBox="0 0 35 399" draw:points="0,0 35,0 35,399 0,399">
          <text:p/>
        </draw:polygon>
        <draw:polygon draw:style-name="gr3" draw:text-style-name="P4" draw:layer="layout" svg:width="0.038cm" svg:height="0.398cm" svg:x="14.535cm" svg:y="6.959cm" svg:viewBox="0 0 39 399" draw:points="0,0 39,0 39,399 0,399">
          <text:p/>
        </draw:polygon>
        <draw:polygon draw:style-name="gr3" draw:text-style-name="P4" draw:layer="layout" svg:width="0.035cm" svg:height="0.398cm" svg:x="15.773cm" svg:y="6.959cm" svg:viewBox="0 0 36 399" draw:points="0,0 36,0 36,399 0,399">
          <text:p/>
        </draw:polygon>
        <draw:polygon draw:style-name="gr3" draw:text-style-name="P4" draw:layer="layout" svg:width="0.034cm" svg:height="0.398cm" svg:x="17.272cm" svg:y="6.959cm" svg:viewBox="0 0 35 399" draw:points="0,0 35,0 35,399 0,399">
          <text:p/>
        </draw:polygon>
        <draw:polygon draw:style-name="gr3" draw:text-style-name="P4" draw:layer="layout" svg:width="0.035cm" svg:height="0.398cm" svg:x="18.524cm" svg:y="6.959cm" svg:viewBox="0 0 36 399" draw:points="0,0 36,0 36,399 0,399">
          <text:p/>
        </draw:polygon>
        <draw:polygon draw:style-name="gr3" draw:text-style-name="P4" draw:layer="layout" svg:width="0.013cm" svg:height="0.398cm" svg:x="20.025cm" svg:y="6.959cm" svg:viewBox="0 0 14 399" draw:points="0,0 14,0 14,399 0,399">
          <text:p/>
        </draw:polygon>
        <draw:frame draw:style-name="gr5" draw:text-style-name="P5" draw:layer="layout" svg:width="0.285cm" svg:height="0.323cm" svg:x="15.807cm" svg:y="6.96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6.967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8.749cm" svg:y="7.047cm">
          <draw:text-box>
            <text:p text:style-name="P2"><text:span text:style-name="T2">2 </text:span></text:p>
          </draw:text-box>
        </draw:frame>
        <draw:frame draw:style-name="gr8" draw:text-style-name="P5" draw:layer="layout" svg:width="0.285cm" svg:height="0.289cm" svg:x="12.581cm" svg:y="7.457cm">
          <draw:text-box>
            <text:p text:style-name="P2"><text:span text:style-name="T2">D </text:span></text:p>
          </draw:text-box>
        </draw:frame>
        <draw:frame draw:style-name="gr5" draw:text-style-name="P5" draw:layer="layout" svg:width="0.285cm" svg:height="0.323cm" svg:x="13.335cm" svg:y="7.38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7.382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7cm" svg:x="11.923cm" svg:y="7.357cm" svg:viewBox="0 0 39 18" draw:points="0,0 39,0 39,18 0,18">
          <text:p/>
        </draw:polygon>
        <draw:polygon draw:style-name="gr3" draw:text-style-name="P4" draw:layer="layout" svg:width="1.345cm" svg:height="0.017cm" svg:x="11.958cm" svg:y="7.357cm" svg:viewBox="0 0 1346 18" draw:points="0,0 1346,0 1346,18 0,18">
          <text:p/>
        </draw:polygon>
        <draw:polygon draw:style-name="gr3" draw:text-style-name="P4" draw:layer="layout" svg:width="0.034cm" svg:height="0.017cm" svg:x="13.3cm" svg:y="7.357cm" svg:viewBox="0 0 35 18" draw:points="0,0 35,0 35,18 0,18">
          <text:p/>
        </draw:polygon>
        <draw:polygon draw:style-name="gr3" draw:text-style-name="P4" draw:layer="layout" svg:width="1.205cm" svg:height="0.017cm" svg:x="13.335cm" svg:y="7.357cm" svg:viewBox="0 0 1206 18" draw:points="0,0 1206,0 1206,18 0,18">
          <text:p/>
        </draw:polygon>
        <draw:polygon draw:style-name="gr3" draw:text-style-name="P4" draw:layer="layout" svg:width="0.038cm" svg:height="0.017cm" svg:x="14.535cm" svg:y="7.357cm" svg:viewBox="0 0 39 18" draw:points="0,0 39,0 39,18 0,18">
          <text:p/>
        </draw:polygon>
        <draw:polygon draw:style-name="gr3" draw:text-style-name="P4" draw:layer="layout" svg:width="1.203cm" svg:height="0.017cm" svg:x="14.57cm" svg:y="7.357cm" svg:viewBox="0 0 1204 18" draw:points="0,0 1204,0 1204,18 0,18">
          <text:p/>
        </draw:polygon>
        <draw:polygon draw:style-name="gr3" draw:text-style-name="P4" draw:layer="layout" svg:width="0.035cm" svg:height="0.017cm" svg:x="15.773cm" svg:y="7.357cm" svg:viewBox="0 0 36 18" draw:points="0,0 36,0 36,18 0,18">
          <text:p/>
        </draw:polygon>
        <draw:polygon draw:style-name="gr3" draw:text-style-name="P4" draw:layer="layout" svg:width="1.467cm" svg:height="0.017cm" svg:x="15.805cm" svg:y="7.357cm" svg:viewBox="0 0 1468 18" draw:points="0,0 1468,0 1468,18 0,18">
          <text:p/>
        </draw:polygon>
        <draw:polygon draw:style-name="gr3" draw:text-style-name="P4" draw:layer="layout" svg:width="0.034cm" svg:height="0.017cm" svg:x="17.272cm" svg:y="7.357cm" svg:viewBox="0 0 35 18" draw:points="0,0 35,0 35,18 0,18">
          <text:p/>
        </draw:polygon>
        <draw:polygon draw:style-name="gr3" draw:text-style-name="P4" draw:layer="layout" svg:width="1.222cm" svg:height="0.017cm" svg:x="17.303cm" svg:y="7.357cm" svg:viewBox="0 0 1223 18" draw:points="0,0 1223,0 1223,18 0,18">
          <text:p/>
        </draw:polygon>
        <draw:polygon draw:style-name="gr3" draw:text-style-name="P4" draw:layer="layout" svg:width="0.035cm" svg:height="0.017cm" svg:x="18.524cm" svg:y="7.357cm" svg:viewBox="0 0 36 18" draw:points="0,0 36,0 36,18 0,18">
          <text:p/>
        </draw:polygon>
        <draw:polygon draw:style-name="gr3" draw:text-style-name="P4" draw:layer="layout" svg:width="1.47cm" svg:height="0.017cm" svg:x="18.558cm" svg:y="7.357cm" svg:viewBox="0 0 1471 18" draw:points="0,0 1471,0 1471,18 0,18">
          <text:p/>
        </draw:polygon>
        <draw:polygon draw:style-name="gr3" draw:text-style-name="P4" draw:layer="layout" svg:width="0.013cm" svg:height="0.017cm" svg:x="20.025cm" svg:y="7.357cm" svg:viewBox="0 0 14 18" draw:points="0,0 14,0 14,18 0,18">
          <text:p/>
        </draw:polygon>
        <draw:polygon draw:style-name="gr3" draw:text-style-name="P4" draw:layer="layout" svg:width="0.038cm" svg:height="0.398cm" svg:x="11.923cm" svg:y="7.374cm" svg:viewBox="0 0 39 399" draw:points="0,0 39,0 39,399 0,399">
          <text:p/>
        </draw:polygon>
        <draw:polygon draw:style-name="gr3" draw:text-style-name="P4" draw:layer="layout" svg:width="0.034cm" svg:height="0.398cm" svg:x="13.3cm" svg:y="7.374cm" svg:viewBox="0 0 35 399" draw:points="0,0 35,0 35,399 0,399">
          <text:p/>
        </draw:polygon>
        <draw:polygon draw:style-name="gr3" draw:text-style-name="P4" draw:layer="layout" svg:width="0.038cm" svg:height="0.398cm" svg:x="14.535cm" svg:y="7.374cm" svg:viewBox="0 0 39 399" draw:points="0,0 39,0 39,399 0,399">
          <text:p/>
        </draw:polygon>
        <draw:polygon draw:style-name="gr3" draw:text-style-name="P4" draw:layer="layout" svg:width="0.035cm" svg:height="0.398cm" svg:x="15.773cm" svg:y="7.374cm" svg:viewBox="0 0 36 399" draw:points="0,0 36,0 36,399 0,399">
          <text:p/>
        </draw:polygon>
        <draw:polygon draw:style-name="gr3" draw:text-style-name="P4" draw:layer="layout" svg:width="0.034cm" svg:height="0.398cm" svg:x="17.272cm" svg:y="7.374cm" svg:viewBox="0 0 35 399" draw:points="0,0 35,0 35,399 0,399">
          <text:p/>
        </draw:polygon>
        <draw:polygon draw:style-name="gr3" draw:text-style-name="P4" draw:layer="layout" svg:width="0.035cm" svg:height="0.398cm" svg:x="18.524cm" svg:y="7.374cm" svg:viewBox="0 0 36 399" draw:points="0,0 36,0 36,399 0,399">
          <text:p/>
        </draw:polygon>
        <draw:polygon draw:style-name="gr3" draw:text-style-name="P4" draw:layer="layout" svg:width="0.013cm" svg:height="0.398cm" svg:x="20.025cm" svg:y="7.374cm" svg:viewBox="0 0 14 399" draw:points="0,0 14,0 14,399 0,399">
          <text:p/>
        </draw:polygon>
        <draw:frame draw:style-name="gr5" draw:text-style-name="P5" draw:layer="layout" svg:width="0.285cm" svg:height="0.323cm" svg:x="15.807cm" svg:y="7.38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7.382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8.749cm" svg:y="7.457cm">
          <draw:text-box>
            <text:p text:style-name="P2"><text:span text:style-name="T2">3 </text:span></text:p>
          </draw:text-box>
        </draw:frame>
        <draw:frame draw:style-name="gr89" draw:text-style-name="P5" draw:layer="layout" svg:width="0.899cm" svg:height="0.289cm" svg:x="12.006cm" svg:y="7.876cm">
          <draw:text-box>
            <text:p text:style-name="P2"><text:span text:style-name="T2"><text:s text:c="9"/>M </text:span></text:p>
          </draw:text-box>
        </draw:frame>
        <draw:frame draw:style-name="gr5" draw:text-style-name="P5" draw:layer="layout" svg:width="0.285cm" svg:height="0.323cm" svg:x="13.335cm" svg:y="7.79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7.797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7.772cm" svg:viewBox="0 0 39 19" draw:points="0,0 39,0 39,19 0,19">
          <text:p/>
        </draw:polygon>
        <draw:polygon draw:style-name="gr3" draw:text-style-name="P4" draw:layer="layout" svg:width="1.345cm" svg:height="0.018cm" svg:x="11.958cm" svg:y="7.772cm" svg:viewBox="0 0 1346 19" draw:points="0,0 1346,0 1346,19 0,19">
          <text:p/>
        </draw:polygon>
        <draw:polygon draw:style-name="gr3" draw:text-style-name="P4" draw:layer="layout" svg:width="0.034cm" svg:height="0.018cm" svg:x="13.3cm" svg:y="7.772cm" svg:viewBox="0 0 35 19" draw:points="0,0 35,0 35,19 0,19">
          <text:p/>
        </draw:polygon>
        <draw:polygon draw:style-name="gr3" draw:text-style-name="P4" draw:layer="layout" svg:width="1.205cm" svg:height="0.018cm" svg:x="13.335cm" svg:y="7.772cm" svg:viewBox="0 0 1206 19" draw:points="0,0 1206,0 1206,19 0,19">
          <text:p/>
        </draw:polygon>
        <draw:polygon draw:style-name="gr3" draw:text-style-name="P4" draw:layer="layout" svg:width="0.038cm" svg:height="0.018cm" svg:x="14.535cm" svg:y="7.772cm" svg:viewBox="0 0 39 19" draw:points="0,0 39,0 39,19 0,19">
          <text:p/>
        </draw:polygon>
        <draw:polygon draw:style-name="gr3" draw:text-style-name="P4" draw:layer="layout" svg:width="1.203cm" svg:height="0.018cm" svg:x="14.57cm" svg:y="7.772cm" svg:viewBox="0 0 1204 19" draw:points="0,0 1204,0 1204,19 0,19">
          <text:p/>
        </draw:polygon>
        <draw:polygon draw:style-name="gr3" draw:text-style-name="P4" draw:layer="layout" svg:width="0.035cm" svg:height="0.018cm" svg:x="15.773cm" svg:y="7.772cm" svg:viewBox="0 0 36 19" draw:points="0,0 36,0 36,19 0,19">
          <text:p/>
        </draw:polygon>
        <draw:polygon draw:style-name="gr3" draw:text-style-name="P4" draw:layer="layout" svg:width="1.467cm" svg:height="0.018cm" svg:x="15.805cm" svg:y="7.772cm" svg:viewBox="0 0 1468 19" draw:points="0,0 1468,0 1468,19 0,19">
          <text:p/>
        </draw:polygon>
        <draw:polygon draw:style-name="gr3" draw:text-style-name="P4" draw:layer="layout" svg:width="0.034cm" svg:height="0.018cm" svg:x="17.272cm" svg:y="7.772cm" svg:viewBox="0 0 35 19" draw:points="0,0 35,0 35,19 0,19">
          <text:p/>
        </draw:polygon>
        <draw:polygon draw:style-name="gr3" draw:text-style-name="P4" draw:layer="layout" svg:width="1.222cm" svg:height="0.018cm" svg:x="17.303cm" svg:y="7.772cm" svg:viewBox="0 0 1223 19" draw:points="0,0 1223,0 1223,19 0,19">
          <text:p/>
        </draw:polygon>
        <draw:polygon draw:style-name="gr3" draw:text-style-name="P4" draw:layer="layout" svg:width="0.035cm" svg:height="0.018cm" svg:x="18.524cm" svg:y="7.772cm" svg:viewBox="0 0 36 19" draw:points="0,0 36,0 36,19 0,19">
          <text:p/>
        </draw:polygon>
        <draw:polygon draw:style-name="gr3" draw:text-style-name="P4" draw:layer="layout" svg:width="1.47cm" svg:height="0.018cm" svg:x="18.558cm" svg:y="7.772cm" svg:viewBox="0 0 1471 19" draw:points="0,0 1471,0 1471,19 0,19">
          <text:p/>
        </draw:polygon>
        <draw:polygon draw:style-name="gr3" draw:text-style-name="P4" draw:layer="layout" svg:width="0.013cm" svg:height="0.018cm" svg:x="20.025cm" svg:y="7.772cm" svg:viewBox="0 0 14 19" draw:points="0,0 14,0 14,19 0,19">
          <text:p/>
        </draw:polygon>
        <draw:polygon draw:style-name="gr3" draw:text-style-name="P4" draw:layer="layout" svg:width="0.038cm" svg:height="0.399cm" svg:x="11.923cm" svg:y="7.789cm" svg:viewBox="0 0 39 400" draw:points="0,0 39,0 39,400 0,400">
          <text:p/>
        </draw:polygon>
        <draw:polygon draw:style-name="gr3" draw:text-style-name="P4" draw:layer="layout" svg:width="0.034cm" svg:height="0.399cm" svg:x="13.3cm" svg:y="7.789cm" svg:viewBox="0 0 35 400" draw:points="0,0 35,0 35,400 0,400">
          <text:p/>
        </draw:polygon>
        <draw:polygon draw:style-name="gr3" draw:text-style-name="P4" draw:layer="layout" svg:width="0.038cm" svg:height="0.399cm" svg:x="14.535cm" svg:y="7.789cm" svg:viewBox="0 0 39 400" draw:points="0,0 39,0 39,400 0,400">
          <text:p/>
        </draw:polygon>
        <draw:polygon draw:style-name="gr3" draw:text-style-name="P4" draw:layer="layout" svg:width="0.035cm" svg:height="0.399cm" svg:x="15.773cm" svg:y="7.789cm" svg:viewBox="0 0 36 400" draw:points="0,0 36,0 36,400 0,400">
          <text:p/>
        </draw:polygon>
        <draw:polygon draw:style-name="gr3" draw:text-style-name="P4" draw:layer="layout" svg:width="0.034cm" svg:height="0.399cm" svg:x="17.272cm" svg:y="7.789cm" svg:viewBox="0 0 35 400" draw:points="0,0 35,0 35,400 0,400">
          <text:p/>
        </draw:polygon>
        <draw:polygon draw:style-name="gr3" draw:text-style-name="P4" draw:layer="layout" svg:width="0.035cm" svg:height="0.399cm" svg:x="18.524cm" svg:y="7.789cm" svg:viewBox="0 0 36 400" draw:points="0,0 36,0 36,400 0,400">
          <text:p/>
        </draw:polygon>
        <draw:polygon draw:style-name="gr3" draw:text-style-name="P4" draw:layer="layout" svg:width="0.013cm" svg:height="0.399cm" svg:x="20.025cm" svg:y="7.789cm" svg:viewBox="0 0 14 400" draw:points="0,0 14,0 14,400 0,400">
          <text:p/>
        </draw:polygon>
        <draw:frame draw:style-name="gr5" draw:text-style-name="P5" draw:layer="layout" svg:width="0.285cm" svg:height="0.323cm" svg:x="15.807cm" svg:y="7.79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7.79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7.797cm">
          <draw:text-box>
            <text:p text:style-name="P2"><text:span text:style-name="T3"><text:s/></text:span></text:p>
          </draw:text-box>
        </draw:frame>
        <draw:frame draw:style-name="gr90" draw:text-style-name="P5" draw:layer="layout" svg:width="0.832cm" svg:height="0.289cm" svg:x="12.09cm" svg:y="8.295cm">
          <draw:text-box>
            <text:p text:style-name="P2"><text:span text:style-name="T2"><text:s text:c="2"/>Straff </text:span></text:p>
          </draw:text-box>
        </draw:frame>
        <draw:frame draw:style-name="gr5" draw:text-style-name="P5" draw:layer="layout" svg:width="0.285cm" svg:height="0.323cm" svg:x="13.335cm" svg:y="8.2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8.212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8.185cm" svg:viewBox="0 0 39 21" draw:points="0,0 39,0 39,21 0,21">
          <text:p/>
        </draw:polygon>
        <draw:polygon draw:style-name="gr3" draw:text-style-name="P4" draw:layer="layout" svg:width="1.345cm" svg:height="0.02cm" svg:x="11.958cm" svg:y="8.185cm" svg:viewBox="0 0 1346 21" draw:points="0,0 1346,0 1346,21 0,21">
          <text:p/>
        </draw:polygon>
        <draw:polygon draw:style-name="gr3" draw:text-style-name="P4" draw:layer="layout" svg:width="0.034cm" svg:height="0.02cm" svg:x="13.3cm" svg:y="8.185cm" svg:viewBox="0 0 35 21" draw:points="0,0 35,0 35,21 0,21">
          <text:p/>
        </draw:polygon>
        <draw:polygon draw:style-name="gr3" draw:text-style-name="P4" draw:layer="layout" svg:width="1.205cm" svg:height="0.02cm" svg:x="13.335cm" svg:y="8.185cm" svg:viewBox="0 0 1206 21" draw:points="0,0 1206,0 1206,21 0,21">
          <text:p/>
        </draw:polygon>
        <draw:polygon draw:style-name="gr3" draw:text-style-name="P4" draw:layer="layout" svg:width="0.038cm" svg:height="0.02cm" svg:x="14.535cm" svg:y="8.185cm" svg:viewBox="0 0 39 21" draw:points="0,0 39,0 39,21 0,21">
          <text:p/>
        </draw:polygon>
        <draw:polygon draw:style-name="gr3" draw:text-style-name="P4" draw:layer="layout" svg:width="1.203cm" svg:height="0.02cm" svg:x="14.57cm" svg:y="8.185cm" svg:viewBox="0 0 1204 21" draw:points="0,0 1204,0 1204,21 0,21">
          <text:p/>
        </draw:polygon>
        <draw:polygon draw:style-name="gr3" draw:text-style-name="P4" draw:layer="layout" svg:width="0.035cm" svg:height="0.02cm" svg:x="15.773cm" svg:y="8.185cm" svg:viewBox="0 0 36 21" draw:points="0,0 36,0 36,21 0,21">
          <text:p/>
        </draw:polygon>
        <draw:polygon draw:style-name="gr3" draw:text-style-name="P4" draw:layer="layout" svg:width="1.467cm" svg:height="0.02cm" svg:x="15.805cm" svg:y="8.185cm" svg:viewBox="0 0 1468 21" draw:points="0,0 1468,0 1468,21 0,21">
          <text:p/>
        </draw:polygon>
        <draw:polygon draw:style-name="gr3" draw:text-style-name="P4" draw:layer="layout" svg:width="0.034cm" svg:height="0.02cm" svg:x="17.272cm" svg:y="8.185cm" svg:viewBox="0 0 35 21" draw:points="0,0 35,0 35,21 0,21">
          <text:p/>
        </draw:polygon>
        <draw:polygon draw:style-name="gr3" draw:text-style-name="P4" draw:layer="layout" svg:width="1.222cm" svg:height="0.02cm" svg:x="17.303cm" svg:y="8.185cm" svg:viewBox="0 0 1223 21" draw:points="0,0 1223,0 1223,21 0,21">
          <text:p/>
        </draw:polygon>
        <draw:polygon draw:style-name="gr3" draw:text-style-name="P4" draw:layer="layout" svg:width="0.035cm" svg:height="0.02cm" svg:x="18.524cm" svg:y="8.185cm" svg:viewBox="0 0 36 21" draw:points="0,0 36,0 36,21 0,21">
          <text:p/>
        </draw:polygon>
        <draw:polygon draw:style-name="gr3" draw:text-style-name="P4" draw:layer="layout" svg:width="1.47cm" svg:height="0.02cm" svg:x="18.558cm" svg:y="8.185cm" svg:viewBox="0 0 1471 21" draw:points="0,0 1471,0 1471,21 0,21">
          <text:p/>
        </draw:polygon>
        <draw:polygon draw:style-name="gr3" draw:text-style-name="P4" draw:layer="layout" svg:width="0.013cm" svg:height="0.02cm" svg:x="20.025cm" svg:y="8.185cm" svg:viewBox="0 0 14 21" draw:points="0,0 14,0 14,21 0,21">
          <text:p/>
        </draw:polygon>
        <draw:polygon draw:style-name="gr3" draw:text-style-name="P4" draw:layer="layout" svg:width="0.038cm" svg:height="0.407cm" svg:x="11.923cm" svg:y="8.203cm" svg:viewBox="0 0 39 408" draw:points="0,0 39,0 39,408 0,408">
          <text:p/>
        </draw:polygon>
        <draw:polygon draw:style-name="gr3" draw:text-style-name="P4" draw:layer="layout" svg:width="0.034cm" svg:height="0.407cm" svg:x="13.3cm" svg:y="8.203cm" svg:viewBox="0 0 35 408" draw:points="0,0 35,0 35,408 0,408">
          <text:p/>
        </draw:polygon>
        <draw:polygon draw:style-name="gr3" draw:text-style-name="P4" draw:layer="layout" svg:width="0.038cm" svg:height="0.407cm" svg:x="14.535cm" svg:y="8.203cm" svg:viewBox="0 0 39 408" draw:points="0,0 39,0 39,408 0,408">
          <text:p/>
        </draw:polygon>
        <draw:polygon draw:style-name="gr3" draw:text-style-name="P4" draw:layer="layout" svg:width="0.035cm" svg:height="0.407cm" svg:x="15.773cm" svg:y="8.203cm" svg:viewBox="0 0 36 408" draw:points="0,0 36,0 36,408 0,408">
          <text:p/>
        </draw:polygon>
        <draw:polygon draw:style-name="gr3" draw:text-style-name="P4" draw:layer="layout" svg:width="0.034cm" svg:height="0.407cm" svg:x="17.272cm" svg:y="8.203cm" svg:viewBox="0 0 35 408" draw:points="0,0 35,0 35,408 0,408">
          <text:p/>
        </draw:polygon>
        <draw:polygon draw:style-name="gr3" draw:text-style-name="P4" draw:layer="layout" svg:width="0.035cm" svg:height="0.407cm" svg:x="18.524cm" svg:y="8.203cm" svg:viewBox="0 0 36 408" draw:points="0,0 36,0 36,408 0,408">
          <text:p/>
        </draw:polygon>
        <draw:polygon draw:style-name="gr3" draw:text-style-name="P4" draw:layer="layout" svg:width="0.013cm" svg:height="0.407cm" svg:x="20.025cm" svg:y="8.203cm" svg:viewBox="0 0 14 408" draw:points="0,0 14,0 14,408 0,408">
          <text:p/>
        </draw:polygon>
        <draw:frame draw:style-name="gr5" draw:text-style-name="P5" draw:layer="layout" svg:width="0.285cm" svg:height="0.323cm" svg:x="15.807cm" svg:y="8.2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8.2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8.212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34cm" svg:x="11.923cm" svg:y="8.61cm" svg:viewBox="0 0 39 35" draw:points="0,0 39,0 39,35 0,35">
          <text:p/>
        </draw:polygon>
        <draw:polygon draw:style-name="gr3" draw:text-style-name="P4" draw:layer="layout" svg:width="0.038cm" svg:height="0.034cm" svg:x="11.923cm" svg:y="8.61cm" svg:viewBox="0 0 39 35" draw:points="0,0 39,0 39,35 0,35">
          <text:p/>
        </draw:polygon>
        <draw:polygon draw:style-name="gr3" draw:text-style-name="P4" draw:layer="layout" svg:width="0.034cm" svg:height="0.034cm" svg:x="11.958cm" svg:y="8.61cm" svg:viewBox="0 0 35 35" draw:points="0,0 35,0 35,35 0,35">
          <text:p/>
        </draw:polygon>
        <draw:polygon draw:style-name="gr3" draw:text-style-name="P4" draw:layer="layout" svg:width="1.311cm" svg:height="0.034cm" svg:x="11.992cm" svg:y="8.61cm" svg:viewBox="0 0 1312 35" draw:points="0,0 1312,0 1312,35 0,35">
          <text:p/>
        </draw:polygon>
        <draw:polygon draw:style-name="gr3" draw:text-style-name="P4" draw:layer="layout" svg:width="0.034cm" svg:height="0.034cm" svg:x="13.3cm" svg:y="8.61cm" svg:viewBox="0 0 35 35" draw:points="0,0 35,0 35,35 0,35">
          <text:p/>
        </draw:polygon>
        <draw:polygon draw:style-name="gr3" draw:text-style-name="P4" draw:layer="layout" svg:width="1.205cm" svg:height="0.034cm" svg:x="13.335cm" svg:y="8.61cm" svg:viewBox="0 0 1206 35" draw:points="0,0 1206,0 1206,35 0,35">
          <text:p/>
        </draw:polygon>
        <draw:polygon draw:style-name="gr3" draw:text-style-name="P4" draw:layer="layout" svg:width="0.038cm" svg:height="0.034cm" svg:x="14.535cm" svg:y="8.61cm" svg:viewBox="0 0 39 35" draw:points="0,0 39,0 39,35 0,35">
          <text:p/>
        </draw:polygon>
        <draw:polygon draw:style-name="gr3" draw:text-style-name="P4" draw:layer="layout" svg:width="1.203cm" svg:height="0.034cm" svg:x="14.57cm" svg:y="8.61cm" svg:viewBox="0 0 1204 35" draw:points="0,0 1204,0 1204,35 0,35">
          <text:p/>
        </draw:polygon>
        <draw:polygon draw:style-name="gr3" draw:text-style-name="P4" draw:layer="layout" svg:width="0.035cm" svg:height="0.034cm" svg:x="15.773cm" svg:y="8.61cm" svg:viewBox="0 0 36 35" draw:points="0,0 36,0 36,35 0,35">
          <text:p/>
        </draw:polygon>
        <draw:polygon draw:style-name="gr3" draw:text-style-name="P4" draw:layer="layout" svg:width="1.467cm" svg:height="0.034cm" svg:x="15.805cm" svg:y="8.61cm" svg:viewBox="0 0 1468 35" draw:points="0,0 1468,0 1468,35 0,35">
          <text:p/>
        </draw:polygon>
        <draw:polygon draw:style-name="gr3" draw:text-style-name="P4" draw:layer="layout" svg:width="0.034cm" svg:height="0.034cm" svg:x="17.272cm" svg:y="8.61cm" svg:viewBox="0 0 35 35" draw:points="0,0 35,0 35,35 0,35">
          <text:p/>
        </draw:polygon>
        <draw:polygon draw:style-name="gr3" draw:text-style-name="P4" draw:layer="layout" svg:width="1.222cm" svg:height="0.034cm" svg:x="17.303cm" svg:y="8.61cm" svg:viewBox="0 0 1223 35" draw:points="0,0 1223,0 1223,35 0,35">
          <text:p/>
        </draw:polygon>
        <draw:polygon draw:style-name="gr3" draw:text-style-name="P4" draw:layer="layout" svg:width="0.035cm" svg:height="0.034cm" svg:x="18.524cm" svg:y="8.61cm" svg:viewBox="0 0 36 35" draw:points="0,0 36,0 36,35 0,35">
          <text:p/>
        </draw:polygon>
        <draw:polygon draw:style-name="gr3" draw:text-style-name="P4" draw:layer="layout" svg:width="1.47cm" svg:height="0.034cm" svg:x="18.558cm" svg:y="8.61cm" svg:viewBox="0 0 1471 35" draw:points="0,0 1471,0 1471,35 0,35">
          <text:p/>
        </draw:polygon>
        <draw:polygon draw:style-name="gr3" draw:text-style-name="P4" draw:layer="layout" svg:width="0.013cm" svg:height="0.034cm" svg:x="20.025cm" svg:y="8.61cm" svg:viewBox="0 0 14 35" draw:points="0,0 14,0 14,35 0,35">
          <text:p/>
        </draw:polygon>
        <draw:polygon draw:style-name="gr3" draw:text-style-name="P4" draw:layer="layout" svg:width="0.034cm" svg:height="0.398cm" svg:x="17.272cm" svg:y="8.644cm" svg:viewBox="0 0 35 399" draw:points="0,0 35,0 35,399 0,399">
          <text:p/>
        </draw:polygon>
        <draw:polygon draw:style-name="gr3" draw:text-style-name="P4" draw:layer="layout" svg:width="0.034cm" svg:height="0.015cm" svg:x="17.272cm" svg:y="9.042cm" svg:viewBox="0 0 35 16" draw:points="0,0 35,0 35,16 0,16">
          <text:p/>
        </draw:polygon>
        <draw:polygon draw:style-name="gr3" draw:text-style-name="P4" draw:layer="layout" svg:width="0.034cm" svg:height="0.015cm" svg:x="17.272cm" svg:y="9.042cm" svg:viewBox="0 0 35 16" draw:points="0,0 35,0 35,16 0,16">
          <text:p/>
        </draw:polygon>
        <draw:polygon draw:style-name="gr3" draw:text-style-name="P4" draw:layer="layout" svg:width="1.222cm" svg:height="0.015cm" svg:x="17.303cm" svg:y="9.042cm" svg:viewBox="0 0 1223 16" draw:points="0,0 1223,0 1223,16 0,16">
          <text:p/>
        </draw:polygon>
        <draw:polygon draw:style-name="gr3" draw:text-style-name="P4" draw:layer="layout" svg:width="0.035cm" svg:height="0.398cm" svg:x="18.524cm" svg:y="8.644cm" svg:viewBox="0 0 36 399" draw:points="0,0 36,0 36,399 0,399">
          <text:p/>
        </draw:polygon>
        <draw:polygon draw:style-name="gr3" draw:text-style-name="P4" draw:layer="layout" svg:width="0.035cm" svg:height="0.015cm" svg:x="18.524cm" svg:y="9.042cm" svg:viewBox="0 0 36 16" draw:points="0,0 36,0 36,16 0,16">
          <text:p/>
        </draw:polygon>
        <draw:polygon draw:style-name="gr3" draw:text-style-name="P4" draw:layer="layout" svg:width="1.47cm" svg:height="0.015cm" svg:x="18.558cm" svg:y="9.042cm" svg:viewBox="0 0 1471 16" draw:points="0,0 1471,0 1471,16 0,16">
          <text:p/>
        </draw:polygon>
        <draw:polygon draw:style-name="gr3" draw:text-style-name="P4" draw:layer="layout" svg:width="0.013cm" svg:height="0.398cm" svg:x="20.025cm" svg:y="8.644cm" svg:viewBox="0 0 14 399" draw:points="0,0 14,0 14,399 0,399">
          <text:p/>
        </draw:polygon>
        <draw:polygon draw:style-name="gr3" draw:text-style-name="P4" draw:layer="layout" svg:width="0.013cm" svg:height="0.015cm" svg:x="20.025cm" svg:y="9.042cm" svg:viewBox="0 0 14 16" draw:points="0,0 14,0 14,16 0,16">
          <text:p/>
        </draw:polygon>
        <draw:polygon draw:style-name="gr3" draw:text-style-name="P4" draw:layer="layout" svg:width="0.013cm" svg:height="0.015cm" svg:x="20.025cm" svg:y="9.042cm" svg:viewBox="0 0 14 16" draw:points="0,0 14,0 14,16 0,16">
          <text:p/>
        </draw:polygon>
        <draw:frame draw:style-name="gr5" draw:text-style-name="P5" draw:layer="layout" svg:width="0.285cm" svg:height="0.323cm" svg:x="11.946cm" svg:y="8.65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8.65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8.652cm">
          <draw:text-box>
            <text:p text:style-name="P2"><text:span text:style-name="T3"><text:s/></text:span></text:p>
          </draw:text-box>
        </draw:frame>
        <draw:frame draw:style-name="gr80" draw:text-style-name="P5" draw:layer="layout" svg:width="0.84cm" svg:height="0.289cm" svg:x="12.192cm" svg:y="9.703cm">
          <draw:text-box>
            <text:p text:style-name="P2"><text:span text:style-name="T4">Övn. 3 </text:span></text:p>
          </draw:text-box>
        </draw:frame>
        <draw:frame draw:style-name="gr81" draw:text-style-name="P5" draw:layer="layout" svg:width="0.353cm" svg:height="0.289cm" svg:x="13.83cm" svg:y="9.703cm">
          <draw:text-box>
            <text:p text:style-name="P2"><text:span text:style-name="T2">T1 </text:span></text:p>
          </draw:text-box>
        </draw:frame>
        <draw:frame draw:style-name="gr81" draw:text-style-name="P5" draw:layer="layout" svg:width="0.353cm" svg:height="0.289cm" svg:x="15.066cm" svg:y="9.703cm">
          <draw:text-box>
            <text:p text:style-name="P2"><text:span text:style-name="T2">T2 </text:span></text:p>
          </draw:text-box>
        </draw:frame>
        <draw:polygon draw:style-name="gr3" draw:text-style-name="P4" draw:layer="layout" svg:width="0.038cm" svg:height="0.037cm" svg:x="11.923cm" svg:y="9.487cm" svg:viewBox="0 0 39 38" draw:points="0,0 39,0 39,38 0,38">
          <text:p/>
        </draw:polygon>
        <draw:polygon draw:style-name="gr3" draw:text-style-name="P4" draw:layer="layout" svg:width="0.038cm" svg:height="0.037cm" svg:x="11.923cm" svg:y="9.487cm" svg:viewBox="0 0 39 38" draw:points="0,0 39,0 39,38 0,38">
          <text:p/>
        </draw:polygon>
        <draw:polygon draw:style-name="gr3" draw:text-style-name="P4" draw:layer="layout" svg:width="1.345cm" svg:height="0.037cm" svg:x="11.958cm" svg:y="9.487cm" svg:viewBox="0 0 1346 38" draw:points="0,0 1346,0 1346,38 0,38">
          <text:p/>
        </draw:polygon>
        <draw:polygon draw:style-name="gr3" draw:text-style-name="P4" draw:layer="layout" svg:width="0.034cm" svg:height="0.037cm" svg:x="13.3cm" svg:y="9.487cm" svg:viewBox="0 0 35 38" draw:points="0,0 35,0 35,38 0,38">
          <text:p/>
        </draw:polygon>
        <draw:polygon draw:style-name="gr3" draw:text-style-name="P4" draw:layer="layout" svg:width="1.205cm" svg:height="0.037cm" svg:x="13.335cm" svg:y="9.487cm" svg:viewBox="0 0 1206 38" draw:points="0,0 1206,0 1206,38 0,38">
          <text:p/>
        </draw:polygon>
        <draw:polygon draw:style-name="gr3" draw:text-style-name="P4" draw:layer="layout" svg:width="0.038cm" svg:height="0.037cm" svg:x="14.535cm" svg:y="9.487cm" svg:viewBox="0 0 39 38" draw:points="0,0 39,0 39,38 0,38">
          <text:p/>
        </draw:polygon>
        <draw:polygon draw:style-name="gr3" draw:text-style-name="P4" draw:layer="layout" svg:width="1.203cm" svg:height="0.037cm" svg:x="14.57cm" svg:y="9.487cm" svg:viewBox="0 0 1204 38" draw:points="0,0 1204,0 1204,38 0,38">
          <text:p/>
        </draw:polygon>
        <draw:polygon draw:style-name="gr3" draw:text-style-name="P4" draw:layer="layout" svg:width="0.035cm" svg:height="0.037cm" svg:x="15.773cm" svg:y="9.487cm" svg:viewBox="0 0 36 38" draw:points="0,0 36,0 36,38 0,38">
          <text:p/>
        </draw:polygon>
        <draw:polygon draw:style-name="gr3" draw:text-style-name="P4" draw:layer="layout" svg:width="1.467cm" svg:height="0.037cm" svg:x="15.805cm" svg:y="9.487cm" svg:viewBox="0 0 1468 38" draw:points="0,0 1468,0 1468,38 0,38">
          <text:p/>
        </draw:polygon>
        <draw:polygon draw:style-name="gr3" draw:text-style-name="P4" draw:layer="layout" svg:width="0.034cm" svg:height="0.037cm" svg:x="17.272cm" svg:y="9.487cm" svg:viewBox="0 0 35 38" draw:points="0,0 35,0 35,38 0,38">
          <text:p/>
        </draw:polygon>
        <draw:polygon draw:style-name="gr3" draw:text-style-name="P4" draw:layer="layout" svg:width="1.222cm" svg:height="0.037cm" svg:x="17.303cm" svg:y="9.487cm" svg:viewBox="0 0 1223 38" draw:points="0,0 1223,0 1223,38 0,38">
          <text:p/>
        </draw:polygon>
        <draw:polygon draw:style-name="gr3" draw:text-style-name="P4" draw:layer="layout" svg:width="0.035cm" svg:height="0.037cm" svg:x="18.524cm" svg:y="9.487cm" svg:viewBox="0 0 36 38" draw:points="0,0 36,0 36,38 0,38">
          <text:p/>
        </draw:polygon>
        <draw:polygon draw:style-name="gr3" draw:text-style-name="P4" draw:layer="layout" svg:width="1.47cm" svg:height="0.037cm" svg:x="18.558cm" svg:y="9.487cm" svg:viewBox="0 0 1471 38" draw:points="0,0 1471,0 1471,38 0,38">
          <text:p/>
        </draw:polygon>
        <draw:polygon draw:style-name="gr3" draw:text-style-name="P4" draw:layer="layout" svg:width="0.013cm" svg:height="0.037cm" svg:x="20.025cm" svg:y="9.487cm" svg:viewBox="0 0 14 38" draw:points="0,0 14,0 14,38 0,38">
          <text:p/>
        </draw:polygon>
        <draw:polygon draw:style-name="gr3" draw:text-style-name="P4" draw:layer="layout" svg:width="0.013cm" svg:height="0.037cm" svg:x="20.025cm" svg:y="9.487cm" svg:viewBox="0 0 14 38" draw:points="0,0 14,0 14,38 0,38">
          <text:p/>
        </draw:polygon>
        <draw:polygon draw:style-name="gr3" draw:text-style-name="P4" draw:layer="layout" svg:width="0.038cm" svg:height="0.557cm" svg:x="11.923cm" svg:y="9.522cm" svg:viewBox="0 0 39 558" draw:points="0,0 39,0 39,558 0,558">
          <text:p/>
        </draw:polygon>
        <draw:polygon draw:style-name="gr3" draw:text-style-name="P4" draw:layer="layout" svg:width="0.034cm" svg:height="0.557cm" svg:x="13.3cm" svg:y="9.522cm" svg:viewBox="0 0 35 558" draw:points="0,0 35,0 35,558 0,558">
          <text:p/>
        </draw:polygon>
        <draw:polygon draw:style-name="gr3" draw:text-style-name="P4" draw:layer="layout" svg:width="0.038cm" svg:height="0.557cm" svg:x="14.535cm" svg:y="9.522cm" svg:viewBox="0 0 39 558" draw:points="0,0 39,0 39,558 0,558">
          <text:p/>
        </draw:polygon>
        <draw:polygon draw:style-name="gr3" draw:text-style-name="P4" draw:layer="layout" svg:width="0.035cm" svg:height="0.557cm" svg:x="15.773cm" svg:y="9.522cm" svg:viewBox="0 0 36 558" draw:points="0,0 36,0 36,558 0,558">
          <text:p/>
        </draw:polygon>
        <draw:polygon draw:style-name="gr3" draw:text-style-name="P4" draw:layer="layout" svg:width="0.034cm" svg:height="0.557cm" svg:x="17.272cm" svg:y="9.522cm" svg:viewBox="0 0 35 558" draw:points="0,0 35,0 35,558 0,558">
          <text:p/>
        </draw:polygon>
        <draw:polygon draw:style-name="gr3" draw:text-style-name="P4" draw:layer="layout" svg:width="0.035cm" svg:height="0.557cm" svg:x="18.524cm" svg:y="9.522cm" svg:viewBox="0 0 36 558" draw:points="0,0 36,0 36,558 0,558">
          <text:p/>
        </draw:polygon>
        <draw:polygon draw:style-name="gr3" draw:text-style-name="P4" draw:layer="layout" svg:width="0.013cm" svg:height="0.557cm" svg:x="20.025cm" svg:y="9.522cm" svg:viewBox="0 0 14 558" draw:points="0,0 14,0 14,558 0,558">
          <text:p/>
        </draw:polygon>
        <draw:frame draw:style-name="gr82" draw:text-style-name="P5" draw:layer="layout" svg:width="0.614cm" svg:height="0.289cm" svg:x="16.04cm" svg:y="9.703cm">
          <draw:text-box>
            <text:p text:style-name="P2"><text:span text:style-name="T2">Träff </text:span></text:p>
          </draw:text-box>
        </draw:frame>
        <draw:frame draw:style-name="gr83" draw:text-style-name="P5" draw:layer="layout" svg:width="0.792cm" svg:height="0.289cm" svg:x="17.496cm" svg:y="9.703cm">
          <draw:text-box>
            <text:p text:style-name="P2"><text:span text:style-name="T2">Poäng </text:span></text:p>
          </draw:text-box>
        </draw:frame>
        <draw:frame draw:style-name="gr84" draw:text-style-name="P5" draw:layer="layout" svg:width="0.49cm" svg:height="0.289cm" svg:x="18.559cm" svg:y="9.703cm">
          <draw:text-box>
            <text:p text:style-name="P2"><text:span text:style-name="T2"><text:s/>Tid </text:span></text:p>
          </draw:text-box>
        </draw:frame>
        <draw:frame draw:style-name="gr85" draw:text-style-name="P5" draw:layer="layout" svg:width="0.501cm" svg:height="0.289cm" svg:x="12.45cm" svg:y="10.185cm">
          <draw:text-box>
            <text:p text:style-name="P2"><text:span text:style-name="T2">A/B </text:span></text:p>
          </draw:text-box>
        </draw:frame>
        <draw:frame draw:style-name="gr86" draw:text-style-name="P16" draw:layer="layout" svg:width="0.242cm" svg:height="0.268cm" svg:x="13.335cm" svg:y="10.12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4.571cm" svg:y="10.12cm">
          <draw:text-box>
            <text:p text:style-name="P2"><text:span text:style-name="T14"><text:s/></text:span></text:p>
          </draw:text-box>
        </draw:frame>
        <draw:polygon draw:style-name="gr3" draw:text-style-name="P4" draw:layer="layout" svg:width="0.038cm" svg:height="0.037cm" svg:x="11.923cm" svg:y="10.976cm" svg:viewBox="0 0 39 38" draw:points="0,0 39,0 39,38 0,38">
          <text:p/>
        </draw:polygon>
        <draw:polygon draw:style-name="gr3" draw:text-style-name="P4" draw:layer="layout" svg:width="1.345cm" svg:height="0.037cm" svg:x="11.958cm" svg:y="10.076cm" svg:viewBox="0 0 1346 38" draw:points="0,0 1346,0 1346,38 0,38">
          <text:p/>
        </draw:polygon>
        <draw:polygon draw:style-name="gr3" draw:text-style-name="P4" draw:layer="layout" svg:width="0.034cm" svg:height="0.037cm" svg:x="13.3cm" svg:y="10.076cm" svg:viewBox="0 0 35 38" draw:points="0,0 35,0 35,38 0,38">
          <text:p/>
        </draw:polygon>
        <draw:polygon draw:style-name="gr3" draw:text-style-name="P4" draw:layer="layout" svg:width="1.205cm" svg:height="0.037cm" svg:x="13.335cm" svg:y="10.076cm" svg:viewBox="0 0 1206 38" draw:points="0,0 1206,0 1206,38 0,38">
          <text:p/>
        </draw:polygon>
        <draw:polygon draw:style-name="gr3" draw:text-style-name="P4" draw:layer="layout" svg:width="0.038cm" svg:height="0.037cm" svg:x="14.535cm" svg:y="10.076cm" svg:viewBox="0 0 39 38" draw:points="0,0 39,0 39,38 0,38">
          <text:p/>
        </draw:polygon>
        <draw:polygon draw:style-name="gr3" draw:text-style-name="P4" draw:layer="layout" svg:width="1.203cm" svg:height="0.037cm" svg:x="14.57cm" svg:y="10.076cm" svg:viewBox="0 0 1204 38" draw:points="0,0 1204,0 1204,38 0,38">
          <text:p/>
        </draw:polygon>
        <draw:polygon draw:style-name="gr3" draw:text-style-name="P4" draw:layer="layout" svg:width="0.035cm" svg:height="0.037cm" svg:x="15.773cm" svg:y="10.076cm" svg:viewBox="0 0 36 38" draw:points="0,0 36,0 36,38 0,38">
          <text:p/>
        </draw:polygon>
        <draw:polygon draw:style-name="gr3" draw:text-style-name="P4" draw:layer="layout" svg:width="1.467cm" svg:height="0.037cm" svg:x="15.805cm" svg:y="10.076cm" svg:viewBox="0 0 1468 38" draw:points="0,0 1468,0 1468,38 0,38">
          <text:p/>
        </draw:polygon>
        <draw:polygon draw:style-name="gr3" draw:text-style-name="P4" draw:layer="layout" svg:width="0.034cm" svg:height="0.037cm" svg:x="17.272cm" svg:y="10.076cm" svg:viewBox="0 0 35 38" draw:points="0,0 35,0 35,38 0,38">
          <text:p/>
        </draw:polygon>
        <draw:polygon draw:style-name="gr3" draw:text-style-name="P4" draw:layer="layout" svg:width="1.222cm" svg:height="0.037cm" svg:x="17.303cm" svg:y="10.076cm" svg:viewBox="0 0 1223 38" draw:points="0,0 1223,0 1223,38 0,38">
          <text:p/>
        </draw:polygon>
        <draw:polygon draw:style-name="gr3" draw:text-style-name="P4" draw:layer="layout" svg:width="0.035cm" svg:height="0.037cm" svg:x="18.524cm" svg:y="10.076cm" svg:viewBox="0 0 36 38" draw:points="0,0 36,0 36,38 0,38">
          <text:p/>
        </draw:polygon>
        <draw:polygon draw:style-name="gr3" draw:text-style-name="P4" draw:layer="layout" svg:width="1.47cm" svg:height="0.037cm" svg:x="18.558cm" svg:y="10.076cm" svg:viewBox="0 0 1471 38" draw:points="0,0 1471,0 1471,38 0,38">
          <text:p/>
        </draw:polygon>
        <draw:polygon draw:style-name="gr3" draw:text-style-name="P4" draw:layer="layout" svg:width="0.013cm" svg:height="0.037cm" svg:x="20.025cm" svg:y="10.076cm" svg:viewBox="0 0 14 38" draw:points="0,0 14,0 14,38 0,38">
          <text:p/>
        </draw:polygon>
        <draw:polygon draw:style-name="gr3" draw:text-style-name="P4" draw:layer="layout" svg:width="0.038cm" svg:height="0.391cm" svg:x="11.923cm" svg:y="11.01cm" svg:viewBox="0 0 39 392" draw:points="0,0 39,0 39,392 0,392">
          <text:p/>
        </draw:polygon>
        <draw:polygon draw:style-name="gr3" draw:text-style-name="P4" draw:layer="layout" svg:width="0.034cm" svg:height="0.391cm" svg:x="13.3cm" svg:y="10.11cm" svg:viewBox="0 0 35 392" draw:points="0,0 35,0 35,392 0,392">
          <text:p/>
        </draw:polygon>
        <draw:polygon draw:style-name="gr3" draw:text-style-name="P4" draw:layer="layout" svg:width="0.038cm" svg:height="0.391cm" svg:x="14.535cm" svg:y="10.11cm" svg:viewBox="0 0 39 392" draw:points="0,0 39,0 39,392 0,392">
          <text:p/>
        </draw:polygon>
        <draw:polygon draw:style-name="gr3" draw:text-style-name="P4" draw:layer="layout" svg:width="0.035cm" svg:height="0.391cm" svg:x="15.773cm" svg:y="10.11cm" svg:viewBox="0 0 36 392" draw:points="0,0 36,0 36,392 0,392">
          <text:p/>
        </draw:polygon>
        <draw:polygon draw:style-name="gr3" draw:text-style-name="P4" draw:layer="layout" svg:width="0.034cm" svg:height="0.391cm" svg:x="17.272cm" svg:y="10.11cm" svg:viewBox="0 0 35 392" draw:points="0,0 35,0 35,392 0,392">
          <text:p/>
        </draw:polygon>
        <draw:polygon draw:style-name="gr3" draw:text-style-name="P4" draw:layer="layout" svg:width="0.035cm" svg:height="0.391cm" svg:x="18.524cm" svg:y="10.11cm" svg:viewBox="0 0 36 392" draw:points="0,0 36,0 36,392 0,392">
          <text:p/>
        </draw:polygon>
        <draw:polygon draw:style-name="gr3" draw:text-style-name="P4" draw:layer="layout" svg:width="0.013cm" svg:height="0.391cm" svg:x="20.025cm" svg:y="10.11cm" svg:viewBox="0 0 14 392" draw:points="0,0 14,0 14,392 0,392">
          <text:p/>
        </draw:polygon>
        <draw:frame draw:style-name="gr86" draw:text-style-name="P16" draw:layer="layout" svg:width="0.242cm" svg:height="0.268cm" svg:x="15.807cm" svg:y="10.12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7.306cm" svg:y="10.12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8.559cm" svg:y="10.12cm">
          <draw:text-box>
            <text:p text:style-name="P2"><text:span text:style-name="T14"><text:s/></text:span></text:p>
          </draw:text-box>
        </draw:frame>
        <draw:frame draw:style-name="gr8" draw:text-style-name="P5" draw:layer="layout" svg:width="0.285cm" svg:height="0.289cm" svg:x="12.59cm" svg:y="10.601cm">
          <draw:text-box>
            <text:p text:style-name="P2"><text:span text:style-name="T2">C </text:span></text:p>
          </draw:text-box>
        </draw:frame>
        <draw:frame draw:style-name="gr5" draw:text-style-name="P5" draw:layer="layout" svg:width="0.285cm" svg:height="0.323cm" svg:x="13.335cm" svg:y="10.52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0.52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1.4cm" svg:viewBox="0 0 39 21" draw:points="0,0 39,0 39,21 0,21">
          <text:p/>
        </draw:polygon>
        <draw:polygon draw:style-name="gr3" draw:text-style-name="P4" draw:layer="layout" svg:width="1.345cm" svg:height="0.02cm" svg:x="11.958cm" svg:y="10.5cm" svg:viewBox="0 0 1346 21" draw:points="0,0 1346,0 1346,21 0,21">
          <text:p/>
        </draw:polygon>
        <draw:polygon draw:style-name="gr3" draw:text-style-name="P4" draw:layer="layout" svg:width="0.034cm" svg:height="0.02cm" svg:x="13.3cm" svg:y="10.5cm" svg:viewBox="0 0 35 21" draw:points="0,0 35,0 35,21 0,21">
          <text:p/>
        </draw:polygon>
        <draw:polygon draw:style-name="gr3" draw:text-style-name="P4" draw:layer="layout" svg:width="1.205cm" svg:height="0.02cm" svg:x="13.335cm" svg:y="10.5cm" svg:viewBox="0 0 1206 21" draw:points="0,0 1206,0 1206,21 0,21">
          <text:p/>
        </draw:polygon>
        <draw:polygon draw:style-name="gr3" draw:text-style-name="P4" draw:layer="layout" svg:width="0.038cm" svg:height="0.02cm" svg:x="14.535cm" svg:y="10.5cm" svg:viewBox="0 0 39 21" draw:points="0,0 39,0 39,21 0,21">
          <text:p/>
        </draw:polygon>
        <draw:polygon draw:style-name="gr3" draw:text-style-name="P4" draw:layer="layout" svg:width="1.203cm" svg:height="0.02cm" svg:x="14.57cm" svg:y="10.5cm" svg:viewBox="0 0 1204 21" draw:points="0,0 1204,0 1204,21 0,21">
          <text:p/>
        </draw:polygon>
        <draw:polygon draw:style-name="gr3" draw:text-style-name="P4" draw:layer="layout" svg:width="0.035cm" svg:height="0.02cm" svg:x="15.773cm" svg:y="10.5cm" svg:viewBox="0 0 36 21" draw:points="0,0 36,0 36,21 0,21">
          <text:p/>
        </draw:polygon>
        <draw:polygon draw:style-name="gr3" draw:text-style-name="P4" draw:layer="layout" svg:width="1.467cm" svg:height="0.02cm" svg:x="15.805cm" svg:y="10.5cm" svg:viewBox="0 0 1468 21" draw:points="0,0 1468,0 1468,21 0,21">
          <text:p/>
        </draw:polygon>
        <draw:polygon draw:style-name="gr3" draw:text-style-name="P4" draw:layer="layout" svg:width="0.034cm" svg:height="0.02cm" svg:x="17.272cm" svg:y="10.5cm" svg:viewBox="0 0 35 21" draw:points="0,0 35,0 35,21 0,21">
          <text:p/>
        </draw:polygon>
        <draw:polygon draw:style-name="gr3" draw:text-style-name="P4" draw:layer="layout" svg:width="1.222cm" svg:height="0.02cm" svg:x="17.303cm" svg:y="10.5cm" svg:viewBox="0 0 1223 21" draw:points="0,0 1223,0 1223,21 0,21">
          <text:p/>
        </draw:polygon>
        <draw:polygon draw:style-name="gr3" draw:text-style-name="P4" draw:layer="layout" svg:width="0.035cm" svg:height="0.02cm" svg:x="18.524cm" svg:y="10.5cm" svg:viewBox="0 0 36 21" draw:points="0,0 36,0 36,21 0,21">
          <text:p/>
        </draw:polygon>
        <draw:polygon draw:style-name="gr3" draw:text-style-name="P4" draw:layer="layout" svg:width="1.47cm" svg:height="0.02cm" svg:x="18.558cm" svg:y="10.5cm" svg:viewBox="0 0 1471 21" draw:points="0,0 1471,0 1471,21 0,21">
          <text:p/>
        </draw:polygon>
        <draw:polygon draw:style-name="gr3" draw:text-style-name="P4" draw:layer="layout" svg:width="0.013cm" svg:height="0.02cm" svg:x="20.025cm" svg:y="10.5cm" svg:viewBox="0 0 14 21" draw:points="0,0 14,0 14,21 0,21">
          <text:p/>
        </draw:polygon>
        <draw:polygon draw:style-name="gr3" draw:text-style-name="P4" draw:layer="layout" svg:width="0.038cm" svg:height="0.401cm" svg:x="11.923cm" svg:y="11.417cm" svg:viewBox="0 0 39 402" draw:points="0,0 39,0 39,402 0,402">
          <text:p/>
        </draw:polygon>
        <draw:polygon draw:style-name="gr3" draw:text-style-name="P4" draw:layer="layout" svg:width="0.034cm" svg:height="0.401cm" svg:x="13.3cm" svg:y="10.517cm" svg:viewBox="0 0 35 402" draw:points="0,0 35,0 35,402 0,402">
          <text:p/>
        </draw:polygon>
        <draw:polygon draw:style-name="gr3" draw:text-style-name="P4" draw:layer="layout" svg:width="0.038cm" svg:height="0.401cm" svg:x="14.535cm" svg:y="10.517cm" svg:viewBox="0 0 39 402" draw:points="0,0 39,0 39,402 0,402">
          <text:p/>
        </draw:polygon>
        <draw:polygon draw:style-name="gr3" draw:text-style-name="P4" draw:layer="layout" svg:width="0.035cm" svg:height="0.401cm" svg:x="15.773cm" svg:y="10.517cm" svg:viewBox="0 0 36 402" draw:points="0,0 36,0 36,402 0,402">
          <text:p/>
        </draw:polygon>
        <draw:polygon draw:style-name="gr3" draw:text-style-name="P4" draw:layer="layout" svg:width="0.034cm" svg:height="0.401cm" svg:x="17.272cm" svg:y="10.517cm" svg:viewBox="0 0 35 402" draw:points="0,0 35,0 35,402 0,402">
          <text:p/>
        </draw:polygon>
        <draw:polygon draw:style-name="gr3" draw:text-style-name="P4" draw:layer="layout" svg:width="0.035cm" svg:height="0.401cm" svg:x="18.524cm" svg:y="10.517cm" svg:viewBox="0 0 36 402" draw:points="0,0 36,0 36,402 0,402">
          <text:p/>
        </draw:polygon>
        <draw:polygon draw:style-name="gr3" draw:text-style-name="P4" draw:layer="layout" svg:width="0.013cm" svg:height="0.401cm" svg:x="20.025cm" svg:y="10.517cm" svg:viewBox="0 0 14 402" draw:points="0,0 14,0 14,402 0,402">
          <text:p/>
        </draw:polygon>
        <draw:frame draw:style-name="gr5" draw:text-style-name="P5" draw:layer="layout" svg:width="0.285cm" svg:height="0.323cm" svg:x="15.807cm" svg:y="10.52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0.52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0.526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2.581cm" svg:y="11.017cm">
          <draw:text-box>
            <text:p text:style-name="P2"><text:span text:style-name="T2">D </text:span></text:p>
          </draw:text-box>
        </draw:frame>
        <draw:frame draw:style-name="gr5" draw:text-style-name="P5" draw:layer="layout" svg:width="0.285cm" svg:height="0.323cm" svg:x="13.335cm" svg:y="10.94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0.94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1.815cm" svg:viewBox="0 0 39 21" draw:points="0,0 39,0 39,21 0,21">
          <text:p/>
        </draw:polygon>
        <draw:polygon draw:style-name="gr3" draw:text-style-name="P4" draw:layer="layout" svg:width="1.345cm" svg:height="0.02cm" svg:x="11.958cm" svg:y="10.915cm" svg:viewBox="0 0 1346 21" draw:points="0,0 1346,0 1346,21 0,21">
          <text:p/>
        </draw:polygon>
        <draw:polygon draw:style-name="gr3" draw:text-style-name="P4" draw:layer="layout" svg:width="0.034cm" svg:height="0.02cm" svg:x="13.3cm" svg:y="10.915cm" svg:viewBox="0 0 35 21" draw:points="0,0 35,0 35,21 0,21">
          <text:p/>
        </draw:polygon>
        <draw:polygon draw:style-name="gr3" draw:text-style-name="P4" draw:layer="layout" svg:width="1.205cm" svg:height="0.02cm" svg:x="13.335cm" svg:y="10.915cm" svg:viewBox="0 0 1206 21" draw:points="0,0 1206,0 1206,21 0,21">
          <text:p/>
        </draw:polygon>
        <draw:polygon draw:style-name="gr3" draw:text-style-name="P4" draw:layer="layout" svg:width="0.038cm" svg:height="0.02cm" svg:x="14.535cm" svg:y="10.915cm" svg:viewBox="0 0 39 21" draw:points="0,0 39,0 39,21 0,21">
          <text:p/>
        </draw:polygon>
        <draw:polygon draw:style-name="gr3" draw:text-style-name="P4" draw:layer="layout" svg:width="1.203cm" svg:height="0.02cm" svg:x="14.57cm" svg:y="10.915cm" svg:viewBox="0 0 1204 21" draw:points="0,0 1204,0 1204,21 0,21">
          <text:p/>
        </draw:polygon>
        <draw:polygon draw:style-name="gr3" draw:text-style-name="P4" draw:layer="layout" svg:width="0.035cm" svg:height="0.02cm" svg:x="15.773cm" svg:y="10.915cm" svg:viewBox="0 0 36 21" draw:points="0,0 36,0 36,21 0,21">
          <text:p/>
        </draw:polygon>
        <draw:polygon draw:style-name="gr3" draw:text-style-name="P4" draw:layer="layout" svg:width="1.467cm" svg:height="0.02cm" svg:x="15.805cm" svg:y="10.915cm" svg:viewBox="0 0 1468 21" draw:points="0,0 1468,0 1468,21 0,21">
          <text:p/>
        </draw:polygon>
        <draw:polygon draw:style-name="gr3" draw:text-style-name="P4" draw:layer="layout" svg:width="0.034cm" svg:height="0.02cm" svg:x="17.272cm" svg:y="10.915cm" svg:viewBox="0 0 35 21" draw:points="0,0 35,0 35,21 0,21">
          <text:p/>
        </draw:polygon>
        <draw:polygon draw:style-name="gr3" draw:text-style-name="P4" draw:layer="layout" svg:width="1.222cm" svg:height="0.02cm" svg:x="17.303cm" svg:y="10.915cm" svg:viewBox="0 0 1223 21" draw:points="0,0 1223,0 1223,21 0,21">
          <text:p/>
        </draw:polygon>
        <draw:polygon draw:style-name="gr3" draw:text-style-name="P4" draw:layer="layout" svg:width="0.035cm" svg:height="0.02cm" svg:x="18.524cm" svg:y="10.915cm" svg:viewBox="0 0 36 21" draw:points="0,0 36,0 36,21 0,21">
          <text:p/>
        </draw:polygon>
        <draw:polygon draw:style-name="gr3" draw:text-style-name="P4" draw:layer="layout" svg:width="1.47cm" svg:height="0.02cm" svg:x="18.558cm" svg:y="10.915cm" svg:viewBox="0 0 1471 21" draw:points="0,0 1471,0 1471,21 0,21">
          <text:p/>
        </draw:polygon>
        <draw:polygon draw:style-name="gr3" draw:text-style-name="P4" draw:layer="layout" svg:width="0.013cm" svg:height="0.02cm" svg:x="20.025cm" svg:y="10.915cm" svg:viewBox="0 0 14 21" draw:points="0,0 14,0 14,21 0,21">
          <text:p/>
        </draw:polygon>
        <draw:polygon draw:style-name="gr3" draw:text-style-name="P4" draw:layer="layout" svg:width="0.038cm" svg:height="0.401cm" svg:x="11.923cm" svg:y="11.831cm" svg:viewBox="0 0 39 402" draw:points="0,0 39,0 39,402 0,402">
          <text:p/>
        </draw:polygon>
        <draw:polygon draw:style-name="gr3" draw:text-style-name="P4" draw:layer="layout" svg:width="0.034cm" svg:height="0.401cm" svg:x="13.3cm" svg:y="10.931cm" svg:viewBox="0 0 35 402" draw:points="0,0 35,0 35,402 0,402">
          <text:p/>
        </draw:polygon>
        <draw:polygon draw:style-name="gr3" draw:text-style-name="P4" draw:layer="layout" svg:width="0.038cm" svg:height="0.401cm" svg:x="14.535cm" svg:y="10.931cm" svg:viewBox="0 0 39 402" draw:points="0,0 39,0 39,402 0,402">
          <text:p/>
        </draw:polygon>
        <draw:polygon draw:style-name="gr3" draw:text-style-name="P4" draw:layer="layout" svg:width="0.035cm" svg:height="0.401cm" svg:x="15.773cm" svg:y="10.931cm" svg:viewBox="0 0 36 402" draw:points="0,0 36,0 36,402 0,402">
          <text:p/>
        </draw:polygon>
        <draw:polygon draw:style-name="gr3" draw:text-style-name="P4" draw:layer="layout" svg:width="0.034cm" svg:height="0.401cm" svg:x="17.272cm" svg:y="10.931cm" svg:viewBox="0 0 35 402" draw:points="0,0 35,0 35,402 0,402">
          <text:p/>
        </draw:polygon>
        <draw:polygon draw:style-name="gr3" draw:text-style-name="P4" draw:layer="layout" svg:width="0.035cm" svg:height="0.401cm" svg:x="18.524cm" svg:y="10.931cm" svg:viewBox="0 0 36 402" draw:points="0,0 36,0 36,402 0,402">
          <text:p/>
        </draw:polygon>
        <draw:polygon draw:style-name="gr3" draw:text-style-name="P4" draw:layer="layout" svg:width="0.013cm" svg:height="0.401cm" svg:x="20.025cm" svg:y="10.931cm" svg:viewBox="0 0 14 402" draw:points="0,0 14,0 14,402 0,402">
          <text:p/>
        </draw:polygon>
        <draw:frame draw:style-name="gr5" draw:text-style-name="P5" draw:layer="layout" svg:width="0.285cm" svg:height="0.323cm" svg:x="15.807cm" svg:y="10.94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0.94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0.941cm">
          <draw:text-box>
            <text:p text:style-name="P2"><text:span text:style-name="T3"><text:s/></text:span></text:p>
          </draw:text-box>
        </draw:frame>
        <draw:frame draw:style-name="gr89" draw:text-style-name="P5" draw:layer="layout" svg:width="0.899cm" svg:height="0.289cm" svg:x="12.006cm" svg:y="11.432cm">
          <draw:text-box>
            <text:p text:style-name="P2"><text:span text:style-name="T2"><text:s text:c="9"/>M </text:span></text:p>
          </draw:text-box>
        </draw:frame>
        <draw:frame draw:style-name="gr5" draw:text-style-name="P5" draw:layer="layout" svg:width="0.285cm" svg:height="0.323cm" svg:x="13.335cm" svg:y="11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1.35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2.229cm" svg:viewBox="0 0 39 21" draw:points="0,0 39,0 39,21 0,21">
          <text:p/>
        </draw:polygon>
        <draw:polygon draw:style-name="gr3" draw:text-style-name="P4" draw:layer="layout" svg:width="1.345cm" svg:height="0.02cm" svg:x="11.958cm" svg:y="11.329cm" svg:viewBox="0 0 1346 21" draw:points="0,0 1346,0 1346,21 0,21">
          <text:p/>
        </draw:polygon>
        <draw:polygon draw:style-name="gr3" draw:text-style-name="P4" draw:layer="layout" svg:width="0.034cm" svg:height="0.02cm" svg:x="13.3cm" svg:y="11.329cm" svg:viewBox="0 0 35 21" draw:points="0,0 35,0 35,21 0,21">
          <text:p/>
        </draw:polygon>
        <draw:polygon draw:style-name="gr3" draw:text-style-name="P4" draw:layer="layout" svg:width="1.205cm" svg:height="0.02cm" svg:x="13.335cm" svg:y="11.329cm" svg:viewBox="0 0 1206 21" draw:points="0,0 1206,0 1206,21 0,21">
          <text:p/>
        </draw:polygon>
        <draw:polygon draw:style-name="gr3" draw:text-style-name="P4" draw:layer="layout" svg:width="0.038cm" svg:height="0.02cm" svg:x="14.535cm" svg:y="11.329cm" svg:viewBox="0 0 39 21" draw:points="0,0 39,0 39,21 0,21">
          <text:p/>
        </draw:polygon>
        <draw:polygon draw:style-name="gr3" draw:text-style-name="P4" draw:layer="layout" svg:width="1.203cm" svg:height="0.02cm" svg:x="14.57cm" svg:y="11.329cm" svg:viewBox="0 0 1204 21" draw:points="0,0 1204,0 1204,21 0,21">
          <text:p/>
        </draw:polygon>
        <draw:polygon draw:style-name="gr3" draw:text-style-name="P4" draw:layer="layout" svg:width="0.035cm" svg:height="0.02cm" svg:x="15.773cm" svg:y="11.329cm" svg:viewBox="0 0 36 21" draw:points="0,0 36,0 36,21 0,21">
          <text:p/>
        </draw:polygon>
        <draw:polygon draw:style-name="gr3" draw:text-style-name="P4" draw:layer="layout" svg:width="1.467cm" svg:height="0.02cm" svg:x="15.805cm" svg:y="11.329cm" svg:viewBox="0 0 1468 21" draw:points="0,0 1468,0 1468,21 0,21">
          <text:p/>
        </draw:polygon>
        <draw:polygon draw:style-name="gr3" draw:text-style-name="P4" draw:layer="layout" svg:width="0.034cm" svg:height="0.02cm" svg:x="17.272cm" svg:y="11.329cm" svg:viewBox="0 0 35 21" draw:points="0,0 35,0 35,21 0,21">
          <text:p/>
        </draw:polygon>
        <draw:polygon draw:style-name="gr3" draw:text-style-name="P4" draw:layer="layout" svg:width="1.222cm" svg:height="0.02cm" svg:x="17.303cm" svg:y="11.329cm" svg:viewBox="0 0 1223 21" draw:points="0,0 1223,0 1223,21 0,21">
          <text:p/>
        </draw:polygon>
        <draw:polygon draw:style-name="gr3" draw:text-style-name="P4" draw:layer="layout" svg:width="0.035cm" svg:height="0.02cm" svg:x="18.524cm" svg:y="11.329cm" svg:viewBox="0 0 36 21" draw:points="0,0 36,0 36,21 0,21">
          <text:p/>
        </draw:polygon>
        <draw:polygon draw:style-name="gr3" draw:text-style-name="P4" draw:layer="layout" svg:width="1.47cm" svg:height="0.02cm" svg:x="18.558cm" svg:y="11.329cm" svg:viewBox="0 0 1471 21" draw:points="0,0 1471,0 1471,21 0,21">
          <text:p/>
        </draw:polygon>
        <draw:polygon draw:style-name="gr3" draw:text-style-name="P4" draw:layer="layout" svg:width="0.013cm" svg:height="0.02cm" svg:x="20.025cm" svg:y="11.329cm" svg:viewBox="0 0 14 21" draw:points="0,0 14,0 14,21 0,21">
          <text:p/>
        </draw:polygon>
        <draw:polygon draw:style-name="gr3" draw:text-style-name="P4" draw:layer="layout" svg:width="0.038cm" svg:height="0.399cm" svg:x="11.923cm" svg:y="12.246cm" svg:viewBox="0 0 39 400" draw:points="0,0 39,0 39,400 0,400">
          <text:p/>
        </draw:polygon>
        <draw:polygon draw:style-name="gr3" draw:text-style-name="P4" draw:layer="layout" svg:width="0.034cm" svg:height="0.399cm" svg:x="13.3cm" svg:y="11.346cm" svg:viewBox="0 0 35 400" draw:points="0,0 35,0 35,400 0,400">
          <text:p/>
        </draw:polygon>
        <draw:polygon draw:style-name="gr3" draw:text-style-name="P4" draw:layer="layout" svg:width="0.038cm" svg:height="0.399cm" svg:x="14.535cm" svg:y="11.346cm" svg:viewBox="0 0 39 400" draw:points="0,0 39,0 39,400 0,400">
          <text:p/>
        </draw:polygon>
        <draw:polygon draw:style-name="gr3" draw:text-style-name="P4" draw:layer="layout" svg:width="0.035cm" svg:height="0.399cm" svg:x="15.773cm" svg:y="11.346cm" svg:viewBox="0 0 36 400" draw:points="0,0 36,0 36,400 0,400">
          <text:p/>
        </draw:polygon>
        <draw:polygon draw:style-name="gr3" draw:text-style-name="P4" draw:layer="layout" svg:width="0.034cm" svg:height="0.399cm" svg:x="17.272cm" svg:y="11.346cm" svg:viewBox="0 0 35 400" draw:points="0,0 35,0 35,400 0,400">
          <text:p/>
        </draw:polygon>
        <draw:polygon draw:style-name="gr3" draw:text-style-name="P4" draw:layer="layout" svg:width="0.035cm" svg:height="0.399cm" svg:x="18.524cm" svg:y="11.346cm" svg:viewBox="0 0 36 400" draw:points="0,0 36,0 36,400 0,400">
          <text:p/>
        </draw:polygon>
        <draw:polygon draw:style-name="gr3" draw:text-style-name="P4" draw:layer="layout" svg:width="0.013cm" svg:height="0.399cm" svg:x="20.025cm" svg:y="11.346cm" svg:viewBox="0 0 14 400" draw:points="0,0 14,0 14,400 0,400">
          <text:p/>
        </draw:polygon>
        <draw:frame draw:style-name="gr5" draw:text-style-name="P5" draw:layer="layout" svg:width="0.285cm" svg:height="0.323cm" svg:x="15.807cm" svg:y="11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1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1.351cm">
          <draw:text-box>
            <text:p text:style-name="P2"><text:span text:style-name="T3"><text:s/></text:span></text:p>
          </draw:text-box>
        </draw:frame>
        <draw:frame draw:style-name="gr88" draw:text-style-name="P5" draw:layer="layout" svg:width="0.702cm" svg:height="0.289cm" svg:x="12.349cm" svg:y="11.854cm">
          <draw:text-box>
            <text:p text:style-name="P2"><text:span text:style-name="T2">Straff </text:span></text:p>
          </draw:text-box>
        </draw:frame>
        <draw:frame draw:style-name="gr5" draw:text-style-name="P5" draw:layer="layout" svg:width="0.285cm" svg:height="0.323cm" svg:x="13.335cm" svg:y="11.7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1.76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9cm" svg:x="11.923cm" svg:y="12.645cm" svg:viewBox="0 0 39 20" draw:points="0,0 39,0 39,20 0,20">
          <text:p/>
        </draw:polygon>
        <draw:polygon draw:style-name="gr3" draw:text-style-name="P4" draw:layer="layout" svg:width="1.345cm" svg:height="0.019cm" svg:x="11.958cm" svg:y="11.745cm" svg:viewBox="0 0 1346 20" draw:points="0,0 1346,0 1346,20 0,20">
          <text:p/>
        </draw:polygon>
        <draw:polygon draw:style-name="gr3" draw:text-style-name="P4" draw:layer="layout" svg:width="0.034cm" svg:height="0.019cm" svg:x="13.3cm" svg:y="11.745cm" svg:viewBox="0 0 35 20" draw:points="0,0 35,0 35,20 0,20">
          <text:p/>
        </draw:polygon>
        <draw:polygon draw:style-name="gr3" draw:text-style-name="P4" draw:layer="layout" svg:width="1.205cm" svg:height="0.019cm" svg:x="13.335cm" svg:y="11.745cm" svg:viewBox="0 0 1206 20" draw:points="0,0 1206,0 1206,20 0,20">
          <text:p/>
        </draw:polygon>
        <draw:polygon draw:style-name="gr3" draw:text-style-name="P4" draw:layer="layout" svg:width="0.038cm" svg:height="0.019cm" svg:x="14.535cm" svg:y="11.745cm" svg:viewBox="0 0 39 20" draw:points="0,0 39,0 39,20 0,20">
          <text:p/>
        </draw:polygon>
        <draw:polygon draw:style-name="gr3" draw:text-style-name="P4" draw:layer="layout" svg:width="1.203cm" svg:height="0.019cm" svg:x="14.57cm" svg:y="11.745cm" svg:viewBox="0 0 1204 20" draw:points="0,0 1204,0 1204,20 0,20">
          <text:p/>
        </draw:polygon>
        <draw:polygon draw:style-name="gr3" draw:text-style-name="P4" draw:layer="layout" svg:width="0.035cm" svg:height="0.019cm" svg:x="15.773cm" svg:y="11.745cm" svg:viewBox="0 0 36 20" draw:points="0,0 36,0 36,20 0,20">
          <text:p/>
        </draw:polygon>
        <draw:polygon draw:style-name="gr3" draw:text-style-name="P4" draw:layer="layout" svg:width="1.467cm" svg:height="0.019cm" svg:x="15.805cm" svg:y="11.745cm" svg:viewBox="0 0 1468 20" draw:points="0,0 1468,0 1468,20 0,20">
          <text:p/>
        </draw:polygon>
        <draw:polygon draw:style-name="gr3" draw:text-style-name="P4" draw:layer="layout" svg:width="0.034cm" svg:height="0.019cm" svg:x="17.272cm" svg:y="11.745cm" svg:viewBox="0 0 35 20" draw:points="0,0 35,0 35,20 0,20">
          <text:p/>
        </draw:polygon>
        <draw:polygon draw:style-name="gr3" draw:text-style-name="P4" draw:layer="layout" svg:width="1.222cm" svg:height="0.019cm" svg:x="17.303cm" svg:y="11.745cm" svg:viewBox="0 0 1223 20" draw:points="0,0 1223,0 1223,20 0,20">
          <text:p/>
        </draw:polygon>
        <draw:polygon draw:style-name="gr3" draw:text-style-name="P4" draw:layer="layout" svg:width="0.035cm" svg:height="0.019cm" svg:x="18.524cm" svg:y="11.745cm" svg:viewBox="0 0 36 20" draw:points="0,0 36,0 36,20 0,20">
          <text:p/>
        </draw:polygon>
        <draw:polygon draw:style-name="gr3" draw:text-style-name="P4" draw:layer="layout" svg:width="1.47cm" svg:height="0.019cm" svg:x="18.558cm" svg:y="11.745cm" svg:viewBox="0 0 1471 20" draw:points="0,0 1471,0 1471,20 0,20">
          <text:p/>
        </draw:polygon>
        <draw:polygon draw:style-name="gr3" draw:text-style-name="P4" draw:layer="layout" svg:width="0.013cm" svg:height="0.019cm" svg:x="20.025cm" svg:y="11.745cm" svg:viewBox="0 0 14 20" draw:points="0,0 14,0 14,20 0,20">
          <text:p/>
        </draw:polygon>
        <draw:polygon draw:style-name="gr3" draw:text-style-name="P4" draw:layer="layout" svg:width="0.038cm" svg:height="0.405cm" svg:x="11.923cm" svg:y="12.661cm" svg:viewBox="0 0 39 406" draw:points="0,0 39,0 39,406 0,406">
          <text:p/>
        </draw:polygon>
        <draw:polygon draw:style-name="gr3" draw:text-style-name="P4" draw:layer="layout" svg:width="0.034cm" svg:height="0.405cm" svg:x="13.3cm" svg:y="11.761cm" svg:viewBox="0 0 35 406" draw:points="0,0 35,0 35,406 0,406">
          <text:p/>
        </draw:polygon>
        <draw:polygon draw:style-name="gr3" draw:text-style-name="P4" draw:layer="layout" svg:width="0.038cm" svg:height="0.405cm" svg:x="14.535cm" svg:y="11.761cm" svg:viewBox="0 0 39 406" draw:points="0,0 39,0 39,406 0,406">
          <text:p/>
        </draw:polygon>
        <draw:polygon draw:style-name="gr3" draw:text-style-name="P4" draw:layer="layout" svg:width="0.035cm" svg:height="0.405cm" svg:x="15.773cm" svg:y="11.761cm" svg:viewBox="0 0 36 406" draw:points="0,0 36,0 36,406 0,406">
          <text:p/>
        </draw:polygon>
        <draw:polygon draw:style-name="gr3" draw:text-style-name="P4" draw:layer="layout" svg:width="0.034cm" svg:height="0.405cm" svg:x="17.272cm" svg:y="11.761cm" svg:viewBox="0 0 35 406" draw:points="0,0 35,0 35,406 0,406">
          <text:p/>
        </draw:polygon>
        <draw:polygon draw:style-name="gr3" draw:text-style-name="P4" draw:layer="layout" svg:width="0.035cm" svg:height="0.405cm" svg:x="18.524cm" svg:y="11.761cm" svg:viewBox="0 0 36 406" draw:points="0,0 36,0 36,406 0,406">
          <text:p/>
        </draw:polygon>
        <draw:polygon draw:style-name="gr3" draw:text-style-name="P4" draw:layer="layout" svg:width="0.013cm" svg:height="0.405cm" svg:x="20.025cm" svg:y="11.761cm" svg:viewBox="0 0 14 406" draw:points="0,0 14,0 14,406 0,406">
          <text:p/>
        </draw:polygon>
        <draw:frame draw:style-name="gr5" draw:text-style-name="P5" draw:layer="layout" svg:width="0.285cm" svg:height="0.323cm" svg:x="15.807cm" svg:y="11.7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1.7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1.76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37cm" svg:x="11.923cm" svg:y="13.063cm" svg:viewBox="0 0 39 38" draw:points="0,0 39,0 39,38 0,38">
          <text:p/>
        </draw:polygon>
        <draw:polygon draw:style-name="gr3" draw:text-style-name="P4" draw:layer="layout" svg:width="0.038cm" svg:height="0.037cm" svg:x="11.923cm" svg:y="13.063cm" svg:viewBox="0 0 39 38" draw:points="0,0 39,0 39,38 0,38">
          <text:p/>
        </draw:polygon>
        <draw:polygon draw:style-name="gr3" draw:text-style-name="P4" draw:layer="layout" svg:width="0.034cm" svg:height="0.037cm" svg:x="11.958cm" svg:y="13.063cm" svg:viewBox="0 0 35 38" draw:points="0,0 35,0 35,38 0,38">
          <text:p/>
        </draw:polygon>
        <draw:polygon draw:style-name="gr3" draw:text-style-name="P4" draw:layer="layout" svg:width="1.311cm" svg:height="0.037cm" svg:x="11.992cm" svg:y="12.163cm" svg:viewBox="0 0 1312 38" draw:points="0,0 1312,0 1312,38 0,38">
          <text:p/>
        </draw:polygon>
        <draw:polygon draw:style-name="gr3" draw:text-style-name="P4" draw:layer="layout" svg:width="0.034cm" svg:height="0.037cm" svg:x="13.3cm" svg:y="12.163cm" svg:viewBox="0 0 35 38" draw:points="0,0 35,0 35,38 0,38">
          <text:p/>
        </draw:polygon>
        <draw:polygon draw:style-name="gr3" draw:text-style-name="P4" draw:layer="layout" svg:width="1.205cm" svg:height="0.037cm" svg:x="13.335cm" svg:y="12.163cm" svg:viewBox="0 0 1206 38" draw:points="0,0 1206,0 1206,38 0,38">
          <text:p/>
        </draw:polygon>
        <draw:polygon draw:style-name="gr3" draw:text-style-name="P4" draw:layer="layout" svg:width="0.038cm" svg:height="0.037cm" svg:x="14.535cm" svg:y="12.163cm" svg:viewBox="0 0 39 38" draw:points="0,0 39,0 39,38 0,38">
          <text:p/>
        </draw:polygon>
        <draw:polygon draw:style-name="gr3" draw:text-style-name="P4" draw:layer="layout" svg:width="1.203cm" svg:height="0.037cm" svg:x="14.57cm" svg:y="12.163cm" svg:viewBox="0 0 1204 38" draw:points="0,0 1204,0 1204,38 0,38">
          <text:p/>
        </draw:polygon>
        <draw:polygon draw:style-name="gr3" draw:text-style-name="P4" draw:layer="layout" svg:width="0.035cm" svg:height="0.037cm" svg:x="15.773cm" svg:y="12.163cm" svg:viewBox="0 0 36 38" draw:points="0,0 36,0 36,38 0,38">
          <text:p/>
        </draw:polygon>
        <draw:polygon draw:style-name="gr3" draw:text-style-name="P4" draw:layer="layout" svg:width="1.467cm" svg:height="0.037cm" svg:x="15.805cm" svg:y="12.163cm" svg:viewBox="0 0 1468 38" draw:points="0,0 1468,0 1468,38 0,38">
          <text:p/>
        </draw:polygon>
        <draw:polygon draw:style-name="gr3" draw:text-style-name="P4" draw:layer="layout" svg:width="0.034cm" svg:height="0.037cm" svg:x="17.272cm" svg:y="12.163cm" svg:viewBox="0 0 35 38" draw:points="0,0 35,0 35,38 0,38">
          <text:p/>
        </draw:polygon>
        <draw:polygon draw:style-name="gr3" draw:text-style-name="P4" draw:layer="layout" svg:width="1.222cm" svg:height="0.037cm" svg:x="17.303cm" svg:y="12.163cm" svg:viewBox="0 0 1223 38" draw:points="0,0 1223,0 1223,38 0,38">
          <text:p/>
        </draw:polygon>
        <draw:polygon draw:style-name="gr3" draw:text-style-name="P4" draw:layer="layout" svg:width="0.035cm" svg:height="0.037cm" svg:x="18.524cm" svg:y="12.163cm" svg:viewBox="0 0 36 38" draw:points="0,0 36,0 36,38 0,38">
          <text:p/>
        </draw:polygon>
        <draw:polygon draw:style-name="gr3" draw:text-style-name="P4" draw:layer="layout" svg:width="1.47cm" svg:height="0.037cm" svg:x="18.558cm" svg:y="12.163cm" svg:viewBox="0 0 1471 38" draw:points="0,0 1471,0 1471,38 0,38">
          <text:p/>
        </draw:polygon>
        <draw:polygon draw:style-name="gr3" draw:text-style-name="P4" draw:layer="layout" svg:width="0.013cm" svg:height="0.037cm" svg:x="20.025cm" svg:y="12.163cm" svg:viewBox="0 0 14 38" draw:points="0,0 14,0 14,38 0,38">
          <text:p/>
        </draw:polygon>
        <draw:polygon draw:style-name="gr3" draw:text-style-name="P4" draw:layer="layout" svg:width="0.034cm" svg:height="0.401cm" svg:x="17.272cm" svg:y="12.197cm" svg:viewBox="0 0 35 402" draw:points="0,0 35,0 35,402 0,402">
          <text:p/>
        </draw:polygon>
        <draw:polygon draw:style-name="gr3" draw:text-style-name="P4" draw:layer="layout" svg:width="0.034cm" svg:height="0.02cm" svg:x="17.272cm" svg:y="13.294cm" svg:viewBox="0 0 35 21" draw:points="0,0 35,0 35,21 0,21">
          <text:p/>
        </draw:polygon>
        <draw:polygon draw:style-name="gr3" draw:text-style-name="P4" draw:layer="layout" svg:width="0.034cm" svg:height="0.02cm" svg:x="17.272cm" svg:y="13.294cm" svg:viewBox="0 0 35 21" draw:points="0,0 35,0 35,21 0,21">
          <text:p/>
        </draw:polygon>
        <draw:polygon draw:style-name="gr3" draw:text-style-name="P4" draw:layer="layout" svg:width="2.768cm" svg:height="0.02cm" svg:x="17.272cm" svg:y="12.598cm" svg:viewBox="0 0 2769 21" draw:points="0,0 2769,0 2769,21 0,21">
          <text:p/>
        </draw:polygon>
        <draw:polygon draw:style-name="gr3" draw:text-style-name="P4" draw:layer="layout" svg:width="0.035cm" svg:height="0.401cm" svg:x="18.524cm" svg:y="12.197cm" svg:viewBox="0 0 36 402" draw:points="0,0 36,0 36,402 0,402">
          <text:p/>
        </draw:polygon>
        <draw:polygon draw:style-name="gr3" draw:text-style-name="P4" draw:layer="layout" svg:width="0.035cm" svg:height="0.02cm" svg:x="18.524cm" svg:y="13.294cm" svg:viewBox="0 0 36 21" draw:points="0,0 36,0 36,21 0,21">
          <text:p/>
        </draw:polygon>
        <draw:polygon draw:style-name="gr3" draw:text-style-name="P4" draw:layer="layout" svg:width="0.013cm" svg:height="0.401cm" svg:x="20.025cm" svg:y="12.197cm" svg:viewBox="0 0 14 402" draw:points="0,0 14,0 14,402 0,402">
          <text:p/>
        </draw:polygon>
        <draw:polygon draw:style-name="gr3" draw:text-style-name="P4" draw:layer="layout" svg:width="0.013cm" svg:height="0.02cm" svg:x="20.025cm" svg:y="13.294cm" svg:viewBox="0 0 14 21" draw:points="0,0 14,0 14,21 0,21">
          <text:p/>
        </draw:polygon>
        <draw:polygon draw:style-name="gr3" draw:text-style-name="P4" draw:layer="layout" svg:width="0.013cm" svg:height="0.02cm" svg:x="20.025cm" svg:y="13.294cm" svg:viewBox="0 0 14 21" draw:points="0,0 14,0 14,21 0,21">
          <text:p/>
        </draw:polygon>
        <draw:frame draw:style-name="gr5" draw:text-style-name="P5" draw:layer="layout" svg:width="0.285cm" svg:height="0.323cm" svg:x="11.946cm" svg:y="12.90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2.206cm">
          <draw:text-box>
            <text:p text:style-name="P2"><text:span text:style-name="T3"><text:s/></text:span></text:p>
          </draw:text-box>
        </draw:frame>
        <draw:frame draw:style-name="gr70" draw:text-style-name="P13" draw:layer="layout" svg:width="0.391cm" svg:height="0.395cm" svg:x="11.908cm" svg:y="13.407cm">
          <draw:text-box>
            <text:p text:style-name="P2"><text:span text:style-name="T10"><text:s/></text:span></text:p>
          </draw:text-box>
        </draw:frame>
        <draw:frame draw:style-name="gr80" draw:text-style-name="P5" draw:layer="layout" svg:width="0.84cm" svg:height="0.289cm" svg:x="12.192cm" svg:y="13.316cm">
          <draw:text-box>
            <text:p text:style-name="P2"><text:span text:style-name="T4">Övn. 4 </text:span></text:p>
          </draw:text-box>
        </draw:frame>
        <draw:frame draw:style-name="gr81" draw:text-style-name="P5" draw:layer="layout" svg:width="0.353cm" svg:height="0.289cm" svg:x="13.83cm" svg:y="13.316cm">
          <draw:text-box>
            <text:p text:style-name="P2"><text:span text:style-name="T2">T1 </text:span></text:p>
          </draw:text-box>
        </draw:frame>
        <draw:frame draw:style-name="gr81" draw:text-style-name="P5" draw:layer="layout" svg:width="0.353cm" svg:height="0.289cm" svg:x="15.066cm" svg:y="13.316cm">
          <draw:text-box>
            <text:p text:style-name="P2"><text:span text:style-name="T2">T2 </text:span></text:p>
          </draw:text-box>
        </draw:frame>
        <draw:polygon draw:style-name="gr3" draw:text-style-name="P4" draw:layer="layout" svg:width="0.038cm" svg:height="0.035cm" svg:x="11.923cm" svg:y="13.997cm" svg:viewBox="0 0 39 36" draw:points="0,0 39,0 39,36 0,36">
          <text:p/>
        </draw:polygon>
        <draw:polygon draw:style-name="gr3" draw:text-style-name="P4" draw:layer="layout" svg:width="0.038cm" svg:height="0.035cm" svg:x="11.923cm" svg:y="13.997cm" svg:viewBox="0 0 39 36" draw:points="0,0 39,0 39,36 0,36">
          <text:p/>
        </draw:polygon>
        <draw:polygon draw:style-name="gr3" draw:text-style-name="P4" draw:layer="layout" svg:width="1.345cm" svg:height="0.035cm" svg:x="11.958cm" svg:y="13.097cm" svg:viewBox="0 0 1346 36" draw:points="0,0 1346,0 1346,36 0,36">
          <text:p/>
        </draw:polygon>
        <draw:polygon draw:style-name="gr3" draw:text-style-name="P4" draw:layer="layout" svg:width="0.034cm" svg:height="0.035cm" svg:x="13.3cm" svg:y="13.097cm" svg:viewBox="0 0 35 36" draw:points="0,0 35,0 35,36 0,36">
          <text:p/>
        </draw:polygon>
        <draw:polygon draw:style-name="gr3" draw:text-style-name="P4" draw:layer="layout" svg:width="1.205cm" svg:height="0.035cm" svg:x="13.335cm" svg:y="13.097cm" svg:viewBox="0 0 1206 36" draw:points="0,0 1206,0 1206,36 0,36">
          <text:p/>
        </draw:polygon>
        <draw:polygon draw:style-name="gr3" draw:text-style-name="P4" draw:layer="layout" svg:width="0.038cm" svg:height="0.035cm" svg:x="14.535cm" svg:y="13.097cm" svg:viewBox="0 0 39 36" draw:points="0,0 39,0 39,36 0,36">
          <text:p/>
        </draw:polygon>
        <draw:polygon draw:style-name="gr3" draw:text-style-name="P4" draw:layer="layout" svg:width="1.203cm" svg:height="0.035cm" svg:x="14.57cm" svg:y="13.097cm" svg:viewBox="0 0 1204 36" draw:points="0,0 1204,0 1204,36 0,36">
          <text:p/>
        </draw:polygon>
        <draw:polygon draw:style-name="gr3" draw:text-style-name="P4" draw:layer="layout" svg:width="0.035cm" svg:height="0.035cm" svg:x="15.773cm" svg:y="13.097cm" svg:viewBox="0 0 36 36" draw:points="0,0 36,0 36,36 0,36">
          <text:p/>
        </draw:polygon>
        <draw:polygon draw:style-name="gr3" draw:text-style-name="P4" draw:layer="layout" svg:width="1.467cm" svg:height="0.035cm" svg:x="15.805cm" svg:y="13.097cm" svg:viewBox="0 0 1468 36" draw:points="0,0 1468,0 1468,36 0,36">
          <text:p/>
        </draw:polygon>
        <draw:polygon draw:style-name="gr3" draw:text-style-name="P4" draw:layer="layout" svg:width="0.034cm" svg:height="0.035cm" svg:x="17.272cm" svg:y="13.097cm" svg:viewBox="0 0 35 36" draw:points="0,0 35,0 35,36 0,36">
          <text:p/>
        </draw:polygon>
        <draw:polygon draw:style-name="gr3" draw:text-style-name="P4" draw:layer="layout" svg:width="1.222cm" svg:height="0.035cm" svg:x="17.303cm" svg:y="13.097cm" svg:viewBox="0 0 1223 36" draw:points="0,0 1223,0 1223,36 0,36">
          <text:p/>
        </draw:polygon>
        <draw:polygon draw:style-name="gr3" draw:text-style-name="P4" draw:layer="layout" svg:width="0.035cm" svg:height="0.035cm" svg:x="18.524cm" svg:y="13.097cm" svg:viewBox="0 0 36 36" draw:points="0,0 36,0 36,36 0,36">
          <text:p/>
        </draw:polygon>
        <draw:polygon draw:style-name="gr3" draw:text-style-name="P4" draw:layer="layout" svg:width="1.47cm" svg:height="0.035cm" svg:x="18.558cm" svg:y="13.097cm" svg:viewBox="0 0 1471 36" draw:points="0,0 1471,0 1471,36 0,36">
          <text:p/>
        </draw:polygon>
        <draw:polygon draw:style-name="gr3" draw:text-style-name="P4" draw:layer="layout" svg:width="0.013cm" svg:height="0.035cm" svg:x="20.025cm" svg:y="13.097cm" svg:viewBox="0 0 14 36" draw:points="0,0 14,0 14,36 0,36">
          <text:p/>
        </draw:polygon>
        <draw:polygon draw:style-name="gr3" draw:text-style-name="P4" draw:layer="layout" svg:width="0.013cm" svg:height="0.035cm" svg:x="20.025cm" svg:y="13.097cm" svg:viewBox="0 0 14 36" draw:points="0,0 14,0 14,36 0,36">
          <text:p/>
        </draw:polygon>
        <draw:polygon draw:style-name="gr3" draw:text-style-name="P4" draw:layer="layout" svg:width="0.038cm" svg:height="0.557cm" svg:x="11.923cm" svg:y="13.13cm" svg:viewBox="0 0 39 558" draw:points="0,0 39,0 39,558 0,558">
          <text:p/>
        </draw:polygon>
        <draw:polygon draw:style-name="gr3" draw:text-style-name="P4" draw:layer="layout" svg:width="0.034cm" svg:height="0.557cm" svg:x="13.3cm" svg:y="13.13cm" svg:viewBox="0 0 35 558" draw:points="0,0 35,0 35,558 0,558">
          <text:p/>
        </draw:polygon>
        <draw:polygon draw:style-name="gr3" draw:text-style-name="P4" draw:layer="layout" svg:width="0.038cm" svg:height="0.557cm" svg:x="14.535cm" svg:y="13.13cm" svg:viewBox="0 0 39 558" draw:points="0,0 39,0 39,558 0,558">
          <text:p/>
        </draw:polygon>
        <draw:polygon draw:style-name="gr3" draw:text-style-name="P4" draw:layer="layout" svg:width="0.035cm" svg:height="0.557cm" svg:x="15.773cm" svg:y="13.13cm" svg:viewBox="0 0 36 558" draw:points="0,0 36,0 36,558 0,558">
          <text:p/>
        </draw:polygon>
        <draw:polygon draw:style-name="gr3" draw:text-style-name="P4" draw:layer="layout" svg:width="0.034cm" svg:height="0.557cm" svg:x="17.272cm" svg:y="13.13cm" svg:viewBox="0 0 35 558" draw:points="0,0 35,0 35,558 0,558">
          <text:p/>
        </draw:polygon>
        <draw:polygon draw:style-name="gr3" draw:text-style-name="P4" draw:layer="layout" svg:width="0.035cm" svg:height="0.557cm" svg:x="18.524cm" svg:y="13.13cm" svg:viewBox="0 0 36 558" draw:points="0,0 36,0 36,558 0,558">
          <text:p/>
        </draw:polygon>
        <draw:polygon draw:style-name="gr3" draw:text-style-name="P4" draw:layer="layout" svg:width="0.013cm" svg:height="0.557cm" svg:x="20.025cm" svg:y="13.13cm" svg:viewBox="0 0 14 558" draw:points="0,0 14,0 14,558 0,558">
          <text:p/>
        </draw:polygon>
        <draw:frame draw:style-name="gr82" draw:text-style-name="P5" draw:layer="layout" svg:width="0.614cm" svg:height="0.289cm" svg:x="16.04cm" svg:y="13.313cm">
          <draw:text-box>
            <text:p text:style-name="P2"><text:span text:style-name="T2">Träff </text:span></text:p>
          </draw:text-box>
        </draw:frame>
        <draw:frame draw:style-name="gr83" draw:text-style-name="P5" draw:layer="layout" svg:width="0.792cm" svg:height="0.289cm" svg:x="17.496cm" svg:y="13.313cm">
          <draw:text-box>
            <text:p text:style-name="P2"><text:span text:style-name="T2">Poäng </text:span></text:p>
          </draw:text-box>
        </draw:frame>
        <draw:frame draw:style-name="gr84" draw:text-style-name="P5" draw:layer="layout" svg:width="0.49cm" svg:height="0.289cm" svg:x="18.559cm" svg:y="13.313cm">
          <draw:text-box>
            <text:p text:style-name="P2"><text:span text:style-name="T2"><text:s/>Tid </text:span></text:p>
          </draw:text-box>
        </draw:frame>
        <draw:frame draw:style-name="gr85" draw:text-style-name="P5" draw:layer="layout" svg:width="0.501cm" svg:height="0.289cm" svg:x="12.45cm" svg:y="13.804cm">
          <draw:text-box>
            <text:p text:style-name="P2"><text:span text:style-name="T2">A/B </text:span></text:p>
          </draw:text-box>
        </draw:frame>
        <draw:frame draw:style-name="gr86" draw:text-style-name="P16" draw:layer="layout" svg:width="0.242cm" svg:height="0.268cm" svg:x="13.335cm" svg:y="13.733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4.571cm" svg:y="13.733cm">
          <draw:text-box>
            <text:p text:style-name="P2"><text:span text:style-name="T14"><text:s/></text:span></text:p>
          </draw:text-box>
        </draw:frame>
        <draw:polygon draw:style-name="gr3" draw:text-style-name="P4" draw:layer="layout" svg:width="0.038cm" svg:height="0.035cm" svg:x="11.923cm" svg:y="13.686cm" svg:viewBox="0 0 39 36" draw:points="0,0 39,0 39,36 0,36">
          <text:p/>
        </draw:polygon>
        <draw:polygon draw:style-name="gr3" draw:text-style-name="P4" draw:layer="layout" svg:width="1.345cm" svg:height="0.035cm" svg:x="11.958cm" svg:y="13.686cm" svg:viewBox="0 0 1346 36" draw:points="0,0 1346,0 1346,36 0,36">
          <text:p/>
        </draw:polygon>
        <draw:polygon draw:style-name="gr3" draw:text-style-name="P4" draw:layer="layout" svg:width="0.034cm" svg:height="0.035cm" svg:x="13.3cm" svg:y="13.686cm" svg:viewBox="0 0 35 36" draw:points="0,0 35,0 35,36 0,36">
          <text:p/>
        </draw:polygon>
        <draw:polygon draw:style-name="gr3" draw:text-style-name="P4" draw:layer="layout" svg:width="1.205cm" svg:height="0.035cm" svg:x="13.335cm" svg:y="13.686cm" svg:viewBox="0 0 1206 36" draw:points="0,0 1206,0 1206,36 0,36">
          <text:p/>
        </draw:polygon>
        <draw:polygon draw:style-name="gr3" draw:text-style-name="P4" draw:layer="layout" svg:width="0.038cm" svg:height="0.035cm" svg:x="14.535cm" svg:y="13.686cm" svg:viewBox="0 0 39 36" draw:points="0,0 39,0 39,36 0,36">
          <text:p/>
        </draw:polygon>
        <draw:polygon draw:style-name="gr3" draw:text-style-name="P4" draw:layer="layout" svg:width="1.203cm" svg:height="0.035cm" svg:x="14.57cm" svg:y="13.686cm" svg:viewBox="0 0 1204 36" draw:points="0,0 1204,0 1204,36 0,36">
          <text:p/>
        </draw:polygon>
        <draw:polygon draw:style-name="gr3" draw:text-style-name="P4" draw:layer="layout" svg:width="0.035cm" svg:height="0.035cm" svg:x="15.773cm" svg:y="13.686cm" svg:viewBox="0 0 36 36" draw:points="0,0 36,0 36,36 0,36">
          <text:p/>
        </draw:polygon>
        <draw:polygon draw:style-name="gr3" draw:text-style-name="P4" draw:layer="layout" svg:width="1.467cm" svg:height="0.035cm" svg:x="15.805cm" svg:y="13.686cm" svg:viewBox="0 0 1468 36" draw:points="0,0 1468,0 1468,36 0,36">
          <text:p/>
        </draw:polygon>
        <draw:polygon draw:style-name="gr3" draw:text-style-name="P4" draw:layer="layout" svg:width="0.034cm" svg:height="0.035cm" svg:x="17.272cm" svg:y="13.686cm" svg:viewBox="0 0 35 36" draw:points="0,0 35,0 35,36 0,36">
          <text:p/>
        </draw:polygon>
        <draw:polygon draw:style-name="gr3" draw:text-style-name="P4" draw:layer="layout" svg:width="1.222cm" svg:height="0.035cm" svg:x="17.303cm" svg:y="13.686cm" svg:viewBox="0 0 1223 36" draw:points="0,0 1223,0 1223,36 0,36">
          <text:p/>
        </draw:polygon>
        <draw:polygon draw:style-name="gr3" draw:text-style-name="P4" draw:layer="layout" svg:width="0.035cm" svg:height="0.035cm" svg:x="18.524cm" svg:y="13.686cm" svg:viewBox="0 0 36 36" draw:points="0,0 36,0 36,36 0,36">
          <text:p/>
        </draw:polygon>
        <draw:polygon draw:style-name="gr3" draw:text-style-name="P4" draw:layer="layout" svg:width="1.47cm" svg:height="0.035cm" svg:x="18.558cm" svg:y="13.686cm" svg:viewBox="0 0 1471 36" draw:points="0,0 1471,0 1471,36 0,36">
          <text:p/>
        </draw:polygon>
        <draw:polygon draw:style-name="gr3" draw:text-style-name="P4" draw:layer="layout" svg:width="0.013cm" svg:height="0.035cm" svg:x="20.025cm" svg:y="13.686cm" svg:viewBox="0 0 14 36" draw:points="0,0 14,0 14,36 0,36">
          <text:p/>
        </draw:polygon>
        <draw:polygon draw:style-name="gr3" draw:text-style-name="P4" draw:layer="layout" svg:width="0.038cm" svg:height="0.393cm" svg:x="11.923cm" svg:y="13.718cm" svg:viewBox="0 0 39 394" draw:points="0,0 39,0 39,394 0,394">
          <text:p/>
        </draw:polygon>
        <draw:polygon draw:style-name="gr3" draw:text-style-name="P4" draw:layer="layout" svg:width="0.034cm" svg:height="0.393cm" svg:x="13.3cm" svg:y="13.718cm" svg:viewBox="0 0 35 394" draw:points="0,0 35,0 35,394 0,394">
          <text:p/>
        </draw:polygon>
        <draw:polygon draw:style-name="gr3" draw:text-style-name="P4" draw:layer="layout" svg:width="0.038cm" svg:height="0.393cm" svg:x="14.535cm" svg:y="13.718cm" svg:viewBox="0 0 39 394" draw:points="0,0 39,0 39,394 0,394">
          <text:p/>
        </draw:polygon>
        <draw:polygon draw:style-name="gr3" draw:text-style-name="P4" draw:layer="layout" svg:width="0.035cm" svg:height="0.393cm" svg:x="15.773cm" svg:y="13.718cm" svg:viewBox="0 0 36 394" draw:points="0,0 36,0 36,394 0,394">
          <text:p/>
        </draw:polygon>
        <draw:polygon draw:style-name="gr3" draw:text-style-name="P4" draw:layer="layout" svg:width="0.034cm" svg:height="0.393cm" svg:x="17.272cm" svg:y="13.718cm" svg:viewBox="0 0 35 394" draw:points="0,0 35,0 35,394 0,394">
          <text:p/>
        </draw:polygon>
        <draw:polygon draw:style-name="gr3" draw:text-style-name="P4" draw:layer="layout" svg:width="0.035cm" svg:height="0.393cm" svg:x="18.524cm" svg:y="13.718cm" svg:viewBox="0 0 36 394" draw:points="0,0 36,0 36,394 0,394">
          <text:p/>
        </draw:polygon>
        <draw:polygon draw:style-name="gr3" draw:text-style-name="P4" draw:layer="layout" svg:width="0.013cm" svg:height="0.393cm" svg:x="20.025cm" svg:y="13.718cm" svg:viewBox="0 0 14 394" draw:points="0,0 14,0 14,394 0,394">
          <text:p/>
        </draw:polygon>
        <draw:frame draw:style-name="gr86" draw:text-style-name="P16" draw:layer="layout" svg:width="0.242cm" svg:height="0.268cm" svg:x="15.807cm" svg:y="13.733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7.306cm" svg:y="13.733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8.559cm" svg:y="13.733cm">
          <draw:text-box>
            <text:p text:style-name="P2"><text:span text:style-name="T14"><text:s/></text:span></text:p>
          </draw:text-box>
        </draw:frame>
        <draw:frame draw:style-name="gr8" draw:text-style-name="P5" draw:layer="layout" svg:width="0.285cm" svg:height="0.289cm" svg:x="12.59cm" svg:y="14.214cm">
          <draw:text-box>
            <text:p text:style-name="P2"><text:span text:style-name="T2">C </text:span></text:p>
          </draw:text-box>
        </draw:frame>
        <draw:frame draw:style-name="gr5" draw:text-style-name="P5" draw:layer="layout" svg:width="0.285cm" svg:height="0.323cm" svg:x="13.335cm" svg:y="14.1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4.134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14.108cm" svg:viewBox="0 0 39 19" draw:points="0,0 39,0 39,19 0,19">
          <text:p/>
        </draw:polygon>
        <draw:polygon draw:style-name="gr3" draw:text-style-name="P4" draw:layer="layout" svg:width="1.345cm" svg:height="0.018cm" svg:x="11.958cm" svg:y="14.108cm" svg:viewBox="0 0 1346 19" draw:points="0,0 1346,0 1346,19 0,19">
          <text:p/>
        </draw:polygon>
        <draw:polygon draw:style-name="gr3" draw:text-style-name="P4" draw:layer="layout" svg:width="0.034cm" svg:height="0.018cm" svg:x="13.3cm" svg:y="14.108cm" svg:viewBox="0 0 35 19" draw:points="0,0 35,0 35,19 0,19">
          <text:p/>
        </draw:polygon>
        <draw:polygon draw:style-name="gr3" draw:text-style-name="P4" draw:layer="layout" svg:width="1.205cm" svg:height="0.018cm" svg:x="13.335cm" svg:y="14.108cm" svg:viewBox="0 0 1206 19" draw:points="0,0 1206,0 1206,19 0,19">
          <text:p/>
        </draw:polygon>
        <draw:polygon draw:style-name="gr3" draw:text-style-name="P4" draw:layer="layout" svg:width="0.038cm" svg:height="0.018cm" svg:x="14.535cm" svg:y="14.108cm" svg:viewBox="0 0 39 19" draw:points="0,0 39,0 39,19 0,19">
          <text:p/>
        </draw:polygon>
        <draw:polygon draw:style-name="gr3" draw:text-style-name="P4" draw:layer="layout" svg:width="1.203cm" svg:height="0.018cm" svg:x="14.57cm" svg:y="14.108cm" svg:viewBox="0 0 1204 19" draw:points="0,0 1204,0 1204,19 0,19">
          <text:p/>
        </draw:polygon>
        <draw:polygon draw:style-name="gr3" draw:text-style-name="P4" draw:layer="layout" svg:width="0.035cm" svg:height="0.018cm" svg:x="15.773cm" svg:y="14.108cm" svg:viewBox="0 0 36 19" draw:points="0,0 36,0 36,19 0,19">
          <text:p/>
        </draw:polygon>
        <draw:polygon draw:style-name="gr3" draw:text-style-name="P4" draw:layer="layout" svg:width="1.467cm" svg:height="0.018cm" svg:x="15.805cm" svg:y="14.108cm" svg:viewBox="0 0 1468 19" draw:points="0,0 1468,0 1468,19 0,19">
          <text:p/>
        </draw:polygon>
        <draw:polygon draw:style-name="gr3" draw:text-style-name="P4" draw:layer="layout" svg:width="0.034cm" svg:height="0.018cm" svg:x="17.272cm" svg:y="14.108cm" svg:viewBox="0 0 35 19" draw:points="0,0 35,0 35,19 0,19">
          <text:p/>
        </draw:polygon>
        <draw:polygon draw:style-name="gr3" draw:text-style-name="P4" draw:layer="layout" svg:width="1.222cm" svg:height="0.018cm" svg:x="17.303cm" svg:y="14.108cm" svg:viewBox="0 0 1223 19" draw:points="0,0 1223,0 1223,19 0,19">
          <text:p/>
        </draw:polygon>
        <draw:polygon draw:style-name="gr3" draw:text-style-name="P4" draw:layer="layout" svg:width="0.035cm" svg:height="0.018cm" svg:x="18.524cm" svg:y="14.108cm" svg:viewBox="0 0 36 19" draw:points="0,0 36,0 36,19 0,19">
          <text:p/>
        </draw:polygon>
        <draw:polygon draw:style-name="gr3" draw:text-style-name="P4" draw:layer="layout" svg:width="1.47cm" svg:height="0.018cm" svg:x="18.558cm" svg:y="14.108cm" svg:viewBox="0 0 1471 19" draw:points="0,0 1471,0 1471,19 0,19">
          <text:p/>
        </draw:polygon>
        <draw:polygon draw:style-name="gr3" draw:text-style-name="P4" draw:layer="layout" svg:width="0.013cm" svg:height="0.018cm" svg:x="20.025cm" svg:y="14.108cm" svg:viewBox="0 0 14 19" draw:points="0,0 14,0 14,19 0,19">
          <text:p/>
        </draw:polygon>
        <draw:polygon draw:style-name="gr3" draw:text-style-name="P4" draw:layer="layout" svg:width="0.038cm" svg:height="0.399cm" svg:x="11.923cm" svg:y="14.125cm" svg:viewBox="0 0 39 400" draw:points="0,0 39,0 39,400 0,400">
          <text:p/>
        </draw:polygon>
        <draw:polygon draw:style-name="gr3" draw:text-style-name="P4" draw:layer="layout" svg:width="0.034cm" svg:height="0.399cm" svg:x="13.3cm" svg:y="14.125cm" svg:viewBox="0 0 35 400" draw:points="0,0 35,0 35,400 0,400">
          <text:p/>
        </draw:polygon>
        <draw:polygon draw:style-name="gr3" draw:text-style-name="P4" draw:layer="layout" svg:width="0.038cm" svg:height="0.399cm" svg:x="14.535cm" svg:y="14.125cm" svg:viewBox="0 0 39 400" draw:points="0,0 39,0 39,400 0,400">
          <text:p/>
        </draw:polygon>
        <draw:polygon draw:style-name="gr3" draw:text-style-name="P4" draw:layer="layout" svg:width="0.035cm" svg:height="0.399cm" svg:x="15.773cm" svg:y="14.125cm" svg:viewBox="0 0 36 400" draw:points="0,0 36,0 36,400 0,400">
          <text:p/>
        </draw:polygon>
        <draw:polygon draw:style-name="gr3" draw:text-style-name="P4" draw:layer="layout" svg:width="0.034cm" svg:height="0.399cm" svg:x="17.272cm" svg:y="14.125cm" svg:viewBox="0 0 35 400" draw:points="0,0 35,0 35,400 0,400">
          <text:p/>
        </draw:polygon>
        <draw:polygon draw:style-name="gr3" draw:text-style-name="P4" draw:layer="layout" svg:width="0.035cm" svg:height="0.399cm" svg:x="18.524cm" svg:y="14.125cm" svg:viewBox="0 0 36 400" draw:points="0,0 36,0 36,400 0,400">
          <text:p/>
        </draw:polygon>
        <draw:polygon draw:style-name="gr3" draw:text-style-name="P4" draw:layer="layout" svg:width="0.013cm" svg:height="0.399cm" svg:x="20.025cm" svg:y="14.125cm" svg:viewBox="0 0 14 400" draw:points="0,0 14,0 14,400 0,400">
          <text:p/>
        </draw:polygon>
        <draw:frame draw:style-name="gr5" draw:text-style-name="P5" draw:layer="layout" svg:width="0.285cm" svg:height="0.323cm" svg:x="15.807cm" svg:y="14.1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4.1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4.134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2.581cm" svg:y="14.624cm">
          <draw:text-box>
            <text:p text:style-name="P2"><text:span text:style-name="T2">D </text:span></text:p>
          </draw:text-box>
        </draw:frame>
        <draw:frame draw:style-name="gr5" draw:text-style-name="P5" draw:layer="layout" svg:width="0.285cm" svg:height="0.323cm" svg:x="13.335cm" svg:y="14.54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4.549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7cm" svg:x="11.923cm" svg:y="14.524cm" svg:viewBox="0 0 39 18" draw:points="0,0 39,0 39,18 0,18">
          <text:p/>
        </draw:polygon>
        <draw:polygon draw:style-name="gr3" draw:text-style-name="P4" draw:layer="layout" svg:width="1.345cm" svg:height="0.017cm" svg:x="11.958cm" svg:y="14.524cm" svg:viewBox="0 0 1346 18" draw:points="0,0 1346,0 1346,18 0,18">
          <text:p/>
        </draw:polygon>
        <draw:polygon draw:style-name="gr3" draw:text-style-name="P4" draw:layer="layout" svg:width="0.034cm" svg:height="0.017cm" svg:x="13.3cm" svg:y="14.524cm" svg:viewBox="0 0 35 18" draw:points="0,0 35,0 35,18 0,18">
          <text:p/>
        </draw:polygon>
        <draw:polygon draw:style-name="gr3" draw:text-style-name="P4" draw:layer="layout" svg:width="1.205cm" svg:height="0.017cm" svg:x="13.335cm" svg:y="14.524cm" svg:viewBox="0 0 1206 18" draw:points="0,0 1206,0 1206,18 0,18">
          <text:p/>
        </draw:polygon>
        <draw:polygon draw:style-name="gr3" draw:text-style-name="P4" draw:layer="layout" svg:width="0.038cm" svg:height="0.017cm" svg:x="14.535cm" svg:y="14.524cm" svg:viewBox="0 0 39 18" draw:points="0,0 39,0 39,18 0,18">
          <text:p/>
        </draw:polygon>
        <draw:polygon draw:style-name="gr3" draw:text-style-name="P4" draw:layer="layout" svg:width="1.203cm" svg:height="0.017cm" svg:x="14.57cm" svg:y="14.524cm" svg:viewBox="0 0 1204 18" draw:points="0,0 1204,0 1204,18 0,18">
          <text:p/>
        </draw:polygon>
        <draw:polygon draw:style-name="gr3" draw:text-style-name="P4" draw:layer="layout" svg:width="0.035cm" svg:height="0.017cm" svg:x="15.773cm" svg:y="14.524cm" svg:viewBox="0 0 36 18" draw:points="0,0 36,0 36,18 0,18">
          <text:p/>
        </draw:polygon>
        <draw:polygon draw:style-name="gr3" draw:text-style-name="P4" draw:layer="layout" svg:width="1.467cm" svg:height="0.017cm" svg:x="15.805cm" svg:y="14.524cm" svg:viewBox="0 0 1468 18" draw:points="0,0 1468,0 1468,18 0,18">
          <text:p/>
        </draw:polygon>
        <draw:polygon draw:style-name="gr3" draw:text-style-name="P4" draw:layer="layout" svg:width="0.034cm" svg:height="0.017cm" svg:x="17.272cm" svg:y="14.524cm" svg:viewBox="0 0 35 18" draw:points="0,0 35,0 35,18 0,18">
          <text:p/>
        </draw:polygon>
        <draw:polygon draw:style-name="gr3" draw:text-style-name="P4" draw:layer="layout" svg:width="1.222cm" svg:height="0.017cm" svg:x="17.303cm" svg:y="14.524cm" svg:viewBox="0 0 1223 18" draw:points="0,0 1223,0 1223,18 0,18">
          <text:p/>
        </draw:polygon>
        <draw:polygon draw:style-name="gr3" draw:text-style-name="P4" draw:layer="layout" svg:width="0.035cm" svg:height="0.017cm" svg:x="18.524cm" svg:y="14.524cm" svg:viewBox="0 0 36 18" draw:points="0,0 36,0 36,18 0,18">
          <text:p/>
        </draw:polygon>
        <draw:polygon draw:style-name="gr3" draw:text-style-name="P4" draw:layer="layout" svg:width="1.47cm" svg:height="0.017cm" svg:x="18.558cm" svg:y="14.524cm" svg:viewBox="0 0 1471 18" draw:points="0,0 1471,0 1471,18 0,18">
          <text:p/>
        </draw:polygon>
        <draw:polygon draw:style-name="gr3" draw:text-style-name="P4" draw:layer="layout" svg:width="0.013cm" svg:height="0.017cm" svg:x="20.025cm" svg:y="14.524cm" svg:viewBox="0 0 14 18" draw:points="0,0 14,0 14,18 0,18">
          <text:p/>
        </draw:polygon>
        <draw:polygon draw:style-name="gr3" draw:text-style-name="P4" draw:layer="layout" svg:width="0.038cm" svg:height="0.398cm" svg:x="11.923cm" svg:y="14.541cm" svg:viewBox="0 0 39 399" draw:points="0,0 39,0 39,399 0,399">
          <text:p/>
        </draw:polygon>
        <draw:polygon draw:style-name="gr3" draw:text-style-name="P4" draw:layer="layout" svg:width="0.034cm" svg:height="0.398cm" svg:x="13.3cm" svg:y="14.541cm" svg:viewBox="0 0 35 399" draw:points="0,0 35,0 35,399 0,399">
          <text:p/>
        </draw:polygon>
        <draw:polygon draw:style-name="gr3" draw:text-style-name="P4" draw:layer="layout" svg:width="0.038cm" svg:height="0.398cm" svg:x="14.535cm" svg:y="14.541cm" svg:viewBox="0 0 39 399" draw:points="0,0 39,0 39,399 0,399">
          <text:p/>
        </draw:polygon>
        <draw:polygon draw:style-name="gr3" draw:text-style-name="P4" draw:layer="layout" svg:width="0.035cm" svg:height="0.398cm" svg:x="15.773cm" svg:y="14.541cm" svg:viewBox="0 0 36 399" draw:points="0,0 36,0 36,399 0,399">
          <text:p/>
        </draw:polygon>
        <draw:polygon draw:style-name="gr3" draw:text-style-name="P4" draw:layer="layout" svg:width="0.034cm" svg:height="0.398cm" svg:x="17.272cm" svg:y="14.541cm" svg:viewBox="0 0 35 399" draw:points="0,0 35,0 35,399 0,399">
          <text:p/>
        </draw:polygon>
        <draw:polygon draw:style-name="gr3" draw:text-style-name="P4" draw:layer="layout" svg:width="0.035cm" svg:height="0.398cm" svg:x="18.524cm" svg:y="14.541cm" svg:viewBox="0 0 36 399" draw:points="0,0 36,0 36,399 0,399">
          <text:p/>
        </draw:polygon>
        <draw:polygon draw:style-name="gr3" draw:text-style-name="P4" draw:layer="layout" svg:width="0.013cm" svg:height="0.398cm" svg:x="20.025cm" svg:y="14.541cm" svg:viewBox="0 0 14 399" draw:points="0,0 14,0 14,399 0,399">
          <text:p/>
        </draw:polygon>
        <draw:frame draw:style-name="gr5" draw:text-style-name="P5" draw:layer="layout" svg:width="0.285cm" svg:height="0.323cm" svg:x="15.807cm" svg:y="14.54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4.54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4.549cm">
          <draw:text-box>
            <text:p text:style-name="P2"><text:span text:style-name="T3"><text:s/></text:span></text:p>
          </draw:text-box>
        </draw:frame>
        <draw:frame draw:style-name="gr87" draw:text-style-name="P5" draw:layer="layout" svg:width="0.834cm" svg:height="0.289cm" svg:x="12.04cm" svg:y="15.039cm">
          <draw:text-box>
            <text:p text:style-name="P2"><text:span text:style-name="T2"><text:s text:c="8"/>M </text:span></text:p>
          </draw:text-box>
        </draw:frame>
        <draw:frame draw:style-name="gr5" draw:text-style-name="P5" draw:layer="layout" svg:width="0.285cm" svg:height="0.323cm" svg:x="13.335cm" svg:y="14.96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4.964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14.939cm" svg:viewBox="0 0 39 19" draw:points="0,0 39,0 39,19 0,19">
          <text:p/>
        </draw:polygon>
        <draw:polygon draw:style-name="gr3" draw:text-style-name="P4" draw:layer="layout" svg:width="1.345cm" svg:height="0.018cm" svg:x="11.958cm" svg:y="14.939cm" svg:viewBox="0 0 1346 19" draw:points="0,0 1346,0 1346,19 0,19">
          <text:p/>
        </draw:polygon>
        <draw:polygon draw:style-name="gr3" draw:text-style-name="P4" draw:layer="layout" svg:width="0.034cm" svg:height="0.018cm" svg:x="13.3cm" svg:y="14.939cm" svg:viewBox="0 0 35 19" draw:points="0,0 35,0 35,19 0,19">
          <text:p/>
        </draw:polygon>
        <draw:polygon draw:style-name="gr3" draw:text-style-name="P4" draw:layer="layout" svg:width="1.205cm" svg:height="0.018cm" svg:x="13.335cm" svg:y="14.939cm" svg:viewBox="0 0 1206 19" draw:points="0,0 1206,0 1206,19 0,19">
          <text:p/>
        </draw:polygon>
        <draw:polygon draw:style-name="gr3" draw:text-style-name="P4" draw:layer="layout" svg:width="0.038cm" svg:height="0.018cm" svg:x="14.535cm" svg:y="14.939cm" svg:viewBox="0 0 39 19" draw:points="0,0 39,0 39,19 0,19">
          <text:p/>
        </draw:polygon>
        <draw:polygon draw:style-name="gr3" draw:text-style-name="P4" draw:layer="layout" svg:width="1.203cm" svg:height="0.018cm" svg:x="14.57cm" svg:y="14.939cm" svg:viewBox="0 0 1204 19" draw:points="0,0 1204,0 1204,19 0,19">
          <text:p/>
        </draw:polygon>
        <draw:polygon draw:style-name="gr3" draw:text-style-name="P4" draw:layer="layout" svg:width="0.035cm" svg:height="0.018cm" svg:x="15.773cm" svg:y="14.939cm" svg:viewBox="0 0 36 19" draw:points="0,0 36,0 36,19 0,19">
          <text:p/>
        </draw:polygon>
        <draw:polygon draw:style-name="gr3" draw:text-style-name="P4" draw:layer="layout" svg:width="1.467cm" svg:height="0.018cm" svg:x="15.805cm" svg:y="14.939cm" svg:viewBox="0 0 1468 19" draw:points="0,0 1468,0 1468,19 0,19">
          <text:p/>
        </draw:polygon>
        <draw:polygon draw:style-name="gr3" draw:text-style-name="P4" draw:layer="layout" svg:width="0.034cm" svg:height="0.018cm" svg:x="17.272cm" svg:y="14.939cm" svg:viewBox="0 0 35 19" draw:points="0,0 35,0 35,19 0,19">
          <text:p/>
        </draw:polygon>
        <draw:polygon draw:style-name="gr3" draw:text-style-name="P4" draw:layer="layout" svg:width="1.222cm" svg:height="0.018cm" svg:x="17.303cm" svg:y="14.939cm" svg:viewBox="0 0 1223 19" draw:points="0,0 1223,0 1223,19 0,19">
          <text:p/>
        </draw:polygon>
        <draw:polygon draw:style-name="gr3" draw:text-style-name="P4" draw:layer="layout" svg:width="0.035cm" svg:height="0.018cm" svg:x="18.524cm" svg:y="14.939cm" svg:viewBox="0 0 36 19" draw:points="0,0 36,0 36,19 0,19">
          <text:p/>
        </draw:polygon>
        <draw:polygon draw:style-name="gr3" draw:text-style-name="P4" draw:layer="layout" svg:width="1.47cm" svg:height="0.018cm" svg:x="18.558cm" svg:y="14.939cm" svg:viewBox="0 0 1471 19" draw:points="0,0 1471,0 1471,19 0,19">
          <text:p/>
        </draw:polygon>
        <draw:polygon draw:style-name="gr3" draw:text-style-name="P4" draw:layer="layout" svg:width="0.013cm" svg:height="0.018cm" svg:x="20.025cm" svg:y="14.939cm" svg:viewBox="0 0 14 19" draw:points="0,0 14,0 14,19 0,19">
          <text:p/>
        </draw:polygon>
        <draw:polygon draw:style-name="gr3" draw:text-style-name="P4" draw:layer="layout" svg:width="0.038cm" svg:height="0.399cm" svg:x="11.923cm" svg:y="14.956cm" svg:viewBox="0 0 39 400" draw:points="0,0 39,0 39,400 0,400">
          <text:p/>
        </draw:polygon>
        <draw:polygon draw:style-name="gr3" draw:text-style-name="P4" draw:layer="layout" svg:width="0.034cm" svg:height="0.399cm" svg:x="13.3cm" svg:y="14.956cm" svg:viewBox="0 0 35 400" draw:points="0,0 35,0 35,400 0,400">
          <text:p/>
        </draw:polygon>
        <draw:polygon draw:style-name="gr3" draw:text-style-name="P4" draw:layer="layout" svg:width="0.038cm" svg:height="0.399cm" svg:x="14.535cm" svg:y="14.956cm" svg:viewBox="0 0 39 400" draw:points="0,0 39,0 39,400 0,400">
          <text:p/>
        </draw:polygon>
        <draw:polygon draw:style-name="gr3" draw:text-style-name="P4" draw:layer="layout" svg:width="0.035cm" svg:height="0.399cm" svg:x="15.773cm" svg:y="14.956cm" svg:viewBox="0 0 36 400" draw:points="0,0 36,0 36,400 0,400">
          <text:p/>
        </draw:polygon>
        <draw:polygon draw:style-name="gr3" draw:text-style-name="P4" draw:layer="layout" svg:width="0.034cm" svg:height="0.399cm" svg:x="17.272cm" svg:y="14.956cm" svg:viewBox="0 0 35 400" draw:points="0,0 35,0 35,400 0,400">
          <text:p/>
        </draw:polygon>
        <draw:polygon draw:style-name="gr3" draw:text-style-name="P4" draw:layer="layout" svg:width="0.035cm" svg:height="0.399cm" svg:x="18.524cm" svg:y="14.956cm" svg:viewBox="0 0 36 400" draw:points="0,0 36,0 36,400 0,400">
          <text:p/>
        </draw:polygon>
        <draw:polygon draw:style-name="gr3" draw:text-style-name="P4" draw:layer="layout" svg:width="0.013cm" svg:height="0.399cm" svg:x="20.025cm" svg:y="14.956cm" svg:viewBox="0 0 14 400" draw:points="0,0 14,0 14,400 0,400">
          <text:p/>
        </draw:polygon>
        <draw:frame draw:style-name="gr5" draw:text-style-name="P5" draw:layer="layout" svg:width="0.285cm" svg:height="0.323cm" svg:x="15.807cm" svg:y="14.96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4.96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4.964cm">
          <draw:text-box>
            <text:p text:style-name="P2"><text:span text:style-name="T3"><text:s/></text:span></text:p>
          </draw:text-box>
        </draw:frame>
        <draw:frame draw:style-name="gr88" draw:text-style-name="P5" draw:layer="layout" svg:width="0.702cm" svg:height="0.289cm" svg:x="12.349cm" svg:y="15.462cm">
          <draw:text-box>
            <text:p text:style-name="P2"><text:span text:style-name="T2">Straff </text:span></text:p>
          </draw:text-box>
        </draw:frame>
        <draw:frame draw:style-name="gr5" draw:text-style-name="P5" draw:layer="layout" svg:width="0.285cm" svg:height="0.323cm" svg:x="13.335cm" svg:y="15.37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5.379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5.352cm" svg:viewBox="0 0 39 21" draw:points="0,0 39,0 39,21 0,21">
          <text:p/>
        </draw:polygon>
        <draw:polygon draw:style-name="gr3" draw:text-style-name="P4" draw:layer="layout" svg:width="1.345cm" svg:height="0.02cm" svg:x="11.958cm" svg:y="15.352cm" svg:viewBox="0 0 1346 21" draw:points="0,0 1346,0 1346,21 0,21">
          <text:p/>
        </draw:polygon>
        <draw:polygon draw:style-name="gr3" draw:text-style-name="P4" draw:layer="layout" svg:width="0.034cm" svg:height="0.02cm" svg:x="13.3cm" svg:y="15.352cm" svg:viewBox="0 0 35 21" draw:points="0,0 35,0 35,21 0,21">
          <text:p/>
        </draw:polygon>
        <draw:polygon draw:style-name="gr3" draw:text-style-name="P4" draw:layer="layout" svg:width="1.205cm" svg:height="0.02cm" svg:x="13.335cm" svg:y="15.352cm" svg:viewBox="0 0 1206 21" draw:points="0,0 1206,0 1206,21 0,21">
          <text:p/>
        </draw:polygon>
        <draw:polygon draw:style-name="gr3" draw:text-style-name="P4" draw:layer="layout" svg:width="0.038cm" svg:height="0.02cm" svg:x="14.535cm" svg:y="15.352cm" svg:viewBox="0 0 39 21" draw:points="0,0 39,0 39,21 0,21">
          <text:p/>
        </draw:polygon>
        <draw:polygon draw:style-name="gr3" draw:text-style-name="P4" draw:layer="layout" svg:width="1.203cm" svg:height="0.02cm" svg:x="14.57cm" svg:y="15.352cm" svg:viewBox="0 0 1204 21" draw:points="0,0 1204,0 1204,21 0,21">
          <text:p/>
        </draw:polygon>
        <draw:polygon draw:style-name="gr3" draw:text-style-name="P4" draw:layer="layout" svg:width="0.035cm" svg:height="0.02cm" svg:x="15.773cm" svg:y="15.352cm" svg:viewBox="0 0 36 21" draw:points="0,0 36,0 36,21 0,21">
          <text:p/>
        </draw:polygon>
        <draw:polygon draw:style-name="gr3" draw:text-style-name="P4" draw:layer="layout" svg:width="1.467cm" svg:height="0.02cm" svg:x="15.805cm" svg:y="15.352cm" svg:viewBox="0 0 1468 21" draw:points="0,0 1468,0 1468,21 0,21">
          <text:p/>
        </draw:polygon>
        <draw:polygon draw:style-name="gr3" draw:text-style-name="P4" draw:layer="layout" svg:width="0.034cm" svg:height="0.02cm" svg:x="17.272cm" svg:y="15.352cm" svg:viewBox="0 0 35 21" draw:points="0,0 35,0 35,21 0,21">
          <text:p/>
        </draw:polygon>
        <draw:polygon draw:style-name="gr3" draw:text-style-name="P4" draw:layer="layout" svg:width="1.222cm" svg:height="0.02cm" svg:x="17.303cm" svg:y="15.352cm" svg:viewBox="0 0 1223 21" draw:points="0,0 1223,0 1223,21 0,21">
          <text:p/>
        </draw:polygon>
        <draw:polygon draw:style-name="gr3" draw:text-style-name="P4" draw:layer="layout" svg:width="0.035cm" svg:height="0.02cm" svg:x="18.524cm" svg:y="15.352cm" svg:viewBox="0 0 36 21" draw:points="0,0 36,0 36,21 0,21">
          <text:p/>
        </draw:polygon>
        <draw:polygon draw:style-name="gr3" draw:text-style-name="P4" draw:layer="layout" svg:width="1.47cm" svg:height="0.02cm" svg:x="18.558cm" svg:y="15.352cm" svg:viewBox="0 0 1471 21" draw:points="0,0 1471,0 1471,21 0,21">
          <text:p/>
        </draw:polygon>
        <draw:polygon draw:style-name="gr3" draw:text-style-name="P4" draw:layer="layout" svg:width="0.013cm" svg:height="0.02cm" svg:x="20.025cm" svg:y="15.352cm" svg:viewBox="0 0 14 21" draw:points="0,0 14,0 14,21 0,21">
          <text:p/>
        </draw:polygon>
        <draw:polygon draw:style-name="gr3" draw:text-style-name="P4" draw:layer="layout" svg:width="0.038cm" svg:height="0.408cm" svg:x="11.923cm" svg:y="15.369cm" svg:viewBox="0 0 39 409" draw:points="0,0 39,0 39,409 0,409">
          <text:p/>
        </draw:polygon>
        <draw:polygon draw:style-name="gr3" draw:text-style-name="P4" draw:layer="layout" svg:width="0.034cm" svg:height="0.408cm" svg:x="13.3cm" svg:y="15.369cm" svg:viewBox="0 0 35 409" draw:points="0,0 35,0 35,409 0,409">
          <text:p/>
        </draw:polygon>
        <draw:polygon draw:style-name="gr3" draw:text-style-name="P4" draw:layer="layout" svg:width="0.038cm" svg:height="0.408cm" svg:x="14.535cm" svg:y="15.369cm" svg:viewBox="0 0 39 409" draw:points="0,0 39,0 39,409 0,409">
          <text:p/>
        </draw:polygon>
        <draw:polygon draw:style-name="gr3" draw:text-style-name="P4" draw:layer="layout" svg:width="0.035cm" svg:height="0.408cm" svg:x="15.773cm" svg:y="15.369cm" svg:viewBox="0 0 36 409" draw:points="0,0 36,0 36,409 0,409">
          <text:p/>
        </draw:polygon>
        <draw:polygon draw:style-name="gr3" draw:text-style-name="P4" draw:layer="layout" svg:width="0.034cm" svg:height="0.408cm" svg:x="17.272cm" svg:y="15.369cm" svg:viewBox="0 0 35 409" draw:points="0,0 35,0 35,409 0,409">
          <text:p/>
        </draw:polygon>
        <draw:polygon draw:style-name="gr3" draw:text-style-name="P4" draw:layer="layout" svg:width="0.035cm" svg:height="0.408cm" svg:x="18.524cm" svg:y="15.369cm" svg:viewBox="0 0 36 409" draw:points="0,0 36,0 36,409 0,409">
          <text:p/>
        </draw:polygon>
        <draw:polygon draw:style-name="gr3" draw:text-style-name="P4" draw:layer="layout" svg:width="0.013cm" svg:height="0.408cm" svg:x="20.025cm" svg:y="15.369cm" svg:viewBox="0 0 14 409" draw:points="0,0 14,0 14,409 0,409">
          <text:p/>
        </draw:polygon>
        <draw:frame draw:style-name="gr5" draw:text-style-name="P5" draw:layer="layout" svg:width="0.285cm" svg:height="0.323cm" svg:x="15.807cm" svg:y="15.37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5.37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5.379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35cm" svg:x="11.923cm" svg:y="15.776cm" svg:viewBox="0 0 39 36" draw:points="0,0 39,0 39,36 0,36">
          <text:p/>
        </draw:polygon>
        <draw:polygon draw:style-name="gr3" draw:text-style-name="P4" draw:layer="layout" svg:width="0.038cm" svg:height="0.035cm" svg:x="11.923cm" svg:y="15.776cm" svg:viewBox="0 0 39 36" draw:points="0,0 39,0 39,36 0,36">
          <text:p/>
        </draw:polygon>
        <draw:polygon draw:style-name="gr3" draw:text-style-name="P4" draw:layer="layout" svg:width="0.034cm" svg:height="0.035cm" svg:x="11.958cm" svg:y="15.776cm" svg:viewBox="0 0 35 36" draw:points="0,0 35,0 35,36 0,36">
          <text:p/>
        </draw:polygon>
        <draw:polygon draw:style-name="gr3" draw:text-style-name="P4" draw:layer="layout" svg:width="1.311cm" svg:height="0.035cm" svg:x="11.992cm" svg:y="15.776cm" svg:viewBox="0 0 1312 36" draw:points="0,0 1312,0 1312,36 0,36">
          <text:p/>
        </draw:polygon>
        <draw:polygon draw:style-name="gr3" draw:text-style-name="P4" draw:layer="layout" svg:width="0.034cm" svg:height="0.035cm" svg:x="13.3cm" svg:y="15.776cm" svg:viewBox="0 0 35 36" draw:points="0,0 35,0 35,36 0,36">
          <text:p/>
        </draw:polygon>
        <draw:polygon draw:style-name="gr3" draw:text-style-name="P4" draw:layer="layout" svg:width="1.205cm" svg:height="0.035cm" svg:x="13.335cm" svg:y="15.776cm" svg:viewBox="0 0 1206 36" draw:points="0,0 1206,0 1206,36 0,36">
          <text:p/>
        </draw:polygon>
        <draw:polygon draw:style-name="gr3" draw:text-style-name="P4" draw:layer="layout" svg:width="0.038cm" svg:height="0.035cm" svg:x="14.535cm" svg:y="15.776cm" svg:viewBox="0 0 39 36" draw:points="0,0 39,0 39,36 0,36">
          <text:p/>
        </draw:polygon>
        <draw:polygon draw:style-name="gr3" draw:text-style-name="P4" draw:layer="layout" svg:width="1.203cm" svg:height="0.035cm" svg:x="14.57cm" svg:y="15.776cm" svg:viewBox="0 0 1204 36" draw:points="0,0 1204,0 1204,36 0,36">
          <text:p/>
        </draw:polygon>
        <draw:polygon draw:style-name="gr3" draw:text-style-name="P4" draw:layer="layout" svg:width="0.035cm" svg:height="0.035cm" svg:x="15.773cm" svg:y="15.776cm" svg:viewBox="0 0 36 36" draw:points="0,0 36,0 36,36 0,36">
          <text:p/>
        </draw:polygon>
        <draw:polygon draw:style-name="gr3" draw:text-style-name="P4" draw:layer="layout" svg:width="1.467cm" svg:height="0.035cm" svg:x="15.805cm" svg:y="15.776cm" svg:viewBox="0 0 1468 36" draw:points="0,0 1468,0 1468,36 0,36">
          <text:p/>
        </draw:polygon>
        <draw:polygon draw:style-name="gr3" draw:text-style-name="P4" draw:layer="layout" svg:width="0.034cm" svg:height="0.035cm" svg:x="17.272cm" svg:y="15.776cm" svg:viewBox="0 0 35 36" draw:points="0,0 35,0 35,36 0,36">
          <text:p/>
        </draw:polygon>
        <draw:polygon draw:style-name="gr3" draw:text-style-name="P4" draw:layer="layout" svg:width="1.222cm" svg:height="0.035cm" svg:x="17.303cm" svg:y="15.776cm" svg:viewBox="0 0 1223 36" draw:points="0,0 1223,0 1223,36 0,36">
          <text:p/>
        </draw:polygon>
        <draw:polygon draw:style-name="gr3" draw:text-style-name="P4" draw:layer="layout" svg:width="0.035cm" svg:height="0.035cm" svg:x="18.524cm" svg:y="15.776cm" svg:viewBox="0 0 36 36" draw:points="0,0 36,0 36,36 0,36">
          <text:p/>
        </draw:polygon>
        <draw:polygon draw:style-name="gr3" draw:text-style-name="P4" draw:layer="layout" svg:width="1.47cm" svg:height="0.035cm" svg:x="18.558cm" svg:y="15.776cm" svg:viewBox="0 0 1471 36" draw:points="0,0 1471,0 1471,36 0,36">
          <text:p/>
        </draw:polygon>
        <draw:polygon draw:style-name="gr3" draw:text-style-name="P4" draw:layer="layout" svg:width="0.013cm" svg:height="0.035cm" svg:x="20.025cm" svg:y="15.776cm" svg:viewBox="0 0 14 36" draw:points="0,0 14,0 14,36 0,36">
          <text:p/>
        </draw:polygon>
        <draw:polygon draw:style-name="gr3" draw:text-style-name="P4" draw:layer="layout" svg:width="0.034cm" svg:height="0.402cm" svg:x="17.272cm" svg:y="15.811cm" svg:viewBox="0 0 35 403" draw:points="0,0 35,0 35,403 0,403">
          <text:p/>
        </draw:polygon>
        <draw:polygon draw:style-name="gr3" draw:text-style-name="P4" draw:layer="layout" svg:width="0.034cm" svg:height="0.015cm" svg:x="17.272cm" svg:y="16.212cm" svg:viewBox="0 0 35 16" draw:points="0,0 35,0 35,16 0,16">
          <text:p/>
        </draw:polygon>
        <draw:polygon draw:style-name="gr3" draw:text-style-name="P4" draw:layer="layout" svg:width="0.034cm" svg:height="0.015cm" svg:x="17.272cm" svg:y="16.212cm" svg:viewBox="0 0 35 16" draw:points="0,0 35,0 35,16 0,16">
          <text:p/>
        </draw:polygon>
        <draw:polygon draw:style-name="gr3" draw:text-style-name="P4" draw:layer="layout" svg:width="1.222cm" svg:height="0.015cm" svg:x="17.303cm" svg:y="16.212cm" svg:viewBox="0 0 1223 16" draw:points="0,0 1223,0 1223,16 0,16">
          <text:p/>
        </draw:polygon>
        <draw:polygon draw:style-name="gr3" draw:text-style-name="P4" draw:layer="layout" svg:width="0.035cm" svg:height="0.402cm" svg:x="18.524cm" svg:y="15.811cm" svg:viewBox="0 0 36 403" draw:points="0,0 36,0 36,403 0,403">
          <text:p/>
        </draw:polygon>
        <draw:polygon draw:style-name="gr3" draw:text-style-name="P4" draw:layer="layout" svg:width="0.035cm" svg:height="0.015cm" svg:x="18.524cm" svg:y="16.212cm" svg:viewBox="0 0 36 16" draw:points="0,0 36,0 36,16 0,16">
          <text:p/>
        </draw:polygon>
        <draw:polygon draw:style-name="gr3" draw:text-style-name="P4" draw:layer="layout" svg:width="1.47cm" svg:height="0.015cm" svg:x="18.558cm" svg:y="16.212cm" svg:viewBox="0 0 1471 16" draw:points="0,0 1471,0 1471,16 0,16">
          <text:p/>
        </draw:polygon>
        <draw:polygon draw:style-name="gr3" draw:text-style-name="P4" draw:layer="layout" svg:width="0.013cm" svg:height="0.402cm" svg:x="20.025cm" svg:y="15.811cm" svg:viewBox="0 0 14 403" draw:points="0,0 14,0 14,403 0,403">
          <text:p/>
        </draw:polygon>
        <draw:polygon draw:style-name="gr3" draw:text-style-name="P4" draw:layer="layout" svg:width="0.013cm" svg:height="0.015cm" svg:x="20.025cm" svg:y="16.212cm" svg:viewBox="0 0 14 16" draw:points="0,0 14,0 14,16 0,16">
          <text:p/>
        </draw:polygon>
        <draw:polygon draw:style-name="gr3" draw:text-style-name="P4" draw:layer="layout" svg:width="0.013cm" svg:height="0.015cm" svg:x="20.025cm" svg:y="16.212cm" svg:viewBox="0 0 14 16" draw:points="0,0 14,0 14,16 0,16">
          <text:p/>
        </draw:polygon>
        <draw:frame draw:style-name="gr5" draw:text-style-name="P5" draw:layer="layout" svg:width="0.285cm" svg:height="0.323cm" svg:x="11.946cm" svg:y="15.81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5.81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5.819cm">
          <draw:text-box>
            <text:p text:style-name="P2"><text:span text:style-name="T3"><text:s/></text:span></text:p>
          </draw:text-box>
        </draw:frame>
        <draw:frame draw:style-name="gr70" draw:text-style-name="P13" draw:layer="layout" svg:width="0.391cm" svg:height="0.395cm" svg:x="11.908cm" svg:y="16.324cm">
          <draw:text-box>
            <text:p text:style-name="P2"><text:span text:style-name="T10"><text:s/></text:span></text:p>
          </draw:text-box>
        </draw:frame>
        <draw:frame draw:style-name="gr80" draw:text-style-name="P5" draw:layer="layout" svg:width="0.84cm" svg:height="0.289cm" svg:x="12.192cm" svg:y="16.974cm">
          <draw:text-box>
            <text:p text:style-name="P2"><text:span text:style-name="T4">Övn. 5 </text:span></text:p>
          </draw:text-box>
        </draw:frame>
        <draw:frame draw:style-name="gr81" draw:text-style-name="P5" draw:layer="layout" svg:width="0.353cm" svg:height="0.289cm" svg:x="13.83cm" svg:y="16.974cm">
          <draw:text-box>
            <text:p text:style-name="P2"><text:span text:style-name="T2">T1 </text:span></text:p>
          </draw:text-box>
        </draw:frame>
        <draw:frame draw:style-name="gr81" draw:text-style-name="P5" draw:layer="layout" svg:width="0.353cm" svg:height="0.289cm" svg:x="15.066cm" svg:y="16.974cm">
          <draw:text-box>
            <text:p text:style-name="P2"><text:span text:style-name="T2">T2 </text:span></text:p>
          </draw:text-box>
        </draw:frame>
        <draw:polygon draw:style-name="gr3" draw:text-style-name="P4" draw:layer="layout" svg:width="0.038cm" svg:height="0.035cm" svg:x="11.923cm" svg:y="16.758cm" svg:viewBox="0 0 39 36" draw:points="0,0 39,0 39,36 0,36">
          <text:p/>
        </draw:polygon>
        <draw:polygon draw:style-name="gr3" draw:text-style-name="P4" draw:layer="layout" svg:width="0.038cm" svg:height="0.035cm" svg:x="11.923cm" svg:y="16.758cm" svg:viewBox="0 0 39 36" draw:points="0,0 39,0 39,36 0,36">
          <text:p/>
        </draw:polygon>
        <draw:polygon draw:style-name="gr3" draw:text-style-name="P4" draw:layer="layout" svg:width="1.345cm" svg:height="0.035cm" svg:x="11.958cm" svg:y="16.758cm" svg:viewBox="0 0 1346 36" draw:points="0,0 1346,0 1346,36 0,36">
          <text:p/>
        </draw:polygon>
        <draw:polygon draw:style-name="gr3" draw:text-style-name="P4" draw:layer="layout" svg:width="0.034cm" svg:height="0.035cm" svg:x="13.3cm" svg:y="16.758cm" svg:viewBox="0 0 35 36" draw:points="0,0 35,0 35,36 0,36">
          <text:p/>
        </draw:polygon>
        <draw:polygon draw:style-name="gr3" draw:text-style-name="P4" draw:layer="layout" svg:width="1.205cm" svg:height="0.035cm" svg:x="13.335cm" svg:y="16.758cm" svg:viewBox="0 0 1206 36" draw:points="0,0 1206,0 1206,36 0,36">
          <text:p/>
        </draw:polygon>
        <draw:polygon draw:style-name="gr3" draw:text-style-name="P4" draw:layer="layout" svg:width="0.038cm" svg:height="0.035cm" svg:x="14.535cm" svg:y="16.758cm" svg:viewBox="0 0 39 36" draw:points="0,0 39,0 39,36 0,36">
          <text:p/>
        </draw:polygon>
        <draw:polygon draw:style-name="gr3" draw:text-style-name="P4" draw:layer="layout" svg:width="1.203cm" svg:height="0.035cm" svg:x="14.57cm" svg:y="16.758cm" svg:viewBox="0 0 1204 36" draw:points="0,0 1204,0 1204,36 0,36">
          <text:p/>
        </draw:polygon>
        <draw:polygon draw:style-name="gr3" draw:text-style-name="P4" draw:layer="layout" svg:width="0.035cm" svg:height="0.035cm" svg:x="15.773cm" svg:y="16.758cm" svg:viewBox="0 0 36 36" draw:points="0,0 36,0 36,36 0,36">
          <text:p/>
        </draw:polygon>
        <draw:polygon draw:style-name="gr3" draw:text-style-name="P4" draw:layer="layout" svg:width="1.467cm" svg:height="0.035cm" svg:x="15.805cm" svg:y="16.758cm" svg:viewBox="0 0 1468 36" draw:points="0,0 1468,0 1468,36 0,36">
          <text:p/>
        </draw:polygon>
        <draw:polygon draw:style-name="gr3" draw:text-style-name="P4" draw:layer="layout" svg:width="0.034cm" svg:height="0.035cm" svg:x="17.272cm" svg:y="16.758cm" svg:viewBox="0 0 35 36" draw:points="0,0 35,0 35,36 0,36">
          <text:p/>
        </draw:polygon>
        <draw:polygon draw:style-name="gr3" draw:text-style-name="P4" draw:layer="layout" svg:width="1.222cm" svg:height="0.035cm" svg:x="17.303cm" svg:y="16.758cm" svg:viewBox="0 0 1223 36" draw:points="0,0 1223,0 1223,36 0,36">
          <text:p/>
        </draw:polygon>
        <draw:polygon draw:style-name="gr3" draw:text-style-name="P4" draw:layer="layout" svg:width="0.035cm" svg:height="0.035cm" svg:x="18.524cm" svg:y="16.758cm" svg:viewBox="0 0 36 36" draw:points="0,0 36,0 36,36 0,36">
          <text:p/>
        </draw:polygon>
        <draw:polygon draw:style-name="gr3" draw:text-style-name="P4" draw:layer="layout" svg:width="1.47cm" svg:height="0.035cm" svg:x="18.558cm" svg:y="16.758cm" svg:viewBox="0 0 1471 36" draw:points="0,0 1471,0 1471,36 0,36">
          <text:p/>
        </draw:polygon>
        <draw:polygon draw:style-name="gr3" draw:text-style-name="P4" draw:layer="layout" svg:width="0.013cm" svg:height="0.035cm" svg:x="20.025cm" svg:y="16.758cm" svg:viewBox="0 0 14 36" draw:points="0,0 14,0 14,36 0,36">
          <text:p/>
        </draw:polygon>
        <draw:polygon draw:style-name="gr3" draw:text-style-name="P4" draw:layer="layout" svg:width="0.013cm" svg:height="0.035cm" svg:x="20.025cm" svg:y="16.758cm" svg:viewBox="0 0 14 36" draw:points="0,0 14,0 14,36 0,36">
          <text:p/>
        </draw:polygon>
        <draw:polygon draw:style-name="gr3" draw:text-style-name="P4" draw:layer="layout" svg:width="0.038cm" svg:height="0.552cm" svg:x="11.923cm" svg:y="16.792cm" svg:viewBox="0 0 39 553" draw:points="0,0 39,0 39,553 0,553">
          <text:p/>
        </draw:polygon>
        <draw:polygon draw:style-name="gr3" draw:text-style-name="P4" draw:layer="layout" svg:width="0.034cm" svg:height="0.552cm" svg:x="13.3cm" svg:y="16.792cm" svg:viewBox="0 0 35 553" draw:points="0,0 35,0 35,553 0,553">
          <text:p/>
        </draw:polygon>
        <draw:polygon draw:style-name="gr3" draw:text-style-name="P4" draw:layer="layout" svg:width="0.038cm" svg:height="0.552cm" svg:x="14.535cm" svg:y="16.792cm" svg:viewBox="0 0 39 553" draw:points="0,0 39,0 39,553 0,553">
          <text:p/>
        </draw:polygon>
        <draw:polygon draw:style-name="gr3" draw:text-style-name="P4" draw:layer="layout" svg:width="0.035cm" svg:height="0.552cm" svg:x="15.773cm" svg:y="16.792cm" svg:viewBox="0 0 36 553" draw:points="0,0 36,0 36,553 0,553">
          <text:p/>
        </draw:polygon>
        <draw:polygon draw:style-name="gr3" draw:text-style-name="P4" draw:layer="layout" svg:width="0.034cm" svg:height="0.552cm" svg:x="17.272cm" svg:y="16.792cm" svg:viewBox="0 0 35 553" draw:points="0,0 35,0 35,553 0,553">
          <text:p/>
        </draw:polygon>
        <draw:polygon draw:style-name="gr3" draw:text-style-name="P4" draw:layer="layout" svg:width="0.035cm" svg:height="0.552cm" svg:x="18.524cm" svg:y="16.792cm" svg:viewBox="0 0 36 553" draw:points="0,0 36,0 36,553 0,553">
          <text:p/>
        </draw:polygon>
        <draw:polygon draw:style-name="gr3" draw:text-style-name="P4" draw:layer="layout" svg:width="0.013cm" svg:height="0.552cm" svg:x="20.025cm" svg:y="16.792cm" svg:viewBox="0 0 14 553" draw:points="0,0 14,0 14,553 0,553">
          <text:p/>
        </draw:polygon>
        <draw:frame draw:style-name="gr82" draw:text-style-name="P5" draw:layer="layout" svg:width="0.614cm" svg:height="0.289cm" svg:x="16.04cm" svg:y="16.974cm">
          <draw:text-box>
            <text:p text:style-name="P2"><text:span text:style-name="T2">Träff </text:span></text:p>
          </draw:text-box>
        </draw:frame>
        <draw:frame draw:style-name="gr83" draw:text-style-name="P5" draw:layer="layout" svg:width="0.792cm" svg:height="0.289cm" svg:x="17.496cm" svg:y="16.974cm">
          <draw:text-box>
            <text:p text:style-name="P2"><text:span text:style-name="T2">Poäng </text:span></text:p>
          </draw:text-box>
        </draw:frame>
        <draw:frame draw:style-name="gr84" draw:text-style-name="P5" draw:layer="layout" svg:width="0.49cm" svg:height="0.289cm" svg:x="18.559cm" svg:y="16.974cm">
          <draw:text-box>
            <text:p text:style-name="P2"><text:span text:style-name="T2"><text:s/>Tid </text:span></text:p>
          </draw:text-box>
        </draw:frame>
        <draw:frame draw:style-name="gr85" draw:text-style-name="P5" draw:layer="layout" svg:width="0.501cm" svg:height="0.289cm" svg:x="12.45cm" svg:y="17.461cm">
          <draw:text-box>
            <text:p text:style-name="P2"><text:span text:style-name="T2">A/B </text:span></text:p>
          </draw:text-box>
        </draw:frame>
        <draw:frame draw:style-name="gr86" draw:text-style-name="P16" draw:layer="layout" svg:width="0.242cm" svg:height="0.268cm" svg:x="13.335cm" svg:y="17.39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4.571cm" svg:y="17.39cm">
          <draw:text-box>
            <text:p text:style-name="P2"><text:span text:style-name="T14"><text:s/></text:span></text:p>
          </draw:text-box>
        </draw:frame>
        <draw:polygon draw:style-name="gr3" draw:text-style-name="P4" draw:layer="layout" svg:width="0.038cm" svg:height="0.034cm" svg:x="11.923cm" svg:y="17.344cm" svg:viewBox="0 0 39 35" draw:points="0,0 39,0 39,35 0,35">
          <text:p/>
        </draw:polygon>
        <draw:polygon draw:style-name="gr3" draw:text-style-name="P4" draw:layer="layout" svg:width="1.345cm" svg:height="0.034cm" svg:x="11.958cm" svg:y="17.344cm" svg:viewBox="0 0 1346 35" draw:points="0,0 1346,0 1346,35 0,35">
          <text:p/>
        </draw:polygon>
        <draw:polygon draw:style-name="gr3" draw:text-style-name="P4" draw:layer="layout" svg:width="0.034cm" svg:height="0.034cm" svg:x="13.3cm" svg:y="17.344cm" svg:viewBox="0 0 35 35" draw:points="0,0 35,0 35,35 0,35">
          <text:p/>
        </draw:polygon>
        <draw:polygon draw:style-name="gr3" draw:text-style-name="P4" draw:layer="layout" svg:width="1.205cm" svg:height="0.034cm" svg:x="13.335cm" svg:y="17.344cm" svg:viewBox="0 0 1206 35" draw:points="0,0 1206,0 1206,35 0,35">
          <text:p/>
        </draw:polygon>
        <draw:polygon draw:style-name="gr3" draw:text-style-name="P4" draw:layer="layout" svg:width="0.038cm" svg:height="0.034cm" svg:x="14.535cm" svg:y="17.344cm" svg:viewBox="0 0 39 35" draw:points="0,0 39,0 39,35 0,35">
          <text:p/>
        </draw:polygon>
        <draw:polygon draw:style-name="gr3" draw:text-style-name="P4" draw:layer="layout" svg:width="1.203cm" svg:height="0.034cm" svg:x="14.57cm" svg:y="17.344cm" svg:viewBox="0 0 1204 35" draw:points="0,0 1204,0 1204,35 0,35">
          <text:p/>
        </draw:polygon>
        <draw:polygon draw:style-name="gr3" draw:text-style-name="P4" draw:layer="layout" svg:width="0.035cm" svg:height="0.034cm" svg:x="15.773cm" svg:y="17.344cm" svg:viewBox="0 0 36 35" draw:points="0,0 36,0 36,35 0,35">
          <text:p/>
        </draw:polygon>
        <draw:polygon draw:style-name="gr3" draw:text-style-name="P4" draw:layer="layout" svg:width="1.467cm" svg:height="0.034cm" svg:x="15.805cm" svg:y="17.344cm" svg:viewBox="0 0 1468 35" draw:points="0,0 1468,0 1468,35 0,35">
          <text:p/>
        </draw:polygon>
        <draw:polygon draw:style-name="gr3" draw:text-style-name="P4" draw:layer="layout" svg:width="0.034cm" svg:height="0.034cm" svg:x="17.272cm" svg:y="17.344cm" svg:viewBox="0 0 35 35" draw:points="0,0 35,0 35,35 0,35">
          <text:p/>
        </draw:polygon>
        <draw:polygon draw:style-name="gr3" draw:text-style-name="P4" draw:layer="layout" svg:width="1.222cm" svg:height="0.034cm" svg:x="17.303cm" svg:y="17.344cm" svg:viewBox="0 0 1223 35" draw:points="0,0 1223,0 1223,35 0,35">
          <text:p/>
        </draw:polygon>
        <draw:polygon draw:style-name="gr3" draw:text-style-name="P4" draw:layer="layout" svg:width="0.035cm" svg:height="0.034cm" svg:x="18.524cm" svg:y="17.344cm" svg:viewBox="0 0 36 35" draw:points="0,0 36,0 36,35 0,35">
          <text:p/>
        </draw:polygon>
        <draw:polygon draw:style-name="gr3" draw:text-style-name="P4" draw:layer="layout" svg:width="1.47cm" svg:height="0.034cm" svg:x="18.558cm" svg:y="17.344cm" svg:viewBox="0 0 1471 35" draw:points="0,0 1471,0 1471,35 0,35">
          <text:p/>
        </draw:polygon>
        <draw:polygon draw:style-name="gr3" draw:text-style-name="P4" draw:layer="layout" svg:width="0.013cm" svg:height="0.034cm" svg:x="20.025cm" svg:y="17.344cm" svg:viewBox="0 0 14 35" draw:points="0,0 14,0 14,35 0,35">
          <text:p/>
        </draw:polygon>
        <draw:polygon draw:style-name="gr3" draw:text-style-name="P4" draw:layer="layout" svg:width="0.038cm" svg:height="0.393cm" svg:x="11.923cm" svg:y="17.375cm" svg:viewBox="0 0 39 394" draw:points="0,0 39,0 39,394 0,394">
          <text:p/>
        </draw:polygon>
        <draw:polygon draw:style-name="gr3" draw:text-style-name="P4" draw:layer="layout" svg:width="0.034cm" svg:height="0.393cm" svg:x="13.3cm" svg:y="17.375cm" svg:viewBox="0 0 35 394" draw:points="0,0 35,0 35,394 0,394">
          <text:p/>
        </draw:polygon>
        <draw:polygon draw:style-name="gr3" draw:text-style-name="P4" draw:layer="layout" svg:width="0.038cm" svg:height="0.393cm" svg:x="14.535cm" svg:y="17.375cm" svg:viewBox="0 0 39 394" draw:points="0,0 39,0 39,394 0,394">
          <text:p/>
        </draw:polygon>
        <draw:polygon draw:style-name="gr3" draw:text-style-name="P4" draw:layer="layout" svg:width="0.035cm" svg:height="0.393cm" svg:x="15.773cm" svg:y="17.375cm" svg:viewBox="0 0 36 394" draw:points="0,0 36,0 36,394 0,394">
          <text:p/>
        </draw:polygon>
        <draw:polygon draw:style-name="gr3" draw:text-style-name="P4" draw:layer="layout" svg:width="0.034cm" svg:height="0.393cm" svg:x="17.272cm" svg:y="17.375cm" svg:viewBox="0 0 35 394" draw:points="0,0 35,0 35,394 0,394">
          <text:p/>
        </draw:polygon>
        <draw:polygon draw:style-name="gr3" draw:text-style-name="P4" draw:layer="layout" svg:width="0.035cm" svg:height="0.393cm" svg:x="18.524cm" svg:y="17.375cm" svg:viewBox="0 0 36 394" draw:points="0,0 36,0 36,394 0,394">
          <text:p/>
        </draw:polygon>
        <draw:polygon draw:style-name="gr3" draw:text-style-name="P4" draw:layer="layout" svg:width="0.013cm" svg:height="0.393cm" svg:x="20.025cm" svg:y="17.375cm" svg:viewBox="0 0 14 394" draw:points="0,0 14,0 14,394 0,394">
          <text:p/>
        </draw:polygon>
        <draw:frame draw:style-name="gr86" draw:text-style-name="P16" draw:layer="layout" svg:width="0.242cm" svg:height="0.268cm" svg:x="15.807cm" svg:y="17.39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7.306cm" svg:y="17.39cm">
          <draw:text-box>
            <text:p text:style-name="P2"><text:span text:style-name="T14"><text:s/></text:span></text:p>
          </draw:text-box>
        </draw:frame>
        <draw:frame draw:style-name="gr86" draw:text-style-name="P16" draw:layer="layout" svg:width="0.242cm" svg:height="0.268cm" svg:x="18.559cm" svg:y="17.39cm">
          <draw:text-box>
            <text:p text:style-name="P2"><text:span text:style-name="T14"><text:s/></text:span></text:p>
          </draw:text-box>
        </draw:frame>
        <draw:frame draw:style-name="gr8" draw:text-style-name="P5" draw:layer="layout" svg:width="0.285cm" svg:height="0.289cm" svg:x="12.59cm" svg:y="17.871cm">
          <draw:text-box>
            <text:p text:style-name="P2"><text:span text:style-name="T2">C </text:span></text:p>
          </draw:text-box>
        </draw:frame>
        <draw:frame draw:style-name="gr5" draw:text-style-name="P5" draw:layer="layout" svg:width="0.285cm" svg:height="0.323cm" svg:x="13.335cm" svg:y="17.7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7.792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7.765cm" svg:viewBox="0 0 39 21" draw:points="0,0 39,0 39,21 0,21">
          <text:p/>
        </draw:polygon>
        <draw:polygon draw:style-name="gr3" draw:text-style-name="P4" draw:layer="layout" svg:width="1.345cm" svg:height="0.02cm" svg:x="11.958cm" svg:y="17.765cm" svg:viewBox="0 0 1346 21" draw:points="0,0 1346,0 1346,21 0,21">
          <text:p/>
        </draw:polygon>
        <draw:polygon draw:style-name="gr3" draw:text-style-name="P4" draw:layer="layout" svg:width="0.034cm" svg:height="0.02cm" svg:x="13.3cm" svg:y="17.765cm" svg:viewBox="0 0 35 21" draw:points="0,0 35,0 35,21 0,21">
          <text:p/>
        </draw:polygon>
        <draw:polygon draw:style-name="gr3" draw:text-style-name="P4" draw:layer="layout" svg:width="1.205cm" svg:height="0.02cm" svg:x="13.335cm" svg:y="17.765cm" svg:viewBox="0 0 1206 21" draw:points="0,0 1206,0 1206,21 0,21">
          <text:p/>
        </draw:polygon>
        <draw:polygon draw:style-name="gr3" draw:text-style-name="P4" draw:layer="layout" svg:width="0.038cm" svg:height="0.02cm" svg:x="14.535cm" svg:y="17.765cm" svg:viewBox="0 0 39 21" draw:points="0,0 39,0 39,21 0,21">
          <text:p/>
        </draw:polygon>
        <draw:polygon draw:style-name="gr3" draw:text-style-name="P4" draw:layer="layout" svg:width="1.203cm" svg:height="0.02cm" svg:x="14.57cm" svg:y="17.765cm" svg:viewBox="0 0 1204 21" draw:points="0,0 1204,0 1204,21 0,21">
          <text:p/>
        </draw:polygon>
        <draw:polygon draw:style-name="gr3" draw:text-style-name="P4" draw:layer="layout" svg:width="0.035cm" svg:height="0.02cm" svg:x="15.773cm" svg:y="17.765cm" svg:viewBox="0 0 36 21" draw:points="0,0 36,0 36,21 0,21">
          <text:p/>
        </draw:polygon>
        <draw:polygon draw:style-name="gr3" draw:text-style-name="P4" draw:layer="layout" svg:width="1.467cm" svg:height="0.02cm" svg:x="15.805cm" svg:y="17.765cm" svg:viewBox="0 0 1468 21" draw:points="0,0 1468,0 1468,21 0,21">
          <text:p/>
        </draw:polygon>
        <draw:polygon draw:style-name="gr3" draw:text-style-name="P4" draw:layer="layout" svg:width="0.034cm" svg:height="0.02cm" svg:x="17.272cm" svg:y="17.765cm" svg:viewBox="0 0 35 21" draw:points="0,0 35,0 35,21 0,21">
          <text:p/>
        </draw:polygon>
        <draw:polygon draw:style-name="gr3" draw:text-style-name="P4" draw:layer="layout" svg:width="1.222cm" svg:height="0.02cm" svg:x="17.303cm" svg:y="17.765cm" svg:viewBox="0 0 1223 21" draw:points="0,0 1223,0 1223,21 0,21">
          <text:p/>
        </draw:polygon>
        <draw:polygon draw:style-name="gr3" draw:text-style-name="P4" draw:layer="layout" svg:width="0.035cm" svg:height="0.02cm" svg:x="18.524cm" svg:y="17.765cm" svg:viewBox="0 0 36 21" draw:points="0,0 36,0 36,21 0,21">
          <text:p/>
        </draw:polygon>
        <draw:polygon draw:style-name="gr3" draw:text-style-name="P4" draw:layer="layout" svg:width="1.47cm" svg:height="0.02cm" svg:x="18.558cm" svg:y="17.765cm" svg:viewBox="0 0 1471 21" draw:points="0,0 1471,0 1471,21 0,21">
          <text:p/>
        </draw:polygon>
        <draw:polygon draw:style-name="gr3" draw:text-style-name="P4" draw:layer="layout" svg:width="0.013cm" svg:height="0.02cm" svg:x="20.025cm" svg:y="17.765cm" svg:viewBox="0 0 14 21" draw:points="0,0 14,0 14,21 0,21">
          <text:p/>
        </draw:polygon>
        <draw:polygon draw:style-name="gr3" draw:text-style-name="P4" draw:layer="layout" svg:width="0.038cm" svg:height="0.402cm" svg:x="11.923cm" svg:y="17.782cm" svg:viewBox="0 0 39 403" draw:points="0,0 39,0 39,403 0,403">
          <text:p/>
        </draw:polygon>
        <draw:polygon draw:style-name="gr3" draw:text-style-name="P4" draw:layer="layout" svg:width="0.034cm" svg:height="0.402cm" svg:x="13.3cm" svg:y="17.782cm" svg:viewBox="0 0 35 403" draw:points="0,0 35,0 35,403 0,403">
          <text:p/>
        </draw:polygon>
        <draw:polygon draw:style-name="gr3" draw:text-style-name="P4" draw:layer="layout" svg:width="0.038cm" svg:height="0.402cm" svg:x="14.535cm" svg:y="17.782cm" svg:viewBox="0 0 39 403" draw:points="0,0 39,0 39,403 0,403">
          <text:p/>
        </draw:polygon>
        <draw:polygon draw:style-name="gr3" draw:text-style-name="P4" draw:layer="layout" svg:width="0.035cm" svg:height="0.402cm" svg:x="15.773cm" svg:y="17.782cm" svg:viewBox="0 0 36 403" draw:points="0,0 36,0 36,403 0,403">
          <text:p/>
        </draw:polygon>
        <draw:polygon draw:style-name="gr3" draw:text-style-name="P4" draw:layer="layout" svg:width="0.034cm" svg:height="0.402cm" svg:x="17.272cm" svg:y="17.782cm" svg:viewBox="0 0 35 403" draw:points="0,0 35,0 35,403 0,403">
          <text:p/>
        </draw:polygon>
        <draw:polygon draw:style-name="gr3" draw:text-style-name="P4" draw:layer="layout" svg:width="0.035cm" svg:height="0.402cm" svg:x="18.524cm" svg:y="17.782cm" svg:viewBox="0 0 36 403" draw:points="0,0 36,0 36,403 0,403">
          <text:p/>
        </draw:polygon>
        <draw:polygon draw:style-name="gr3" draw:text-style-name="P4" draw:layer="layout" svg:width="0.013cm" svg:height="0.402cm" svg:x="20.025cm" svg:y="17.782cm" svg:viewBox="0 0 14 403" draw:points="0,0 14,0 14,403 0,403">
          <text:p/>
        </draw:polygon>
        <draw:frame draw:style-name="gr5" draw:text-style-name="P5" draw:layer="layout" svg:width="0.285cm" svg:height="0.323cm" svg:x="15.807cm" svg:y="17.7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7.7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7.792cm">
          <draw:text-box>
            <text:p text:style-name="P2"><text:span text:style-name="T3"><text:s/></text:span></text:p>
          </draw:text-box>
        </draw:frame>
        <draw:frame draw:style-name="gr8" draw:text-style-name="P5" draw:layer="layout" svg:width="0.285cm" svg:height="0.289cm" svg:x="12.581cm" svg:y="18.285cm">
          <draw:text-box>
            <text:p text:style-name="P2"><text:span text:style-name="T2">D </text:span></text:p>
          </draw:text-box>
        </draw:frame>
        <draw:frame draw:style-name="gr5" draw:text-style-name="P5" draw:layer="layout" svg:width="0.285cm" svg:height="0.323cm" svg:x="13.335cm" svg:y="18.2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8.207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8.181cm" svg:viewBox="0 0 39 21" draw:points="0,0 39,0 39,21 0,21">
          <text:p/>
        </draw:polygon>
        <draw:polygon draw:style-name="gr3" draw:text-style-name="P4" draw:layer="layout" svg:width="1.345cm" svg:height="0.02cm" svg:x="11.958cm" svg:y="18.181cm" svg:viewBox="0 0 1346 21" draw:points="0,0 1346,0 1346,21 0,21">
          <text:p/>
        </draw:polygon>
        <draw:polygon draw:style-name="gr3" draw:text-style-name="P4" draw:layer="layout" svg:width="0.034cm" svg:height="0.02cm" svg:x="13.3cm" svg:y="18.181cm" svg:viewBox="0 0 35 21" draw:points="0,0 35,0 35,21 0,21">
          <text:p/>
        </draw:polygon>
        <draw:polygon draw:style-name="gr3" draw:text-style-name="P4" draw:layer="layout" svg:width="1.205cm" svg:height="0.02cm" svg:x="13.335cm" svg:y="18.181cm" svg:viewBox="0 0 1206 21" draw:points="0,0 1206,0 1206,21 0,21">
          <text:p/>
        </draw:polygon>
        <draw:polygon draw:style-name="gr3" draw:text-style-name="P4" draw:layer="layout" svg:width="0.038cm" svg:height="0.02cm" svg:x="14.535cm" svg:y="18.181cm" svg:viewBox="0 0 39 21" draw:points="0,0 39,0 39,21 0,21">
          <text:p/>
        </draw:polygon>
        <draw:polygon draw:style-name="gr3" draw:text-style-name="P4" draw:layer="layout" svg:width="1.203cm" svg:height="0.02cm" svg:x="14.57cm" svg:y="18.181cm" svg:viewBox="0 0 1204 21" draw:points="0,0 1204,0 1204,21 0,21">
          <text:p/>
        </draw:polygon>
        <draw:polygon draw:style-name="gr3" draw:text-style-name="P4" draw:layer="layout" svg:width="0.035cm" svg:height="0.02cm" svg:x="15.773cm" svg:y="18.181cm" svg:viewBox="0 0 36 21" draw:points="0,0 36,0 36,21 0,21">
          <text:p/>
        </draw:polygon>
        <draw:polygon draw:style-name="gr3" draw:text-style-name="P4" draw:layer="layout" svg:width="1.467cm" svg:height="0.02cm" svg:x="15.805cm" svg:y="18.181cm" svg:viewBox="0 0 1468 21" draw:points="0,0 1468,0 1468,21 0,21">
          <text:p/>
        </draw:polygon>
        <draw:polygon draw:style-name="gr3" draw:text-style-name="P4" draw:layer="layout" svg:width="0.034cm" svg:height="0.02cm" svg:x="17.272cm" svg:y="18.181cm" svg:viewBox="0 0 35 21" draw:points="0,0 35,0 35,21 0,21">
          <text:p/>
        </draw:polygon>
        <draw:polygon draw:style-name="gr3" draw:text-style-name="P4" draw:layer="layout" svg:width="1.222cm" svg:height="0.02cm" svg:x="17.303cm" svg:y="18.181cm" svg:viewBox="0 0 1223 21" draw:points="0,0 1223,0 1223,21 0,21">
          <text:p/>
        </draw:polygon>
        <draw:polygon draw:style-name="gr3" draw:text-style-name="P4" draw:layer="layout" svg:width="0.035cm" svg:height="0.02cm" svg:x="18.524cm" svg:y="18.181cm" svg:viewBox="0 0 36 21" draw:points="0,0 36,0 36,21 0,21">
          <text:p/>
        </draw:polygon>
        <draw:polygon draw:style-name="gr3" draw:text-style-name="P4" draw:layer="layout" svg:width="1.47cm" svg:height="0.02cm" svg:x="18.558cm" svg:y="18.181cm" svg:viewBox="0 0 1471 21" draw:points="0,0 1471,0 1471,21 0,21">
          <text:p/>
        </draw:polygon>
        <draw:polygon draw:style-name="gr3" draw:text-style-name="P4" draw:layer="layout" svg:width="0.013cm" svg:height="0.02cm" svg:x="20.025cm" svg:y="18.181cm" svg:viewBox="0 0 14 21" draw:points="0,0 14,0 14,21 0,21">
          <text:p/>
        </draw:polygon>
        <draw:polygon draw:style-name="gr3" draw:text-style-name="P4" draw:layer="layout" svg:width="0.038cm" svg:height="0.399cm" svg:x="11.923cm" svg:y="18.198cm" svg:viewBox="0 0 39 400" draw:points="0,0 39,0 39,400 0,400">
          <text:p/>
        </draw:polygon>
        <draw:polygon draw:style-name="gr3" draw:text-style-name="P4" draw:layer="layout" svg:width="0.034cm" svg:height="0.399cm" svg:x="13.3cm" svg:y="18.198cm" svg:viewBox="0 0 35 400" draw:points="0,0 35,0 35,400 0,400">
          <text:p/>
        </draw:polygon>
        <draw:polygon draw:style-name="gr3" draw:text-style-name="P4" draw:layer="layout" svg:width="0.038cm" svg:height="0.399cm" svg:x="14.535cm" svg:y="18.198cm" svg:viewBox="0 0 39 400" draw:points="0,0 39,0 39,400 0,400">
          <text:p/>
        </draw:polygon>
        <draw:polygon draw:style-name="gr3" draw:text-style-name="P4" draw:layer="layout" svg:width="0.035cm" svg:height="0.399cm" svg:x="15.773cm" svg:y="18.198cm" svg:viewBox="0 0 36 400" draw:points="0,0 36,0 36,400 0,400">
          <text:p/>
        </draw:polygon>
        <draw:polygon draw:style-name="gr3" draw:text-style-name="P4" draw:layer="layout" svg:width="0.034cm" svg:height="0.399cm" svg:x="17.272cm" svg:y="18.198cm" svg:viewBox="0 0 35 400" draw:points="0,0 35,0 35,400 0,400">
          <text:p/>
        </draw:polygon>
        <draw:polygon draw:style-name="gr3" draw:text-style-name="P4" draw:layer="layout" svg:width="0.035cm" svg:height="0.399cm" svg:x="18.524cm" svg:y="18.198cm" svg:viewBox="0 0 36 400" draw:points="0,0 36,0 36,400 0,400">
          <text:p/>
        </draw:polygon>
        <draw:polygon draw:style-name="gr3" draw:text-style-name="P4" draw:layer="layout" svg:width="0.013cm" svg:height="0.399cm" svg:x="20.025cm" svg:y="18.198cm" svg:viewBox="0 0 14 400" draw:points="0,0 14,0 14,400 0,400">
          <text:p/>
        </draw:polygon>
        <draw:frame draw:style-name="gr5" draw:text-style-name="P5" draw:layer="layout" svg:width="0.285cm" svg:height="0.323cm" svg:x="15.807cm" svg:y="18.2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8.2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8.207cm">
          <draw:text-box>
            <text:p text:style-name="P2"><text:span text:style-name="T3"><text:s/></text:span></text:p>
          </draw:text-box>
        </draw:frame>
        <draw:frame draw:style-name="gr87" draw:text-style-name="P5" draw:layer="layout" svg:width="0.834cm" svg:height="0.289cm" svg:x="12.04cm" svg:y="18.697cm">
          <draw:text-box>
            <text:p text:style-name="P2"><text:span text:style-name="T2"><text:s text:c="8"/>M </text:span></text:p>
          </draw:text-box>
        </draw:frame>
        <draw:frame draw:style-name="gr5" draw:text-style-name="P5" draw:layer="layout" svg:width="0.285cm" svg:height="0.323cm" svg:x="13.335cm" svg:y="18.62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8.62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18cm" svg:x="11.923cm" svg:y="18.596cm" svg:viewBox="0 0 39 19" draw:points="0,0 39,0 39,19 0,19">
          <text:p/>
        </draw:polygon>
        <draw:polygon draw:style-name="gr3" draw:text-style-name="P4" draw:layer="layout" svg:width="1.345cm" svg:height="0.018cm" svg:x="11.958cm" svg:y="18.596cm" svg:viewBox="0 0 1346 19" draw:points="0,0 1346,0 1346,19 0,19">
          <text:p/>
        </draw:polygon>
        <draw:polygon draw:style-name="gr3" draw:text-style-name="P4" draw:layer="layout" svg:width="0.034cm" svg:height="0.018cm" svg:x="13.3cm" svg:y="18.596cm" svg:viewBox="0 0 35 19" draw:points="0,0 35,0 35,19 0,19">
          <text:p/>
        </draw:polygon>
        <draw:polygon draw:style-name="gr3" draw:text-style-name="P4" draw:layer="layout" svg:width="1.205cm" svg:height="0.018cm" svg:x="13.335cm" svg:y="18.596cm" svg:viewBox="0 0 1206 19" draw:points="0,0 1206,0 1206,19 0,19">
          <text:p/>
        </draw:polygon>
        <draw:polygon draw:style-name="gr3" draw:text-style-name="P4" draw:layer="layout" svg:width="0.038cm" svg:height="0.018cm" svg:x="14.535cm" svg:y="18.596cm" svg:viewBox="0 0 39 19" draw:points="0,0 39,0 39,19 0,19">
          <text:p/>
        </draw:polygon>
        <draw:polygon draw:style-name="gr3" draw:text-style-name="P4" draw:layer="layout" svg:width="1.203cm" svg:height="0.018cm" svg:x="14.57cm" svg:y="18.596cm" svg:viewBox="0 0 1204 19" draw:points="0,0 1204,0 1204,19 0,19">
          <text:p/>
        </draw:polygon>
        <draw:polygon draw:style-name="gr3" draw:text-style-name="P4" draw:layer="layout" svg:width="0.035cm" svg:height="0.018cm" svg:x="15.773cm" svg:y="18.596cm" svg:viewBox="0 0 36 19" draw:points="0,0 36,0 36,19 0,19">
          <text:p/>
        </draw:polygon>
        <draw:polygon draw:style-name="gr3" draw:text-style-name="P4" draw:layer="layout" svg:width="1.467cm" svg:height="0.018cm" svg:x="15.805cm" svg:y="18.596cm" svg:viewBox="0 0 1468 19" draw:points="0,0 1468,0 1468,19 0,19">
          <text:p/>
        </draw:polygon>
        <draw:polygon draw:style-name="gr3" draw:text-style-name="P4" draw:layer="layout" svg:width="0.034cm" svg:height="0.018cm" svg:x="17.272cm" svg:y="18.596cm" svg:viewBox="0 0 35 19" draw:points="0,0 35,0 35,19 0,19">
          <text:p/>
        </draw:polygon>
        <draw:polygon draw:style-name="gr3" draw:text-style-name="P4" draw:layer="layout" svg:width="1.222cm" svg:height="0.018cm" svg:x="17.303cm" svg:y="18.596cm" svg:viewBox="0 0 1223 19" draw:points="0,0 1223,0 1223,19 0,19">
          <text:p/>
        </draw:polygon>
        <draw:polygon draw:style-name="gr3" draw:text-style-name="P4" draw:layer="layout" svg:width="0.035cm" svg:height="0.018cm" svg:x="18.524cm" svg:y="18.596cm" svg:viewBox="0 0 36 19" draw:points="0,0 36,0 36,19 0,19">
          <text:p/>
        </draw:polygon>
        <draw:polygon draw:style-name="gr3" draw:text-style-name="P4" draw:layer="layout" svg:width="1.47cm" svg:height="0.018cm" svg:x="18.558cm" svg:y="18.596cm" svg:viewBox="0 0 1471 19" draw:points="0,0 1471,0 1471,19 0,19">
          <text:p/>
        </draw:polygon>
        <draw:polygon draw:style-name="gr3" draw:text-style-name="P4" draw:layer="layout" svg:width="0.013cm" svg:height="0.018cm" svg:x="20.025cm" svg:y="18.596cm" svg:viewBox="0 0 14 19" draw:points="0,0 14,0 14,19 0,19">
          <text:p/>
        </draw:polygon>
        <draw:polygon draw:style-name="gr3" draw:text-style-name="P4" draw:layer="layout" svg:width="0.038cm" svg:height="0.399cm" svg:x="11.923cm" svg:y="18.613cm" svg:viewBox="0 0 39 400" draw:points="0,0 39,0 39,400 0,400">
          <text:p/>
        </draw:polygon>
        <draw:polygon draw:style-name="gr3" draw:text-style-name="P4" draw:layer="layout" svg:width="0.034cm" svg:height="0.399cm" svg:x="13.3cm" svg:y="18.613cm" svg:viewBox="0 0 35 400" draw:points="0,0 35,0 35,400 0,400">
          <text:p/>
        </draw:polygon>
        <draw:polygon draw:style-name="gr3" draw:text-style-name="P4" draw:layer="layout" svg:width="0.038cm" svg:height="0.399cm" svg:x="14.535cm" svg:y="18.613cm" svg:viewBox="0 0 39 400" draw:points="0,0 39,0 39,400 0,400">
          <text:p/>
        </draw:polygon>
        <draw:polygon draw:style-name="gr3" draw:text-style-name="P4" draw:layer="layout" svg:width="0.035cm" svg:height="0.399cm" svg:x="15.773cm" svg:y="18.613cm" svg:viewBox="0 0 36 400" draw:points="0,0 36,0 36,400 0,400">
          <text:p/>
        </draw:polygon>
        <draw:polygon draw:style-name="gr3" draw:text-style-name="P4" draw:layer="layout" svg:width="0.034cm" svg:height="0.399cm" svg:x="17.272cm" svg:y="18.613cm" svg:viewBox="0 0 35 400" draw:points="0,0 35,0 35,400 0,400">
          <text:p/>
        </draw:polygon>
        <draw:polygon draw:style-name="gr3" draw:text-style-name="P4" draw:layer="layout" svg:width="0.035cm" svg:height="0.399cm" svg:x="18.524cm" svg:y="18.613cm" svg:viewBox="0 0 36 400" draw:points="0,0 36,0 36,400 0,400">
          <text:p/>
        </draw:polygon>
        <draw:polygon draw:style-name="gr3" draw:text-style-name="P4" draw:layer="layout" svg:width="0.013cm" svg:height="0.399cm" svg:x="20.025cm" svg:y="18.613cm" svg:viewBox="0 0 14 400" draw:points="0,0 14,0 14,400 0,400">
          <text:p/>
        </draw:polygon>
        <draw:frame draw:style-name="gr5" draw:text-style-name="P5" draw:layer="layout" svg:width="0.285cm" svg:height="0.323cm" svg:x="15.807cm" svg:y="18.62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8.62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8.621cm">
          <draw:text-box>
            <text:p text:style-name="P2"><text:span text:style-name="T3"><text:s/></text:span></text:p>
          </draw:text-box>
        </draw:frame>
        <draw:frame draw:style-name="gr88" draw:text-style-name="P5" draw:layer="layout" svg:width="0.702cm" svg:height="0.289cm" svg:x="12.349cm" svg:y="19.124cm">
          <draw:text-box>
            <text:p text:style-name="P2"><text:span text:style-name="T2">Straff </text:span></text:p>
          </draw:text-box>
        </draw:frame>
        <draw:frame draw:style-name="gr5" draw:text-style-name="P5" draw:layer="layout" svg:width="0.285cm" svg:height="0.323cm" svg:x="13.335cm" svg:y="19.03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4.571cm" svg:y="19.03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2cm" svg:x="11.923cm" svg:y="19.009cm" svg:viewBox="0 0 39 21" draw:points="0,0 39,0 39,21 0,21">
          <text:p/>
        </draw:polygon>
        <draw:polygon draw:style-name="gr3" draw:text-style-name="P4" draw:layer="layout" svg:width="1.345cm" svg:height="0.02cm" svg:x="11.958cm" svg:y="19.009cm" svg:viewBox="0 0 1346 21" draw:points="0,0 1346,0 1346,21 0,21">
          <text:p/>
        </draw:polygon>
        <draw:polygon draw:style-name="gr3" draw:text-style-name="P4" draw:layer="layout" svg:width="0.034cm" svg:height="0.02cm" svg:x="13.3cm" svg:y="19.009cm" svg:viewBox="0 0 35 21" draw:points="0,0 35,0 35,21 0,21">
          <text:p/>
        </draw:polygon>
        <draw:polygon draw:style-name="gr3" draw:text-style-name="P4" draw:layer="layout" svg:width="1.205cm" svg:height="0.02cm" svg:x="13.335cm" svg:y="19.009cm" svg:viewBox="0 0 1206 21" draw:points="0,0 1206,0 1206,21 0,21">
          <text:p/>
        </draw:polygon>
        <draw:polygon draw:style-name="gr3" draw:text-style-name="P4" draw:layer="layout" svg:width="0.038cm" svg:height="0.02cm" svg:x="14.535cm" svg:y="19.009cm" svg:viewBox="0 0 39 21" draw:points="0,0 39,0 39,21 0,21">
          <text:p/>
        </draw:polygon>
        <draw:polygon draw:style-name="gr3" draw:text-style-name="P4" draw:layer="layout" svg:width="1.203cm" svg:height="0.02cm" svg:x="14.57cm" svg:y="19.009cm" svg:viewBox="0 0 1204 21" draw:points="0,0 1204,0 1204,21 0,21">
          <text:p/>
        </draw:polygon>
        <draw:polygon draw:style-name="gr3" draw:text-style-name="P4" draw:layer="layout" svg:width="0.035cm" svg:height="0.02cm" svg:x="15.773cm" svg:y="19.009cm" svg:viewBox="0 0 36 21" draw:points="0,0 36,0 36,21 0,21">
          <text:p/>
        </draw:polygon>
        <draw:polygon draw:style-name="gr3" draw:text-style-name="P4" draw:layer="layout" svg:width="1.467cm" svg:height="0.02cm" svg:x="15.805cm" svg:y="19.009cm" svg:viewBox="0 0 1468 21" draw:points="0,0 1468,0 1468,21 0,21">
          <text:p/>
        </draw:polygon>
        <draw:polygon draw:style-name="gr3" draw:text-style-name="P4" draw:layer="layout" svg:width="0.034cm" svg:height="0.02cm" svg:x="17.272cm" svg:y="19.009cm" svg:viewBox="0 0 35 21" draw:points="0,0 35,0 35,21 0,21">
          <text:p/>
        </draw:polygon>
        <draw:polygon draw:style-name="gr3" draw:text-style-name="P4" draw:layer="layout" svg:width="1.222cm" svg:height="0.02cm" svg:x="17.303cm" svg:y="19.009cm" svg:viewBox="0 0 1223 21" draw:points="0,0 1223,0 1223,21 0,21">
          <text:p/>
        </draw:polygon>
        <draw:polygon draw:style-name="gr3" draw:text-style-name="P4" draw:layer="layout" svg:width="0.035cm" svg:height="0.02cm" svg:x="18.524cm" svg:y="19.009cm" svg:viewBox="0 0 36 21" draw:points="0,0 36,0 36,21 0,21">
          <text:p/>
        </draw:polygon>
        <draw:polygon draw:style-name="gr3" draw:text-style-name="P4" draw:layer="layout" svg:width="1.47cm" svg:height="0.02cm" svg:x="18.558cm" svg:y="19.009cm" svg:viewBox="0 0 1471 21" draw:points="0,0 1471,0 1471,21 0,21">
          <text:p/>
        </draw:polygon>
        <draw:polygon draw:style-name="gr3" draw:text-style-name="P4" draw:layer="layout" svg:width="0.013cm" svg:height="0.02cm" svg:x="20.025cm" svg:y="19.009cm" svg:viewBox="0 0 14 21" draw:points="0,0 14,0 14,21 0,21">
          <text:p/>
        </draw:polygon>
        <draw:polygon draw:style-name="gr3" draw:text-style-name="P4" draw:layer="layout" svg:width="0.038cm" svg:height="0.41cm" svg:x="11.923cm" svg:y="19.026cm" svg:viewBox="0 0 39 411" draw:points="0,0 39,0 39,411 0,411">
          <text:p/>
        </draw:polygon>
        <draw:polygon draw:style-name="gr3" draw:text-style-name="P4" draw:layer="layout" svg:width="0.034cm" svg:height="0.41cm" svg:x="13.3cm" svg:y="19.026cm" svg:viewBox="0 0 35 411" draw:points="0,0 35,0 35,411 0,411">
          <text:p/>
        </draw:polygon>
        <draw:polygon draw:style-name="gr3" draw:text-style-name="P4" draw:layer="layout" svg:width="0.038cm" svg:height="0.41cm" svg:x="14.535cm" svg:y="19.026cm" svg:viewBox="0 0 39 411" draw:points="0,0 39,0 39,411 0,411">
          <text:p/>
        </draw:polygon>
        <draw:polygon draw:style-name="gr3" draw:text-style-name="P4" draw:layer="layout" svg:width="0.035cm" svg:height="0.41cm" svg:x="15.773cm" svg:y="19.026cm" svg:viewBox="0 0 36 411" draw:points="0,0 36,0 36,411 0,411">
          <text:p/>
        </draw:polygon>
        <draw:polygon draw:style-name="gr3" draw:text-style-name="P4" draw:layer="layout" svg:width="0.034cm" svg:height="0.41cm" svg:x="17.272cm" svg:y="19.026cm" svg:viewBox="0 0 35 411" draw:points="0,0 35,0 35,411 0,411">
          <text:p/>
        </draw:polygon>
        <draw:polygon draw:style-name="gr3" draw:text-style-name="P4" draw:layer="layout" svg:width="0.035cm" svg:height="0.41cm" svg:x="18.524cm" svg:y="19.026cm" svg:viewBox="0 0 36 411" draw:points="0,0 36,0 36,411 0,411">
          <text:p/>
        </draw:polygon>
        <draw:polygon draw:style-name="gr3" draw:text-style-name="P4" draw:layer="layout" svg:width="0.013cm" svg:height="0.41cm" svg:x="20.025cm" svg:y="19.026cm" svg:viewBox="0 0 14 411" draw:points="0,0 14,0 14,411 0,411">
          <text:p/>
        </draw:polygon>
        <draw:frame draw:style-name="gr5" draw:text-style-name="P5" draw:layer="layout" svg:width="0.285cm" svg:height="0.323cm" svg:x="15.807cm" svg:y="19.03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7.306cm" svg:y="19.03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9.03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0.038cm" svg:height="0.038cm" svg:x="11.923cm" svg:y="19.433cm" svg:viewBox="0 0 39 39" draw:points="0,0 39,0 39,39 0,39">
          <text:p/>
        </draw:polygon>
        <draw:polygon draw:style-name="gr3" draw:text-style-name="P4" draw:layer="layout" svg:width="0.038cm" svg:height="0.038cm" svg:x="11.923cm" svg:y="19.433cm" svg:viewBox="0 0 39 39" draw:points="0,0 39,0 39,39 0,39">
          <text:p/>
        </draw:polygon>
        <draw:polygon draw:style-name="gr3" draw:text-style-name="P4" draw:layer="layout" svg:width="0.034cm" svg:height="0.038cm" svg:x="11.958cm" svg:y="19.433cm" svg:viewBox="0 0 35 39" draw:points="0,0 35,0 35,39 0,39">
          <text:p/>
        </draw:polygon>
        <draw:polygon draw:style-name="gr3" draw:text-style-name="P4" draw:layer="layout" svg:width="1.311cm" svg:height="0.038cm" svg:x="11.992cm" svg:y="19.433cm" svg:viewBox="0 0 1312 39" draw:points="0,0 1312,0 1312,39 0,39">
          <text:p/>
        </draw:polygon>
        <draw:polygon draw:style-name="gr3" draw:text-style-name="P4" draw:layer="layout" svg:width="0.034cm" svg:height="0.038cm" svg:x="13.3cm" svg:y="19.433cm" svg:viewBox="0 0 35 39" draw:points="0,0 35,0 35,39 0,39">
          <text:p/>
        </draw:polygon>
        <draw:polygon draw:style-name="gr3" draw:text-style-name="P4" draw:layer="layout" svg:width="1.205cm" svg:height="0.038cm" svg:x="13.335cm" svg:y="19.433cm" svg:viewBox="0 0 1206 39" draw:points="0,0 1206,0 1206,39 0,39">
          <text:p/>
        </draw:polygon>
        <draw:polygon draw:style-name="gr3" draw:text-style-name="P4" draw:layer="layout" svg:width="0.038cm" svg:height="0.038cm" svg:x="14.535cm" svg:y="19.433cm" svg:viewBox="0 0 39 39" draw:points="0,0 39,0 39,39 0,39">
          <text:p/>
        </draw:polygon>
        <draw:polygon draw:style-name="gr3" draw:text-style-name="P4" draw:layer="layout" svg:width="1.203cm" svg:height="0.038cm" svg:x="14.57cm" svg:y="19.433cm" svg:viewBox="0 0 1204 39" draw:points="0,0 1204,0 1204,39 0,39">
          <text:p/>
        </draw:polygon>
        <draw:polygon draw:style-name="gr3" draw:text-style-name="P4" draw:layer="layout" svg:width="0.035cm" svg:height="0.038cm" svg:x="15.773cm" svg:y="19.433cm" svg:viewBox="0 0 36 39" draw:points="0,0 36,0 36,39 0,39">
          <text:p/>
        </draw:polygon>
        <draw:polygon draw:style-name="gr3" draw:text-style-name="P4" draw:layer="layout" svg:width="1.467cm" svg:height="0.038cm" svg:x="15.805cm" svg:y="19.433cm" svg:viewBox="0 0 1468 39" draw:points="0,0 1468,0 1468,39 0,39">
          <text:p/>
        </draw:polygon>
        <draw:polygon draw:style-name="gr3" draw:text-style-name="P4" draw:layer="layout" svg:width="0.034cm" svg:height="0.038cm" svg:x="17.272cm" svg:y="19.433cm" svg:viewBox="0 0 35 39" draw:points="0,0 35,0 35,39 0,39">
          <text:p/>
        </draw:polygon>
        <draw:polygon draw:style-name="gr3" draw:text-style-name="P4" draw:layer="layout" svg:width="1.222cm" svg:height="0.038cm" svg:x="17.303cm" svg:y="19.433cm" svg:viewBox="0 0 1223 39" draw:points="0,0 1223,0 1223,39 0,39">
          <text:p/>
        </draw:polygon>
        <draw:polygon draw:style-name="gr3" draw:text-style-name="P4" draw:layer="layout" svg:width="0.035cm" svg:height="0.038cm" svg:x="18.524cm" svg:y="19.433cm" svg:viewBox="0 0 36 39" draw:points="0,0 36,0 36,39 0,39">
          <text:p/>
        </draw:polygon>
        <draw:polygon draw:style-name="gr3" draw:text-style-name="P4" draw:layer="layout" svg:width="1.47cm" svg:height="0.038cm" svg:x="18.558cm" svg:y="19.433cm" svg:viewBox="0 0 1471 39" draw:points="0,0 1471,0 1471,39 0,39">
          <text:p/>
        </draw:polygon>
        <draw:polygon draw:style-name="gr3" draw:text-style-name="P4" draw:layer="layout" svg:width="0.013cm" svg:height="0.038cm" svg:x="20.025cm" svg:y="19.433cm" svg:viewBox="0 0 14 39" draw:points="0,0 14,0 14,39 0,39">
          <text:p/>
        </draw:polygon>
        <draw:polygon draw:style-name="gr3" draw:text-style-name="P4" draw:layer="layout" svg:width="0.034cm" svg:height="0.399cm" svg:x="17.272cm" svg:y="19.468cm" svg:viewBox="0 0 35 400" draw:points="0,0 35,0 35,400 0,400">
          <text:p/>
        </draw:polygon>
        <draw:polygon draw:style-name="gr3" draw:text-style-name="P4" draw:layer="layout" svg:width="0.034cm" svg:height="0.015cm" svg:x="17.272cm" svg:y="19.866cm" svg:viewBox="0 0 35 16" draw:points="0,0 35,0 35,16 0,16">
          <text:p/>
        </draw:polygon>
        <draw:polygon draw:style-name="gr3" draw:text-style-name="P4" draw:layer="layout" svg:width="0.034cm" svg:height="0.015cm" svg:x="17.272cm" svg:y="19.866cm" svg:viewBox="0 0 35 16" draw:points="0,0 35,0 35,16 0,16">
          <text:p/>
        </draw:polygon>
        <draw:polygon draw:style-name="gr3" draw:text-style-name="P4" draw:layer="layout" svg:width="1.222cm" svg:height="0.015cm" svg:x="17.303cm" svg:y="19.866cm" svg:viewBox="0 0 1223 16" draw:points="0,0 1223,0 1223,16 0,16">
          <text:p/>
        </draw:polygon>
        <draw:polygon draw:style-name="gr3" draw:text-style-name="P4" draw:layer="layout" svg:width="0.035cm" svg:height="0.399cm" svg:x="18.524cm" svg:y="19.468cm" svg:viewBox="0 0 36 400" draw:points="0,0 36,0 36,400 0,400">
          <text:p/>
        </draw:polygon>
        <draw:polygon draw:style-name="gr3" draw:text-style-name="P4" draw:layer="layout" svg:width="0.035cm" svg:height="0.015cm" svg:x="18.524cm" svg:y="19.866cm" svg:viewBox="0 0 36 16" draw:points="0,0 36,0 36,16 0,16">
          <text:p/>
        </draw:polygon>
        <draw:polygon draw:style-name="gr3" draw:text-style-name="P4" draw:layer="layout" svg:width="1.47cm" svg:height="0.015cm" svg:x="18.558cm" svg:y="19.866cm" svg:viewBox="0 0 1471 16" draw:points="0,0 1471,0 1471,16 0,16">
          <text:p/>
        </draw:polygon>
        <draw:polygon draw:style-name="gr3" draw:text-style-name="P4" draw:layer="layout" svg:width="0.013cm" svg:height="0.399cm" svg:x="20.025cm" svg:y="19.468cm" svg:viewBox="0 0 14 400" draw:points="0,0 14,0 14,400 0,400">
          <text:p/>
        </draw:polygon>
        <draw:polygon draw:style-name="gr3" draw:text-style-name="P4" draw:layer="layout" svg:width="0.013cm" svg:height="0.015cm" svg:x="20.025cm" svg:y="19.866cm" svg:viewBox="0 0 14 16" draw:points="0,0 14,0 14,16 0,16">
          <text:p/>
        </draw:polygon>
        <draw:polygon draw:style-name="gr3" draw:text-style-name="P4" draw:layer="layout" svg:width="0.013cm" svg:height="0.015cm" svg:x="20.025cm" svg:y="19.866cm" svg:viewBox="0 0 14 16" draw:points="0,0 14,0 14,16 0,16">
          <text:p/>
        </draw:polygon>
        <draw:frame draw:style-name="gr5" draw:text-style-name="P5" draw:layer="layout" svg:width="0.285cm" svg:height="0.323cm" svg:x="11.946cm" svg:y="19.477cm">
          <draw:text-box>
            <text:p text:style-name="P2"><text:span text:style-name="T3"><text:s/></text:span></text:p>
          </draw:text-box>
        </draw:frame>
        <draw:frame draw:style-name="gr77" draw:text-style-name="P1" draw:layer="layout" svg:width="0.939cm" svg:height="1.278cm" svg:x="11.677cm" svg:y="0.831cm">
          <draw:image xlink:href="Pictures/10000000000000520000006F12695969.png" xlink:type="simple" xlink:show="embed" xlink:actuate="onLoad" draw:mime-type="image/png">
            <text:p/>
          </draw:image>
        </draw:frame>
        <draw:frame draw:style-name="gr5" draw:text-style-name="P5" draw:layer="layout" svg:width="0.285cm" svg:height="0.323cm" svg:x="17.306cm" svg:y="19.47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5cm" svg:height="0.323cm" svg:x="18.559cm" svg:y="19.477cm">
          <draw:text-box>
            <text:p text:style-name="P2"><text:span text:style-name="T3"><text:s/></text:span></text:p>
          </draw:text-box>
        </draw:frame>
        <draw:frame draw:style-name="gr70" draw:text-style-name="P13" draw:layer="layout" svg:width="0.391cm" svg:height="0.395cm" svg:x="11.908cm" svg:y="19.977cm">
          <draw:text-box>
            <text:p text:style-name="P2"><text:span text:style-name="T10"><text:s/></text:span></text:p>
          </draw:text-box>
        </draw:frame>
        <draw:polygon draw:style-name="gr3" draw:text-style-name="P4" draw:layer="layout" svg:width="4.952cm" svg:height="0.014cm" svg:x="3.641cm" svg:y="3.58cm" svg:viewBox="0 0 4953 15" draw:points="0,0 4953,0 4953,15 0,15">
          <text:p/>
        </draw:polygon>
        <draw:frame draw:style-name="gr91" draw:text-style-name="P5" draw:layer="layout" svg:width="2.394cm" svg:height="0.289cm" svg:x="1.27cm" svg:y="3.338cm">
          <draw:text-box>
            <text:p text:style-name="P2"><text:span text:style-name="T2">Pistolskyttekortsnr: <text:s/></text:span></text:p>
          </draw:text-box>
        </draw:frame>
        <draw:frame draw:style-name="gr92" draw:text-style-name="P12" draw:layer="layout" svg:width="0.846cm" svg:height="0.289cm" svg:x="3.405cm" svg:y="3.878cm">
          <draw:text-box>
            <text:p text:style-name="P2"><text:span text:style-name="T2">Militär </text:span></text:p>
          </draw:text-box>
        </draw:frame>
        <draw:frame draw:style-name="gr93" draw:text-style-name="P5" draw:layer="layout" svg:width="1.104cm" svg:height="0.289cm" svg:x="11.618cm" svg:y="23.188cm">
          <draw:text-box>
            <text:p text:style-name="P2"><text:span text:style-name="T2">Resultat: </text:span></text:p>
          </draw:text-box>
        </draw:frame>
        <draw:polygon draw:style-name="gr3" draw:text-style-name="P4" draw:layer="layout" svg:width="0.038cm" svg:height="0.401cm" svg:x="11.924cm" svg:y="10.517cm" svg:viewBox="0 0 39 402" draw:points="0,0 39,0 39,402 0,402">
          <text:p/>
        </draw:polygon>
        <draw:polygon draw:style-name="gr3" draw:text-style-name="P4" draw:layer="layout" svg:width="0.038cm" svg:height="0.401cm" svg:x="11.925cm" svg:y="10.017cm" svg:viewBox="0 0 39 402" draw:points="0,0 39,0 39,402 0,402">
          <text:p/>
        </draw:polygon>
        <draw:polygon draw:style-name="gr3" draw:text-style-name="P4" draw:layer="layout" svg:width="0.038cm" svg:height="0.401cm" svg:x="11.926cm" svg:y="10.717cm" svg:viewBox="0 0 39 402" draw:points="0,0 39,0 39,402 0,402">
          <text:p/>
        </draw:polygon>
        <draw:polygon draw:style-name="gr3" draw:text-style-name="P4" draw:layer="layout" svg:width="0.038cm" svg:height="0.401cm" svg:x="11.927cm" svg:y="10.217cm" svg:viewBox="0 0 39 402" draw:points="0,0 39,0 39,402 0,402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1T13:48:04.904045256</dc:date>
    <meta:editing-duration>PT35M5S</meta:editing-duration>
    <meta:editing-cycles>7</meta:editing-cycles>
    <meta:generator>LibreOffice/26.2.3.2$Linux_X86_64 LibreOffice_project/620$Build-2</meta:generator>
    <meta:print-date>2026-05-11T13:38:45.508741470</meta:print-date>
    <meta:printed-by>PDF files</meta:printed-by>
    <meta:document-statistic meta:object-count="1125"/>
  </office:meta>
</office:document-meta>
</file>